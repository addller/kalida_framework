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officeooo:rsid="0015225d" officeooo:paragraph-rsid="0015225d"/>
    </style:style>
    <style:style style:name="P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225d" officeooo:paragraph-rsid="0015225d"/>
    </style:style>
    <style:style style:name="P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5fe0" officeooo:paragraph-rsid="0073306b"/>
    </style:style>
    <style:style style:name="P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88371a" officeooo:paragraph-rsid="0073306b"/>
    </style:style>
    <style:style style:name="P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3306b" officeooo:paragraph-rsid="0015225d"/>
    </style:style>
    <style:style style:name="P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3936d" officeooo:paragraph-rsid="0073306b"/>
    </style:style>
    <style:style style:name="P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5fe0" officeooo:paragraph-rsid="00155fe0"/>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5fe0" officeooo:paragraph-rsid="00747d4b"/>
    </style:style>
    <style:style style:name="P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d444" officeooo:paragraph-rsid="0015d444"/>
    </style:style>
    <style:style style:name="P1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47d4b" officeooo:paragraph-rsid="00747d4b"/>
    </style:style>
    <style:style style:name="P1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d444" officeooo:paragraph-rsid="00760b6c"/>
    </style:style>
    <style:style style:name="P12" style:family="paragraph" style:parent-style-name="Standard">
      <loext:graphic-properties draw:fill="none"/>
      <style:paragraph-properties fo:margin-left="0cm" fo:margin-right="0cm" fo:margin-top="0cm" fo:margin-bottom="0.499cm" style:contextual-spacing="false" fo:text-align="justify" style:justify-single-word="false" fo:text-indent="1cm" style:auto-text-indent="false" fo:background-color="transparent"/>
      <style:text-properties officeooo:rsid="0016b7e7" officeooo:paragraph-rsid="0016b7e7"/>
    </style:style>
    <style:style style:name="P13" style:family="paragraph" style:parent-style-name="Text_20_body">
      <style:paragraph-properties fo:text-align="center" style:justify-single-word="false"/>
      <style:text-properties officeooo:rsid="009bf90d" officeooo:paragraph-rsid="009bf90d"/>
    </style:style>
    <style:style style:name="P14"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officeooo:paragraph-rsid="009bf90d"/>
    </style:style>
    <style:style style:name="P15"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style>
    <style:style style:name="P1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60a4cf" officeooo:paragraph-rsid="009bf90d"/>
    </style:style>
    <style:style style:name="P17" style:family="paragraph" style:parent-style-name="Standard">
      <loext:graphic-properties draw:fill="none"/>
      <style:paragraph-properties fo:margin-left="0cm" fo:margin-right="0cm" fo:margin-top="0cm" fo:margin-bottom="0.499cm" style:contextual-spacing="false" fo:text-align="justify" style:justify-single-word="false" fo:text-indent="1cm" style:auto-text-indent="false" fo:background-color="transparent"/>
      <style:text-properties officeooo:rsid="001730aa" officeooo:paragraph-rsid="001730aa"/>
    </style:style>
    <style:style style:name="P18"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style>
    <style:style style:name="P1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730aa" officeooo:paragraph-rsid="001730aa"/>
    </style:style>
    <style:style style:name="P2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868eb" officeooo:paragraph-rsid="001868eb"/>
    </style:style>
    <style:style style:name="P21" style:family="paragraph" style:parent-style-name="Standard">
      <style:text-properties officeooo:rsid="001868eb" officeooo:paragraph-rsid="001868eb"/>
    </style:style>
    <style:style style:name="P22" style:family="paragraph" style:parent-style-name="Standard">
      <style:paragraph-properties fo:text-align="center" style:justify-single-word="false"/>
      <style:text-properties officeooo:rsid="001868eb" officeooo:paragraph-rsid="001868eb"/>
    </style:style>
    <style:style style:name="P23"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9fd50" officeooo:paragraph-rsid="0019fd50"/>
    </style:style>
    <style:style style:name="P2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9fd50" officeooo:paragraph-rsid="0019fd50"/>
    </style:style>
    <style:style style:name="P25" style:family="paragraph" style:parent-style-name="Standard">
      <style:text-properties officeooo:rsid="0019fd50" officeooo:paragraph-rsid="0019fd50"/>
    </style:style>
    <style:style style:name="P26" style:family="paragraph" style:parent-style-name="Standard">
      <style:paragraph-properties fo:text-align="center" style:justify-single-word="false"/>
      <style:text-properties officeooo:rsid="00773b27" officeooo:paragraph-rsid="00773b27"/>
    </style:style>
    <style:style style:name="P27" style:family="paragraph" style:parent-style-name="Standard">
      <style:paragraph-properties fo:text-align="center" style:justify-single-word="false"/>
      <style:text-properties officeooo:rsid="0019fd50" officeooo:paragraph-rsid="0019fd50"/>
    </style:style>
    <style:style style:name="P28" style:family="paragraph" style:parent-style-name="Standard">
      <style:paragraph-properties fo:text-align="center" style:justify-single-word="false"/>
      <style:text-properties officeooo:rsid="001abfea" officeooo:paragraph-rsid="001abfea"/>
    </style:style>
    <style:style style:name="P2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abfea" officeooo:paragraph-rsid="001abfea"/>
    </style:style>
    <style:style style:name="P30" style:family="paragraph" style:parent-style-name="Standard">
      <style:paragraph-properties fo:text-align="justify" style:justify-single-word="false"/>
      <style:text-properties officeooo:rsid="001abfea" officeooo:paragraph-rsid="001abfea"/>
    </style:style>
    <style:style style:name="P31" style:family="paragraph" style:parent-style-name="Standard">
      <style:paragraph-properties fo:text-align="justify" style:justify-single-word="false"/>
      <style:text-properties officeooo:rsid="0058a7db" officeooo:paragraph-rsid="0058a7db"/>
    </style:style>
    <style:style style:name="P32" style:family="paragraph" style:parent-style-name="Standard">
      <style:paragraph-properties fo:text-align="justify" style:justify-single-word="false"/>
      <style:text-properties fo:color="#d4d4d4" loext:opacity="100%" style:font-name="Consolas" fo:font-size="10.5pt" fo:font-weight="normal" officeooo:rsid="001abfea" officeooo:paragraph-rsid="001abfea" fo:background-color="#1e1e1e"/>
    </style:style>
    <style:style style:name="P33" style:family="paragraph" style:parent-style-name="Standard">
      <style:paragraph-properties style:line-height-at-least="0.503cm"/>
      <style:text-properties fo:color="#d4d4d4" loext:opacity="100%" fo:background-color="#1e1e1e"/>
    </style:style>
    <style:style style:name="P34" style:family="paragraph" style:parent-style-name="Standard">
      <style:paragraph-properties style:line-height-at-least="0.503cm"/>
      <style:text-properties fo:color="#d4d4d4" loext:opacity="100%" style:font-name="Consolas" fo:font-size="10.5pt" fo:font-weight="normal" fo:background-color="#1e1e1e"/>
    </style:style>
    <style:style style:name="P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abfea" officeooo:paragraph-rsid="001abfea"/>
    </style:style>
    <style:style style:name="P3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60a4cf" officeooo:paragraph-rsid="0060a4cf"/>
    </style:style>
    <style:style style:name="P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5cd5c5" officeooo:paragraph-rsid="001abfea"/>
    </style:style>
    <style:style style:name="P38" style:family="paragraph" style:parent-style-name="Standard">
      <style:paragraph-properties fo:text-align="center" style:justify-single-word="false"/>
      <style:text-properties officeooo:rsid="0058a7db" officeooo:paragraph-rsid="0058a7db"/>
    </style:style>
    <style:style style:name="P39" style:family="paragraph" style:parent-style-name="Standard">
      <style:paragraph-properties fo:text-align="justify" style:justify-single-word="false"/>
      <style:text-properties fo:color="#d4d4d4" loext:opacity="100%" style:font-name="Consolas" fo:font-size="10.5pt" fo:font-weight="normal" officeooo:paragraph-rsid="001abfea" fo:background-color="#1e1e1e"/>
    </style:style>
    <style:style style:name="P40" style:family="paragraph" style:parent-style-name="Standard">
      <style:paragraph-properties style:line-height-at-least="0.503cm"/>
    </style:style>
    <style:style style:name="P41" style:family="paragraph" style:parent-style-name="Standard">
      <style:paragraph-properties style:line-height-at-least="0.503cm"/>
      <style:text-properties fo:color="#9cdcfe" loext:opacity="100%" style:font-name="Consolas" fo:font-size="10.5pt" fo:font-weight="normal" fo:background-color="#1e1e1e"/>
    </style:style>
    <style:style style:name="P4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60a4cf" officeooo:paragraph-rsid="001b9a45"/>
    </style:style>
    <style:style style:name="P4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60a4cf" officeooo:paragraph-rsid="001b9a45"/>
    </style:style>
    <style:style style:name="P4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b9a45" officeooo:paragraph-rsid="001b9a45"/>
    </style:style>
    <style:style style:name="P45" style:family="paragraph" style:parent-style-name="Standard">
      <style:paragraph-properties fo:text-align="justify" style:justify-single-word="false"/>
      <style:text-properties officeooo:rsid="001b9a45" officeooo:paragraph-rsid="001b9a45"/>
    </style:style>
    <style:style style:name="P4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ced39" officeooo:paragraph-rsid="001ced39"/>
    </style:style>
    <style:style style:name="P4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ed39" officeooo:paragraph-rsid="001ced39"/>
    </style:style>
    <style:style style:name="P4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color="#3465a4" loext:opacity="100%" officeooo:rsid="001ced39" officeooo:paragraph-rsid="001ced39"/>
    </style:style>
    <style:style style:name="P4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e7bba" officeooo:paragraph-rsid="001e7bba"/>
    </style:style>
    <style:style style:name="P5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ed39" officeooo:paragraph-rsid="001e7bba"/>
    </style:style>
    <style:style style:name="P5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00c68" officeooo:paragraph-rsid="00200c68"/>
    </style:style>
    <style:style style:name="P5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11943" officeooo:paragraph-rsid="00211943"/>
    </style:style>
    <style:style style:name="P5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a70bf" officeooo:paragraph-rsid="007a70bf"/>
    </style:style>
    <style:style style:name="P5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21da1" officeooo:paragraph-rsid="00221da1"/>
    </style:style>
    <style:style style:name="P5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36016" officeooo:paragraph-rsid="00236016"/>
    </style:style>
    <style:style style:name="P5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53979" officeooo:paragraph-rsid="00253979"/>
    </style:style>
    <style:style style:name="P5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a04c4e" officeooo:paragraph-rsid="00a04c4e"/>
    </style:style>
    <style:style style:name="P5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5eb1c3" officeooo:paragraph-rsid="00253979"/>
    </style:style>
    <style:style style:name="P59" style:family="paragraph" style:parent-style-name="Standard">
      <style:paragraph-properties fo:text-align="justify" style:justify-single-word="false"/>
      <style:text-properties officeooo:rsid="00253979" officeooo:paragraph-rsid="00253979"/>
    </style:style>
    <style:style style:name="P60" style:family="paragraph" style:parent-style-name="Standard">
      <style:paragraph-properties fo:text-align="justify" style:justify-single-word="false"/>
      <style:text-properties fo:color="#d4d4d4" loext:opacity="100%" style:font-name="Consolas" fo:font-size="10.5pt" fo:font-weight="normal" officeooo:rsid="00253979" officeooo:paragraph-rsid="00253979" fo:background-color="#1e1e1e"/>
    </style:style>
    <style:style style:name="P61" style:family="paragraph" style:parent-style-name="Standard">
      <style:paragraph-properties fo:margin-top="0cm" fo:margin-bottom="0.499cm" style:contextual-spacing="false" style:line-height-at-least="0.503cm"/>
    </style:style>
    <style:style style:name="P62" style:family="paragraph" style:parent-style-name="Standard">
      <style:paragraph-properties fo:text-align="justify" style:justify-single-word="false"/>
      <style:text-properties officeooo:rsid="001e7bba" officeooo:paragraph-rsid="001e7bba"/>
    </style:style>
    <style:style style:name="P63"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253979" officeooo:paragraph-rsid="00253979"/>
    </style:style>
    <style:style style:name="P6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62152" officeooo:paragraph-rsid="00262152"/>
    </style:style>
    <style:style style:name="P65" style:family="paragraph" style:parent-style-name="Standard">
      <style:paragraph-properties fo:text-align="justify" style:justify-single-word="false"/>
      <style:text-properties officeooo:rsid="00262152" officeooo:paragraph-rsid="00262152"/>
    </style:style>
    <style:style style:name="P66" style:family="paragraph" style:parent-style-name="Standard">
      <style:paragraph-properties fo:text-align="justify" style:justify-single-word="false"/>
      <style:text-properties fo:color="#d4d4d4" loext:opacity="100%" style:font-name="Consolas" fo:font-size="10.5pt" fo:font-weight="normal" officeooo:rsid="00262152" officeooo:paragraph-rsid="00262152" fo:background-color="#1e1e1e"/>
    </style:style>
    <style:style style:name="P6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2763a7" officeooo:paragraph-rsid="002763a7"/>
    </style:style>
    <style:style style:name="P6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763a7" officeooo:paragraph-rsid="002763a7"/>
    </style:style>
    <style:style style:name="P69" style:family="paragraph" style:parent-style-name="Standard">
      <style:paragraph-properties fo:text-align="justify" style:justify-single-word="false"/>
      <style:text-properties officeooo:rsid="002cbbb7" officeooo:paragraph-rsid="002cbbb7"/>
    </style:style>
    <style:style style:name="P70" style:family="paragraph" style:parent-style-name="Standard">
      <style:paragraph-properties style:line-height-at-least="0.503cm"/>
      <style:text-properties fo:color="#d4d4d4" loext:opacity="100%" officeooo:paragraph-rsid="007c4028" fo:background-color="#1e1e1e"/>
    </style:style>
    <style:style style:name="P71" style:family="paragraph" style:parent-style-name="Standard">
      <style:paragraph-properties fo:text-align="justify" style:justify-single-word="false"/>
      <style:text-properties officeooo:rsid="002d57bb" officeooo:paragraph-rsid="002d57bb"/>
    </style:style>
    <style:style style:name="P72" style:family="paragraph" style:parent-style-name="Standard">
      <style:paragraph-properties fo:text-align="justify" style:justify-single-word="false"/>
      <style:text-properties officeooo:rsid="002db602" officeooo:paragraph-rsid="002db602"/>
    </style:style>
    <style:style style:name="P73" style:family="paragraph" style:parent-style-name="Standard">
      <style:paragraph-properties fo:text-align="justify" style:justify-single-word="false"/>
      <style:text-properties officeooo:rsid="002e0706" officeooo:paragraph-rsid="002e0706"/>
    </style:style>
    <style:style style:name="P74" style:family="paragraph" style:parent-style-name="Standard">
      <style:paragraph-properties fo:text-align="center" style:justify-single-word="false"/>
      <style:text-properties officeooo:rsid="002e0706" officeooo:paragraph-rsid="002e0706"/>
    </style:style>
    <style:style style:name="P75" style:family="paragraph" style:parent-style-name="Standard">
      <style:paragraph-properties fo:text-align="justify" style:justify-single-word="false"/>
      <style:text-properties fo:color="#d4d4d4" loext:opacity="100%" style:font-name="Consolas" fo:font-size="10.5pt" fo:font-weight="normal" officeooo:paragraph-rsid="002e0706" fo:background-color="#1e1e1e"/>
    </style:style>
    <style:style style:name="P7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2e0706" officeooo:paragraph-rsid="002e0706"/>
    </style:style>
    <style:style style:name="P7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e0706" officeooo:paragraph-rsid="002e0706"/>
    </style:style>
    <style:style style:name="P7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e0706" officeooo:paragraph-rsid="008a5acc"/>
    </style:style>
    <style:style style:name="P7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e7533" officeooo:paragraph-rsid="002e7533"/>
    </style:style>
    <style:style style:name="P8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2e7533"/>
    </style:style>
    <style:style style:name="P81" style:family="paragraph" style:parent-style-name="Standard">
      <style:paragraph-properties fo:text-align="justify" style:justify-single-word="false"/>
      <style:text-properties officeooo:rsid="002e7533" officeooo:paragraph-rsid="002e7533"/>
    </style:style>
    <style:style style:name="P8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2e7533" officeooo:paragraph-rsid="002e7533"/>
    </style:style>
    <style:style style:name="P8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f6edd" officeooo:paragraph-rsid="002f6edd"/>
    </style:style>
    <style:style style:name="P8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f6edd" officeooo:paragraph-rsid="006e60ad"/>
    </style:style>
    <style:style style:name="P8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6e60ad" officeooo:paragraph-rsid="006e60ad"/>
    </style:style>
    <style:style style:name="P8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2f6edd" officeooo:paragraph-rsid="002f6edd"/>
    </style:style>
    <style:style style:name="P8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0cbe7" officeooo:paragraph-rsid="0030cbe7"/>
    </style:style>
    <style:style style:name="P88" style:family="paragraph" style:parent-style-name="Standard" style:master-page-name="">
      <loext:graphic-properties draw:fill="none"/>
      <style:paragraph-properties fo:margin-left="0cm" fo:margin-right="0cm" fo:text-align="justify" style:justify-single-word="false" fo:text-indent="1.199cm" style:auto-text-indent="false" style:page-number="auto" fo:background-color="transparent"/>
      <style:text-properties officeooo:rsid="006e60ad" officeooo:paragraph-rsid="006e60ad"/>
    </style:style>
    <style:style style:name="P89" style:family="paragraph" style:parent-style-name="Standard">
      <loext:graphic-properties draw:fill="none"/>
      <style:paragraph-properties fo:margin-left="0cm" fo:margin-right="0cm" fo:text-align="justify" style:justify-single-word="false" fo:text-indent="1.199cm" style:auto-text-indent="false" fo:background-color="transparent"/>
      <style:text-properties officeooo:rsid="0030cbe7" officeooo:paragraph-rsid="0030cbe7"/>
    </style:style>
    <style:style style:name="P90" style:family="paragraph" style:parent-style-name="Standard">
      <loext:graphic-properties draw:fill="none"/>
      <style:paragraph-properties fo:margin-left="0cm" fo:margin-right="0cm" fo:text-align="justify" style:justify-single-word="false" fo:text-indent="1.199cm" style:auto-text-indent="false" fo:background-color="transparent"/>
      <style:text-properties officeooo:rsid="006e60ad" officeooo:paragraph-rsid="006e60ad"/>
    </style:style>
    <style:style style:name="P91" style:family="paragraph" style:parent-style-name="Standard">
      <loext:graphic-properties draw:fill="none"/>
      <style:paragraph-properties fo:margin-left="0cm" fo:margin-right="0cm" fo:text-align="justify" style:justify-single-word="false" fo:text-indent="1.199cm" style:auto-text-indent="false" fo:background-color="transparent"/>
      <style:text-properties fo:color="#55308d" loext:opacity="100%" officeooo:rsid="0030cbe7" officeooo:paragraph-rsid="0030cbe7"/>
    </style:style>
    <style:style style:name="P92" style:family="paragraph" style:parent-style-name="Standard">
      <loext:graphic-properties draw:fill="none"/>
      <style:paragraph-properties fo:margin-left="0cm" fo:margin-right="0cm" fo:text-align="justify" style:justify-single-word="false" fo:text-indent="1.199cm" style:auto-text-indent="false" fo:background-color="transparent"/>
      <style:text-properties officeooo:rsid="0085dab3" officeooo:paragraph-rsid="0030cbe7"/>
    </style:style>
    <style:style style:name="P93" style:family="paragraph" style:parent-style-name="Standard">
      <style:paragraph-properties fo:text-align="justify" style:justify-single-word="false"/>
      <style:text-properties officeooo:rsid="002e0706" officeooo:paragraph-rsid="0030cbe7"/>
    </style:style>
    <style:style style:name="P94" style:family="paragraph" style:parent-style-name="Standard">
      <style:paragraph-properties fo:text-align="center" style:justify-single-word="false"/>
      <style:text-properties officeooo:rsid="002e0706" officeooo:paragraph-rsid="0030cbe7"/>
    </style:style>
    <style:style style:name="P95" style:family="paragraph" style:parent-style-name="Standard">
      <style:paragraph-properties fo:text-align="justify" style:justify-single-word="false"/>
      <style:text-properties fo:color="#d4d4d4" loext:opacity="100%" style:font-name="Consolas" fo:font-size="10.5pt" fo:font-weight="normal" officeooo:rsid="002e7533" officeooo:paragraph-rsid="002e7533" fo:background-color="#1e1e1e"/>
    </style:style>
    <style:style style:name="P9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30cbe7" officeooo:paragraph-rsid="0030cbe7"/>
    </style:style>
    <style:style style:name="P97" style:family="paragraph" style:parent-style-name="Standard">
      <style:paragraph-properties fo:text-align="justify" style:justify-single-word="false"/>
      <style:text-properties officeooo:rsid="0030cbe7" officeooo:paragraph-rsid="0030cbe7"/>
    </style:style>
    <style:style style:name="P98" style:family="paragraph" style:parent-style-name="Standard">
      <style:paragraph-properties fo:text-align="justify" style:justify-single-word="false"/>
      <style:text-properties officeooo:rsid="002e0706" officeooo:paragraph-rsid="003279ba"/>
    </style:style>
    <style:style style:name="P99" style:family="paragraph" style:parent-style-name="Standard">
      <style:paragraph-properties fo:text-align="center" style:justify-single-word="false"/>
      <style:text-properties officeooo:rsid="002e0706" officeooo:paragraph-rsid="003279ba"/>
    </style:style>
    <style:style style:name="P100" style:family="paragraph" style:parent-style-name="Standard">
      <style:paragraph-properties fo:text-align="justify" style:justify-single-word="false"/>
      <style:text-properties fo:color="#d4d4d4" loext:opacity="100%" style:font-name="Consolas" fo:font-size="10.5pt" fo:font-weight="normal" officeooo:rsid="001ced39" officeooo:paragraph-rsid="001ced39" fo:background-color="#1e1e1e"/>
    </style:style>
    <style:style style:name="P101" style:family="paragraph" style:parent-style-name="Standard">
      <style:paragraph-properties fo:text-align="justify" style:justify-single-word="false"/>
      <style:text-properties officeooo:rsid="001ced39" officeooo:paragraph-rsid="001ced39"/>
    </style:style>
    <style:style style:name="P10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3279ba" officeooo:paragraph-rsid="003279ba"/>
    </style:style>
    <style:style style:name="P10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279ba" officeooo:paragraph-rsid="003279ba"/>
    </style:style>
    <style:style style:name="P10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279ba" officeooo:paragraph-rsid="003427a6"/>
    </style:style>
    <style:style style:name="P105" style:family="paragraph" style:parent-style-name="Standard">
      <style:paragraph-properties fo:text-align="justify" style:justify-single-word="false"/>
      <style:text-properties officeooo:rsid="003279ba" officeooo:paragraph-rsid="003279ba"/>
    </style:style>
    <style:style style:name="P106"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3279ba" officeooo:paragraph-rsid="003279ba"/>
    </style:style>
    <style:style style:name="P107" style:family="paragraph" style:parent-style-name="Standard">
      <loext:graphic-properties draw:fill="none"/>
      <style:paragraph-properties fo:margin-left="0cm" fo:margin-right="0cm" fo:text-indent="1cm" style:auto-text-indent="false" fo:background-color="transparent"/>
      <style:text-properties officeooo:rsid="003279ba" officeooo:paragraph-rsid="003279ba"/>
    </style:style>
    <style:style style:name="P108" style:family="paragraph" style:parent-style-name="Standard">
      <style:text-properties officeooo:rsid="003279ba" officeooo:paragraph-rsid="003279ba"/>
    </style:style>
    <style:style style:name="P109" style:family="paragraph" style:parent-style-name="Standard">
      <style:text-properties officeooo:rsid="001730aa" officeooo:paragraph-rsid="001730aa"/>
    </style:style>
    <style:style style:name="P110" style:family="paragraph" style:parent-style-name="Standard">
      <style:text-properties officeooo:rsid="0015225d" officeooo:paragraph-rsid="0015225d"/>
    </style:style>
    <style:style style:name="P111" style:family="paragraph" style:parent-style-name="Standard">
      <style:text-properties fo:color="#d4d4d4" loext:opacity="100%" style:font-name="Consolas" fo:font-size="10.5pt" fo:font-weight="normal" officeooo:paragraph-rsid="0015225d" fo:background-color="#1e1e1e"/>
    </style:style>
    <style:style style:name="P112" style:family="paragraph" style:parent-style-name="Standard">
      <loext:graphic-properties draw:fill="none"/>
      <style:paragraph-properties fo:margin-left="0cm" fo:margin-right="0cm" fo:text-indent="1cm" style:auto-text-indent="false" fo:background-color="transparent"/>
      <style:text-properties officeooo:rsid="003427a6" officeooo:paragraph-rsid="003427a6"/>
    </style:style>
    <style:style style:name="P113" style:family="paragraph" style:parent-style-name="Standard">
      <loext:graphic-properties draw:fill="none"/>
      <style:paragraph-properties fo:margin-left="0cm" fo:margin-right="0cm" fo:text-indent="1cm" style:auto-text-indent="false" fo:background-color="transparent"/>
      <style:text-properties officeooo:rsid="0036af5f" officeooo:paragraph-rsid="0036af5f"/>
    </style:style>
    <style:style style:name="P114" style:family="paragraph" style:parent-style-name="Standard">
      <loext:graphic-properties draw:fill="none"/>
      <style:paragraph-properties fo:margin-left="0cm" fo:margin-right="0cm" fo:text-indent="1cm" style:auto-text-indent="false" fo:background-color="transparent"/>
      <style:text-properties officeooo:rsid="00399a99" officeooo:paragraph-rsid="0036af5f"/>
    </style:style>
    <style:style style:name="P115" style:family="paragraph" style:parent-style-name="Standard">
      <loext:graphic-properties draw:fill="none"/>
      <style:paragraph-properties fo:margin-left="0cm" fo:margin-right="0cm" fo:text-indent="1cm" style:auto-text-indent="false" fo:background-color="transparent"/>
      <style:text-properties officeooo:rsid="00399a99" officeooo:paragraph-rsid="00399a99"/>
    </style:style>
    <style:style style:name="P116" style:family="paragraph" style:parent-style-name="Standard">
      <loext:graphic-properties draw:fill="none"/>
      <style:paragraph-properties fo:margin-left="0cm" fo:margin-right="0cm" fo:text-indent="1cm" style:auto-text-indent="false" fo:background-color="transparent"/>
      <style:text-properties officeooo:rsid="003aeba0" officeooo:paragraph-rsid="003aeba0"/>
    </style:style>
    <style:style style:name="P11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c343e" officeooo:paragraph-rsid="003c343e"/>
    </style:style>
    <style:style style:name="P118" style:family="paragraph" style:parent-style-name="Standard">
      <loext:graphic-properties draw:fill="none"/>
      <style:paragraph-properties fo:margin-left="0cm" fo:margin-right="0cm" fo:text-indent="1cm" style:auto-text-indent="false" fo:background-color="transparent"/>
      <style:text-properties officeooo:rsid="003e758c" officeooo:paragraph-rsid="003e758c"/>
    </style:style>
    <style:style style:name="P119" style:family="paragraph" style:parent-style-name="Standard">
      <loext:graphic-properties draw:fill="none"/>
      <style:paragraph-properties fo:margin-left="0cm" fo:margin-right="0cm" fo:text-indent="1cm" style:auto-text-indent="false" fo:background-color="transparent"/>
      <style:text-properties officeooo:rsid="003c343e" officeooo:paragraph-rsid="003c343e"/>
    </style:style>
    <style:style style:name="P120" style:family="paragraph" style:parent-style-name="Standard">
      <loext:graphic-properties draw:fill="none"/>
      <style:paragraph-properties fo:margin-left="0cm" fo:margin-right="0cm" fo:text-indent="1cm" style:auto-text-indent="false" fo:background-color="transparent"/>
      <style:text-properties fo:color="#2a6099" loext:opacity="100%" officeooo:rsid="003cc2ef" officeooo:paragraph-rsid="003cc2ef"/>
    </style:style>
    <style:style style:name="P121" style:family="paragraph" style:parent-style-name="Standard">
      <loext:graphic-properties draw:fill="none"/>
      <style:paragraph-properties fo:margin-left="0cm" fo:margin-right="0cm" fo:text-indent="1cm" style:auto-text-indent="false" fo:background-color="transparent"/>
      <style:text-properties officeooo:rsid="003cc2ef" officeooo:paragraph-rsid="003cc2ef"/>
    </style:style>
    <style:style style:name="P122"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3cc2ef" officeooo:paragraph-rsid="003cc2ef"/>
    </style:style>
    <style:style style:name="P12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c343e" officeooo:paragraph-rsid="003e758c"/>
    </style:style>
    <style:style style:name="P124" style:family="paragraph" style:parent-style-name="Standard">
      <loext:graphic-properties draw:fill="none"/>
      <style:paragraph-properties fo:margin-left="0cm" fo:margin-right="0cm" fo:text-indent="1cm" style:auto-text-indent="false" fo:background-color="transparent"/>
      <style:text-properties officeooo:rsid="003c343e" officeooo:paragraph-rsid="003e758c"/>
    </style:style>
    <style:style style:name="P125" style:family="paragraph" style:parent-style-name="Standard">
      <loext:graphic-properties draw:fill="none"/>
      <style:paragraph-properties fo:margin-left="0cm" fo:margin-right="0cm" fo:text-indent="1cm" style:auto-text-indent="false" fo:background-color="transparent"/>
      <style:text-properties officeooo:rsid="004055af" officeooo:paragraph-rsid="004055af"/>
    </style:style>
    <style:style style:name="P12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055af" officeooo:paragraph-rsid="004055af"/>
    </style:style>
    <style:style style:name="P12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e758c" officeooo:paragraph-rsid="004055af"/>
    </style:style>
    <style:style style:name="P12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c343e" officeooo:paragraph-rsid="004055af"/>
    </style:style>
    <style:style style:name="P12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c343e" officeooo:paragraph-rsid="00a32980"/>
    </style:style>
    <style:style style:name="P130" style:family="paragraph" style:parent-style-name="Standard">
      <style:text-properties officeooo:rsid="004055af" officeooo:paragraph-rsid="004055af"/>
    </style:style>
    <style:style style:name="P131" style:family="paragraph" style:parent-style-name="Standard">
      <style:text-properties fo:color="#d4d4d4" loext:opacity="100%" style:font-name="Consolas" fo:font-size="10.5pt" fo:font-weight="normal" officeooo:rsid="004055af" officeooo:paragraph-rsid="004055af" fo:background-color="#1e1e1e"/>
    </style:style>
    <style:style style:name="P13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418d1a" officeooo:paragraph-rsid="003cc2ef"/>
    </style:style>
    <style:style style:name="P1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18d1a" officeooo:paragraph-rsid="003cc2ef"/>
    </style:style>
    <style:style style:name="P13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18d1a" officeooo:paragraph-rsid="00418d1a"/>
    </style:style>
    <style:style style:name="P135" style:family="paragraph" style:parent-style-name="Standard">
      <loext:graphic-properties draw:fill="none"/>
      <style:paragraph-properties fo:margin-left="0cm" fo:margin-right="0cm" fo:text-indent="1cm" style:auto-text-indent="false" fo:background-color="transparent"/>
      <style:text-properties officeooo:rsid="00418d1a" officeooo:paragraph-rsid="00418d1a"/>
    </style:style>
    <style:style style:name="P136" style:family="paragraph" style:parent-style-name="Standard">
      <style:text-properties fo:color="#d4d4d4" loext:opacity="100%" style:font-name="Consolas" fo:font-size="10.5pt" fo:font-weight="normal" officeooo:rsid="00418d1a" officeooo:paragraph-rsid="00418d1a" fo:background-color="#1e1e1e"/>
    </style:style>
    <style:style style:name="P137" style:family="paragraph" style:parent-style-name="Standard">
      <style:text-properties officeooo:rsid="00418d1a" officeooo:paragraph-rsid="00418d1a"/>
    </style:style>
    <style:style style:name="P138"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20a1f" officeooo:paragraph-rsid="00420a1f"/>
    </style:style>
    <style:style style:name="P139" style:family="paragraph" style:parent-style-name="Standard">
      <loext:graphic-properties draw:fill="none"/>
      <style:paragraph-properties fo:margin-left="0cm" fo:margin-right="0cm" fo:text-indent="1cm" style:auto-text-indent="false" fo:background-color="transparent"/>
      <style:text-properties officeooo:rsid="00420a1f" officeooo:paragraph-rsid="00420a1f"/>
    </style:style>
    <style:style style:name="P140" style:family="paragraph" style:parent-style-name="Standard">
      <style:text-properties officeooo:rsid="00420a1f" officeooo:paragraph-rsid="00420a1f"/>
    </style:style>
    <style:style style:name="P141" style:family="paragraph" style:parent-style-name="Standard">
      <style:text-properties fo:color="#d4d4d4" loext:opacity="100%" style:font-name="Consolas" fo:font-size="10.5pt" fo:font-weight="normal" officeooo:rsid="00420a1f" officeooo:paragraph-rsid="00420a1f" fo:background-color="#1e1e1e"/>
    </style:style>
    <style:style style:name="P14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420a1f" officeooo:paragraph-rsid="00420a1f"/>
    </style:style>
    <style:style style:name="P14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20a1f" officeooo:paragraph-rsid="00420a1f"/>
    </style:style>
    <style:style style:name="P144" style:family="paragraph" style:parent-style-name="Standard">
      <style:text-properties officeooo:rsid="004248d7" officeooo:paragraph-rsid="00420a1f"/>
    </style:style>
    <style:style style:name="P145"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248d7" officeooo:paragraph-rsid="004248d7"/>
    </style:style>
    <style:style style:name="P146" style:family="paragraph" style:parent-style-name="Standard">
      <loext:graphic-properties draw:fill="none"/>
      <style:paragraph-properties fo:margin-left="0cm" fo:margin-right="0cm" fo:text-indent="1cm" style:auto-text-indent="false" fo:background-color="transparent"/>
      <style:text-properties officeooo:rsid="004248d7" officeooo:paragraph-rsid="004248d7"/>
    </style:style>
    <style:style style:name="P147" style:family="paragraph" style:parent-style-name="Standard">
      <style:text-properties officeooo:rsid="004248d7" officeooo:paragraph-rsid="004248d7"/>
    </style:style>
    <style:style style:name="P148" style:family="paragraph" style:parent-style-name="Standard">
      <style:text-properties fo:color="#d4d4d4" loext:opacity="100%" style:font-name="Consolas" fo:font-size="10.5pt" fo:font-weight="normal" officeooo:rsid="004248d7" officeooo:paragraph-rsid="004248d7" fo:background-color="#1e1e1e"/>
    </style:style>
    <style:style style:name="P149"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5b8e8" officeooo:paragraph-rsid="004248d7"/>
    </style:style>
    <style:style style:name="P150" style:family="paragraph" style:parent-style-name="Standard">
      <loext:graphic-properties draw:fill="none"/>
      <style:paragraph-properties fo:margin-left="0cm" fo:margin-right="0cm" fo:text-indent="1cm" style:auto-text-indent="false" fo:background-color="transparent"/>
      <style:text-properties officeooo:rsid="0045b8e8" officeooo:paragraph-rsid="004248d7"/>
    </style:style>
    <style:style style:name="P151" style:family="paragraph" style:parent-style-name="Standard">
      <style:text-properties officeooo:rsid="0045b8e8" officeooo:paragraph-rsid="0045b8e8"/>
    </style:style>
    <style:style style:name="P152"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5b8e8" officeooo:paragraph-rsid="0045b8e8"/>
    </style:style>
    <style:style style:name="P153" style:family="paragraph" style:parent-style-name="Standard">
      <style:paragraph-properties fo:text-align="center" style:justify-single-word="false"/>
      <style:text-properties officeooo:rsid="00a5127e" officeooo:paragraph-rsid="00a5127e"/>
    </style:style>
    <style:style style:name="P154"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a5127e" officeooo:paragraph-rsid="00a5127e"/>
    </style:style>
    <style:style style:name="P15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a5127e" officeooo:paragraph-rsid="00a5127e"/>
    </style:style>
    <style:style style:name="P156" style:family="paragraph" style:parent-style-name="Standard">
      <style:text-properties fo:color="#d4d4d4" loext:opacity="100%" style:font-name="Consolas" fo:font-size="10.5pt" fo:font-weight="normal" officeooo:paragraph-rsid="00420a1f" fo:background-color="#1e1e1e"/>
    </style:style>
    <style:style style:name="P157" style:family="paragraph" style:parent-style-name="Standard">
      <style:text-properties fo:color="#d4d4d4" loext:opacity="100%" style:font-name="Consolas" fo:font-size="10.5pt" fo:font-weight="normal" officeooo:rsid="0045b8e8" officeooo:paragraph-rsid="0045b8e8" fo:background-color="#1e1e1e"/>
    </style:style>
    <style:style style:name="P158" style:family="paragraph" style:parent-style-name="Standard">
      <style:paragraph-properties fo:margin-top="0cm" fo:margin-bottom="0.499cm" style:contextual-spacing="false"/>
      <style:text-properties officeooo:rsid="0045b8e8" officeooo:paragraph-rsid="0045b8e8"/>
    </style:style>
    <style:style style:name="P159"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officeooo:paragraph-rsid="00a5127e"/>
    </style:style>
    <style:style style:name="P160"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paragraph-rsid="00a5127e"/>
    </style:style>
    <style:style style:name="P161" style:family="paragraph" style:parent-style-name="Standard">
      <style:paragraph-properties fo:text-align="justify" style:justify-single-word="false"/>
      <style:text-properties officeooo:rsid="0045b8e8" officeooo:paragraph-rsid="0045b8e8"/>
    </style:style>
    <style:style style:name="P162" style:family="paragraph" style:parent-style-name="Standard">
      <style:paragraph-properties fo:text-align="justify" style:justify-single-word="false"/>
      <style:text-properties fo:color="#d4d4d4" loext:opacity="100%" style:font-name="Consolas" fo:font-size="10.5pt" fo:font-weight="normal" officeooo:rsid="0045b8e8" officeooo:paragraph-rsid="0045b8e8" fo:background-color="#1e1e1e"/>
    </style:style>
    <style:style style:name="P163"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6e4cd" officeooo:paragraph-rsid="0046e4cd"/>
    </style:style>
    <style:style style:name="P164" style:family="paragraph" style:parent-style-name="Standard">
      <loext:graphic-properties draw:fill="none"/>
      <style:paragraph-properties fo:margin-left="0cm" fo:margin-right="0cm" fo:text-indent="1cm" style:auto-text-indent="false" fo:background-color="transparent"/>
      <style:text-properties officeooo:rsid="0046e4cd" officeooo:paragraph-rsid="0046e4cd"/>
    </style:style>
    <style:style style:name="P165" style:family="paragraph" style:parent-style-name="Standard">
      <loext:graphic-properties draw:fill="none"/>
      <style:paragraph-properties fo:margin-left="0cm" fo:margin-right="0cm" fo:text-indent="1cm" style:auto-text-indent="false" fo:background-color="transparent"/>
      <style:text-properties officeooo:rsid="0048c7f7" officeooo:paragraph-rsid="0048c7f7"/>
    </style:style>
    <style:style style:name="P166" style:family="paragraph" style:parent-style-name="Standard">
      <style:text-properties officeooo:rsid="0048c7f7" officeooo:paragraph-rsid="0048c7f7"/>
    </style:style>
    <style:style style:name="P167" style:family="paragraph" style:parent-style-name="Standard">
      <style:text-properties officeooo:rsid="0046e4cd" officeooo:paragraph-rsid="0046e4cd"/>
    </style:style>
    <style:style style:name="P168" style:family="paragraph" style:parent-style-name="Standard">
      <style:text-properties fo:color="#d4d4d4" loext:opacity="100%" style:font-name="Consolas" fo:font-size="10.5pt" fo:font-weight="normal" officeooo:rsid="0046e4cd" officeooo:paragraph-rsid="0046e4cd" fo:background-color="#1e1e1e"/>
    </style:style>
    <style:style style:name="P169"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8c7f7" officeooo:paragraph-rsid="0048c7f7"/>
    </style:style>
    <style:style style:name="P170" style:family="paragraph" style:parent-style-name="Standard">
      <style:text-properties fo:color="#d4d4d4" loext:opacity="100%" style:font-name="Consolas" fo:font-size="10.5pt" fo:font-weight="normal" officeooo:rsid="0048c7f7" officeooo:paragraph-rsid="0048c7f7" fo:background-color="#1e1e1e"/>
    </style:style>
    <style:style style:name="P171" style:family="paragraph" style:parent-style-name="Standard">
      <loext:graphic-properties draw:fill="none"/>
      <style:paragraph-properties fo:margin-left="0cm" fo:margin-right="0cm" fo:text-indent="1cm" style:auto-text-indent="false" fo:background-color="transparent"/>
      <style:text-properties officeooo:rsid="0048e889" officeooo:paragraph-rsid="0048e889"/>
    </style:style>
    <style:style style:name="P172" style:family="paragraph" style:parent-style-name="Standard">
      <style:text-properties officeooo:rsid="0048e889" officeooo:paragraph-rsid="0048e889"/>
    </style:style>
    <style:style style:name="P173" style:family="paragraph" style:parent-style-name="Standard">
      <style:text-properties fo:color="#d4d4d4" loext:opacity="100%" style:font-name="Consolas" fo:font-size="10.5pt" fo:font-weight="normal" officeooo:rsid="0048e889" officeooo:paragraph-rsid="0048e889" fo:background-color="#1e1e1e"/>
    </style:style>
    <style:style style:name="P174"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8e889" officeooo:paragraph-rsid="0048e889"/>
    </style:style>
    <style:style style:name="P175" style:family="paragraph" style:parent-style-name="Standard">
      <style:text-properties officeooo:rsid="0036af5f" officeooo:paragraph-rsid="0036af5f"/>
    </style:style>
    <style:style style:name="P176" style:family="paragraph" style:parent-style-name="Standard">
      <style:text-properties fo:color="#d4d4d4" loext:opacity="100%" style:font-name="Consolas" fo:font-size="10.5pt" fo:font-weight="normal" officeooo:rsid="0036af5f" officeooo:paragraph-rsid="0036af5f" fo:background-color="#1e1e1e"/>
    </style:style>
    <style:style style:name="P177" style:family="paragraph" style:parent-style-name="Standard">
      <loext:graphic-properties draw:fill="none"/>
      <style:paragraph-properties fo:margin-left="0cm" fo:margin-right="0cm" fo:text-indent="1cm" style:auto-text-indent="false" fo:background-color="transparent"/>
      <style:text-properties officeooo:rsid="0049ddd9" officeooo:paragraph-rsid="0049ddd9"/>
    </style:style>
    <style:style style:name="P178" style:family="paragraph" style:parent-style-name="Standard">
      <style:text-properties officeooo:rsid="0049ddd9" officeooo:paragraph-rsid="0049ddd9"/>
    </style:style>
    <style:style style:name="P179" style:family="paragraph" style:parent-style-name="Standard">
      <style:text-properties fo:color="#d4d4d4" loext:opacity="100%" officeooo:paragraph-rsid="0049ddd9" fo:background-color="#1e1e1e"/>
    </style:style>
    <style:style style:name="P180"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9ddd9" officeooo:paragraph-rsid="0049ddd9"/>
    </style:style>
    <style:style style:name="P181" style:family="paragraph" style:parent-style-name="Standard">
      <style:text-properties fo:color="#d4d4d4" loext:opacity="100%" style:font-name="Consolas" fo:font-size="10.5pt" fo:font-weight="normal" officeooo:rsid="0049ddd9" officeooo:paragraph-rsid="0049ddd9" fo:background-color="#1e1e1e"/>
    </style:style>
    <style:style style:name="P182" style:family="paragraph" style:parent-style-name="Standard">
      <style:text-properties fo:color="#dcdcaa" loext:opacity="100%" style:font-name="Consolas" fo:font-size="10.5pt" fo:font-weight="normal" officeooo:rsid="0049ddd9" officeooo:paragraph-rsid="00a67184" fo:background-color="#1e1e1e"/>
    </style:style>
    <style:style style:name="P183" style:family="paragraph" style:parent-style-name="Standard">
      <style:paragraph-properties fo:text-align="center" style:justify-single-word="false"/>
      <style:text-properties fo:color="#dcdcaa" loext:opacity="100%" style:font-name="Consolas" fo:font-size="10.5pt" fo:font-weight="normal" officeooo:rsid="00a6f410" officeooo:paragraph-rsid="00a6f410" fo:background-color="#1e1e1e"/>
    </style:style>
    <style:style style:name="P184"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9ddd9" officeooo:paragraph-rsid="00a6f410"/>
    </style:style>
    <style:style style:name="P185" style:family="paragraph" style:parent-style-name="Standard">
      <loext:graphic-properties draw:fill="none"/>
      <style:paragraph-properties fo:margin-left="0cm" fo:margin-right="0cm" fo:text-indent="1cm" style:auto-text-indent="false" fo:background-color="transparent"/>
      <style:text-properties officeooo:rsid="0049ddd9" officeooo:paragraph-rsid="00a6f410"/>
    </style:style>
    <style:style style:name="P186" style:family="paragraph" style:parent-style-name="Standard">
      <style:text-properties officeooo:rsid="00a67184" officeooo:paragraph-rsid="0049ddd9"/>
    </style:style>
    <style:style style:name="P187" style:family="paragraph" style:parent-style-name="Standard">
      <style:text-properties fo:color="#d4d4d4" loext:opacity="100%" style:font-name="Consolas" fo:font-size="10.5pt" fo:font-weight="normal" officeooo:paragraph-rsid="0049ddd9" fo:background-color="#1e1e1e"/>
    </style:style>
    <style:style style:name="P188"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aadb5" officeooo:paragraph-rsid="004aadb5"/>
    </style:style>
    <style:style style:name="P189" style:family="paragraph" style:parent-style-name="Standard">
      <style:text-properties officeooo:rsid="004aadb5" officeooo:paragraph-rsid="004aadb5"/>
    </style:style>
    <style:style style:name="P190" style:family="paragraph" style:parent-style-name="Standard">
      <style:text-properties fo:color="#d4d4d4" loext:opacity="100%" style:font-name="Consolas" fo:font-size="10.5pt" fo:font-weight="normal" officeooo:rsid="004aadb5" officeooo:paragraph-rsid="004aadb5" fo:background-color="#1e1e1e"/>
    </style:style>
    <style:style style:name="P191" style:family="paragraph" style:parent-style-name="Standard">
      <loext:graphic-properties draw:fill="none"/>
      <style:paragraph-properties fo:margin-left="0cm" fo:margin-right="0cm" fo:text-indent="1cm" style:auto-text-indent="false" fo:background-color="transparent"/>
      <style:text-properties officeooo:rsid="004aadb5" officeooo:paragraph-rsid="004aadb5"/>
    </style:style>
    <style:style style:name="P192"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c6478" officeooo:paragraph-rsid="004c6478"/>
    </style:style>
    <style:style style:name="P193" style:family="paragraph" style:parent-style-name="Standard">
      <loext:graphic-properties draw:fill="none"/>
      <style:paragraph-properties fo:margin-left="0cm" fo:margin-right="0cm" fo:text-indent="1cm" style:auto-text-indent="false" fo:background-color="transparent"/>
      <style:text-properties officeooo:rsid="004c6478" officeooo:paragraph-rsid="004c6478"/>
    </style:style>
    <style:style style:name="P194" style:family="paragraph" style:parent-style-name="Standard">
      <style:text-properties officeooo:rsid="004c6478" officeooo:paragraph-rsid="004c6478"/>
    </style:style>
    <style:style style:name="P195" style:family="paragraph" style:parent-style-name="Standard">
      <style:text-properties fo:color="#d4d4d4" loext:opacity="100%" style:font-name="Consolas" fo:font-size="10.5pt" fo:font-weight="normal" officeooo:rsid="004c6478" officeooo:paragraph-rsid="004c6478" fo:background-color="#1e1e1e"/>
    </style:style>
    <style:style style:name="P196"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dfda8" officeooo:paragraph-rsid="004dfda8"/>
    </style:style>
    <style:style style:name="P197" style:family="paragraph" style:parent-style-name="Standard">
      <loext:graphic-properties draw:fill="none"/>
      <style:paragraph-properties fo:margin-left="0cm" fo:margin-right="0cm" fo:text-indent="1cm" style:auto-text-indent="false" fo:background-color="transparent"/>
      <style:text-properties officeooo:rsid="004dfda8" officeooo:paragraph-rsid="004dfda8"/>
    </style:style>
    <style:style style:name="P198" style:family="paragraph" style:parent-style-name="Standard">
      <style:text-properties officeooo:rsid="004dfda8" officeooo:paragraph-rsid="004dfda8"/>
    </style:style>
    <style:style style:name="P199" style:family="paragraph" style:parent-style-name="Standard">
      <style:text-properties fo:color="#d4d4d4" loext:opacity="100%" style:font-name="Consolas" fo:font-size="10.5pt" fo:font-weight="normal" officeooo:rsid="004dfda8" officeooo:paragraph-rsid="004dfda8" fo:background-color="#1e1e1e"/>
    </style:style>
    <style:style style:name="P200" style:family="paragraph" style:parent-style-name="Standard">
      <style:text-properties fo:color="#d4d4d4" loext:opacity="100%" style:font-name="Consolas" fo:font-size="10.5pt" fo:font-weight="normal" officeooo:paragraph-rsid="004dfda8" fo:background-color="#1e1e1e"/>
    </style:style>
    <style:style style:name="P201" style:family="paragraph" style:parent-style-name="Standard">
      <style:text-properties officeooo:rsid="004ea200" officeooo:paragraph-rsid="004dfda8"/>
    </style:style>
    <style:style style:name="P202"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a74d20" officeooo:paragraph-rsid="00a74d20"/>
    </style:style>
    <style:style style:name="P203" style:family="paragraph" style:parent-style-name="Standard">
      <loext:graphic-properties draw:fill="none"/>
      <style:paragraph-properties fo:margin-left="0cm" fo:margin-right="0cm" fo:text-indent="1cm" style:auto-text-indent="false" fo:background-color="transparent"/>
      <style:text-properties officeooo:rsid="00a74d20" officeooo:paragraph-rsid="00a74d20"/>
    </style:style>
    <style:style style:name="P204" style:family="paragraph" style:parent-style-name="Standard">
      <style:text-properties officeooo:rsid="004ea200" officeooo:paragraph-rsid="004ea200"/>
    </style:style>
    <style:style style:name="P205" style:family="paragraph" style:parent-style-name="Standard">
      <style:text-properties fo:color="#d4d4d4" loext:opacity="100%" style:font-name="Consolas" fo:font-size="10.5pt" fo:font-weight="normal" officeooo:rsid="004ea200" officeooo:paragraph-rsid="004ea200" fo:background-color="#1e1e1e"/>
    </style:style>
    <style:style style:name="P206"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ea200" officeooo:paragraph-rsid="004ea200"/>
    </style:style>
    <style:style style:name="P207" style:family="paragraph" style:parent-style-name="Standard">
      <loext:graphic-properties draw:fill="none"/>
      <style:paragraph-properties fo:margin-left="0cm" fo:margin-right="0cm" fo:text-indent="1cm" style:auto-text-indent="false" fo:background-color="transparent"/>
      <style:text-properties officeooo:rsid="004ea200" officeooo:paragraph-rsid="004ea200"/>
    </style:style>
    <style:style style:name="P208"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4ff638" officeooo:paragraph-rsid="004ff638"/>
    </style:style>
    <style:style style:name="P209" style:family="paragraph" style:parent-style-name="Standard">
      <loext:graphic-properties draw:fill="none"/>
      <style:paragraph-properties fo:margin-left="0cm" fo:margin-right="0cm" fo:text-indent="1cm" style:auto-text-indent="false" fo:background-color="transparent"/>
      <style:text-properties officeooo:rsid="004ff638" officeooo:paragraph-rsid="004ff638"/>
    </style:style>
    <style:style style:name="P210" style:family="paragraph" style:parent-style-name="Standard">
      <style:text-properties officeooo:rsid="004ff638" officeooo:paragraph-rsid="004ff638"/>
    </style:style>
    <style:style style:name="P211" style:family="paragraph" style:parent-style-name="Standard">
      <style:text-properties fo:color="#d4d4d4" loext:opacity="100%" style:font-name="Consolas" fo:font-size="10.5pt" fo:font-weight="normal" officeooo:rsid="004ff638" officeooo:paragraph-rsid="004ff638" fo:background-color="#1e1e1e"/>
    </style:style>
    <style:style style:name="P212" style:family="paragraph" style:parent-style-name="Standard">
      <style:text-properties fo:color="#d4d4d4" loext:opacity="100%" style:font-name="Consolas" fo:font-size="10.5pt" fo:font-weight="normal" officeooo:rsid="004dfda8" officeooo:paragraph-rsid="0050c293" fo:background-color="#1e1e1e"/>
    </style:style>
    <style:style style:name="P213"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50c293" officeooo:paragraph-rsid="0050c293"/>
    </style:style>
    <style:style style:name="P214" style:family="paragraph" style:parent-style-name="Standard">
      <loext:graphic-properties draw:fill="none"/>
      <style:paragraph-properties fo:margin-left="0cm" fo:margin-right="0cm" fo:text-indent="1cm" style:auto-text-indent="false" fo:background-color="transparent"/>
      <style:text-properties officeooo:rsid="0050c293" officeooo:paragraph-rsid="0050c293"/>
    </style:style>
    <style:style style:name="P215" style:family="paragraph" style:parent-style-name="Standard">
      <style:text-properties officeooo:rsid="0050c293" officeooo:paragraph-rsid="0050c293"/>
    </style:style>
    <style:style style:name="P216" style:family="paragraph" style:parent-style-name="Standard">
      <style:text-properties fo:color="#d4d4d4" loext:opacity="100%" style:font-name="Consolas" fo:font-size="10.5pt" fo:font-weight="normal" officeooo:rsid="0050c293" officeooo:paragraph-rsid="0050c293" fo:background-color="#1e1e1e"/>
    </style:style>
    <style:style style:name="P217" style:family="paragraph" style:parent-style-name="Standard">
      <style:text-properties officeooo:rsid="00521b4e" officeooo:paragraph-rsid="0050c293"/>
    </style:style>
    <style:style style:name="P218"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521b4e" officeooo:paragraph-rsid="00521b4e"/>
    </style:style>
    <style:style style:name="P219" style:family="paragraph" style:parent-style-name="Standard">
      <loext:graphic-properties draw:fill="none"/>
      <style:paragraph-properties fo:margin-left="0cm" fo:margin-right="0cm" fo:text-indent="1cm" style:auto-text-indent="false" fo:background-color="transparent"/>
      <style:text-properties officeooo:rsid="00521b4e" officeooo:paragraph-rsid="00521b4e"/>
    </style:style>
    <style:style style:name="P220" style:family="paragraph" style:parent-style-name="Standard">
      <style:text-properties officeooo:rsid="00521b4e" officeooo:paragraph-rsid="00521b4e"/>
    </style:style>
    <style:style style:name="P221" style:family="paragraph" style:parent-style-name="Standard">
      <style:text-properties fo:color="#d4d4d4" loext:opacity="100%" style:font-name="Consolas" fo:font-size="10.5pt" fo:font-weight="normal" officeooo:rsid="00521b4e" officeooo:paragraph-rsid="00521b4e" fo:background-color="#1e1e1e"/>
    </style:style>
    <style:style style:name="P222" style:family="paragraph" style:parent-style-name="Standard">
      <style:text-properties officeooo:rsid="0053ade5" officeooo:paragraph-rsid="0053ade5"/>
    </style:style>
    <style:style style:name="P223"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53ade5" officeooo:paragraph-rsid="005573f4"/>
    </style:style>
    <style:style style:name="P224" style:family="paragraph" style:parent-style-name="Standard">
      <loext:graphic-properties draw:fill="none"/>
      <style:paragraph-properties fo:margin-left="0cm" fo:margin-right="0cm" fo:text-indent="1cm" style:auto-text-indent="false" fo:background-color="transparent"/>
      <style:text-properties officeooo:rsid="0053ade5" officeooo:paragraph-rsid="005573f4"/>
    </style:style>
    <style:style style:name="P225" style:family="paragraph" style:parent-style-name="Standard">
      <loext:graphic-properties draw:fill="none"/>
      <style:paragraph-properties fo:margin-left="0cm" fo:margin-right="0cm" fo:text-indent="1cm" style:auto-text-indent="false" fo:background-color="transparent"/>
      <style:text-properties officeooo:rsid="0053ade5" officeooo:paragraph-rsid="0053ade5"/>
    </style:style>
    <style:style style:name="P226" style:family="paragraph" style:parent-style-name="Standard">
      <style:text-properties officeooo:rsid="005573f4" officeooo:paragraph-rsid="005573f4"/>
    </style:style>
    <style:style style:name="P227" style:family="paragraph" style:parent-style-name="Standard">
      <style:text-properties fo:color="#d4d4d4" loext:opacity="100%" style:font-name="Consolas" fo:font-size="10.5pt" fo:font-weight="normal" officeooo:rsid="005573f4" officeooo:paragraph-rsid="005573f4" fo:background-color="#1e1e1e"/>
    </style:style>
    <style:style style:name="P228"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5573f4" officeooo:paragraph-rsid="005573f4"/>
    </style:style>
    <style:style style:name="P229" style:family="paragraph" style:parent-style-name="Standard">
      <loext:graphic-properties draw:fill="none"/>
      <style:paragraph-properties fo:margin-left="0cm" fo:margin-right="0cm" fo:text-indent="1cm" style:auto-text-indent="false" fo:background-color="transparent"/>
      <style:text-properties officeooo:rsid="005573f4" officeooo:paragraph-rsid="005573f4"/>
    </style:style>
    <style:style style:name="P230"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572eb8" officeooo:paragraph-rsid="00572eb8"/>
    </style:style>
    <style:style style:name="P231" style:family="paragraph" style:parent-style-name="Standard">
      <loext:graphic-properties draw:fill="none"/>
      <style:paragraph-properties fo:margin-left="0cm" fo:margin-right="0cm" fo:text-indent="1cm" style:auto-text-indent="false" fo:background-color="transparent"/>
      <style:text-properties officeooo:rsid="00572eb8" officeooo:paragraph-rsid="00572eb8"/>
    </style:style>
    <style:style style:name="P232" style:family="paragraph" style:parent-style-name="Standard">
      <style:text-properties fo:color="#6a9955" loext:opacity="100%" style:font-name="Consolas" fo:font-size="10.5pt" fo:font-weight="normal" officeooo:rsid="00572eb8" officeooo:paragraph-rsid="00572eb8" fo:background-color="#1e1e1e"/>
    </style:style>
    <style:style style:name="P233" style:family="paragraph" style:parent-style-name="Standard">
      <style:text-properties officeooo:rsid="00572eb8" officeooo:paragraph-rsid="00572eb8"/>
    </style:style>
    <style:style style:name="P234" style:family="paragraph" style:parent-style-name="Standard">
      <style:text-properties fo:color="#d4d4d4" loext:opacity="100%" style:font-name="Consolas" fo:font-size="10.5pt" fo:font-weight="normal" officeooo:rsid="00572eb8" officeooo:paragraph-rsid="00572eb8" fo:background-color="#1e1e1e"/>
    </style:style>
    <style:style style:name="P235" style:family="paragraph" style:parent-style-name="Standard">
      <style:text-properties officeooo:rsid="0061cd39" officeooo:paragraph-rsid="0061cd39"/>
    </style:style>
    <style:style style:name="P236" style:family="paragraph" style:parent-style-name="Standard">
      <style:paragraph-properties fo:text-align="center" style:justify-single-word="false"/>
      <style:text-properties officeooo:rsid="00631ea9" officeooo:paragraph-rsid="00631ea9"/>
    </style:style>
    <style:style style:name="P237" style:family="paragraph" style:parent-style-name="Standard" style:master-page-name="">
      <loext:graphic-properties draw:fill="none"/>
      <style:paragraph-properties fo:margin-left="0cm" fo:margin-right="0cm" fo:text-align="justify" style:justify-single-word="false" fo:text-indent="1.101cm" style:auto-text-indent="false" style:page-number="auto" fo:background-color="transparent"/>
      <style:text-properties officeooo:rsid="0061cd39" officeooo:paragraph-rsid="0061cd39"/>
    </style:style>
    <style:style style:name="P238"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61cd39" officeooo:paragraph-rsid="0061cd39"/>
    </style:style>
    <style:style style:name="P239"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631ea9" officeooo:paragraph-rsid="00631ea9"/>
    </style:style>
    <style:style style:name="P240" style:family="paragraph" style:parent-style-name="Standard">
      <loext:graphic-properties draw:fill="none"/>
      <style:paragraph-properties fo:margin-left="0cm" fo:margin-right="0cm" fo:margin-top="0cm" fo:margin-bottom="0.499cm" style:contextual-spacing="false" fo:text-align="justify" style:justify-single-word="false" fo:text-indent="1.101cm" style:auto-text-indent="false" fo:background-color="transparent"/>
      <style:text-properties officeooo:rsid="00631ea9" officeooo:paragraph-rsid="00631ea9"/>
    </style:style>
    <style:style style:name="P241"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806f93" officeooo:paragraph-rsid="00806f93"/>
    </style:style>
    <style:style style:name="P242"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631ea9" officeooo:paragraph-rsid="00806f93"/>
    </style:style>
    <style:style style:name="P243" style:family="paragraph" style:parent-style-name="Standard">
      <style:paragraph-properties fo:text-align="center" style:justify-single-word="false"/>
      <style:text-properties officeooo:rsid="008be6fd" officeooo:paragraph-rsid="008be6fd"/>
    </style:style>
    <style:style style:name="P244" style:family="paragraph" style:parent-style-name="Standard">
      <style:paragraph-properties fo:text-align="justify" style:justify-single-word="false"/>
      <style:text-properties officeooo:rsid="008ea145" officeooo:paragraph-rsid="008be6fd"/>
    </style:style>
    <style:style style:name="P245" style:family="paragraph" style:parent-style-name="Standard">
      <style:paragraph-properties fo:text-align="justify" style:justify-single-word="false"/>
      <style:text-properties officeooo:rsid="008ea145" officeooo:paragraph-rsid="00a8347b"/>
    </style:style>
    <style:style style:name="P246" style:family="paragraph" style:parent-style-name="Standard">
      <style:paragraph-properties fo:text-align="justify" style:justify-single-word="false"/>
      <style:text-properties officeooo:rsid="008be6fd" officeooo:paragraph-rsid="008cd122"/>
    </style:style>
    <style:style style:name="P247" style:family="paragraph" style:parent-style-name="Standard">
      <style:paragraph-properties fo:text-align="center" style:justify-single-word="false"/>
      <style:text-properties officeooo:rsid="008cd122" officeooo:paragraph-rsid="008cd122"/>
    </style:style>
    <style:style style:name="P248" style:family="paragraph" style:parent-style-name="Standard">
      <style:paragraph-properties fo:text-align="left" style:justify-single-word="false"/>
      <style:text-properties officeooo:rsid="008cd122" officeooo:paragraph-rsid="008cd122"/>
    </style:style>
    <style:style style:name="P249" style:family="paragraph" style:parent-style-name="Standard">
      <style:paragraph-properties fo:text-align="left" style:justify-single-word="false"/>
      <style:text-properties officeooo:rsid="008cd122" officeooo:paragraph-rsid="00a8347b"/>
    </style:style>
    <style:style style:name="P250" style:family="paragraph" style:parent-style-name="Standard">
      <style:paragraph-properties fo:text-align="left" style:justify-single-word="false"/>
      <style:text-properties fo:color="#d4d4d4" loext:opacity="100%" style:font-name="Consolas" fo:font-size="10.5pt" fo:font-weight="normal" officeooo:rsid="008be6fd" officeooo:paragraph-rsid="008cd122" fo:background-color="#1e1e1e"/>
    </style:style>
    <style:style style:name="P251" style:family="paragraph" style:parent-style-name="Standard">
      <style:paragraph-properties fo:text-align="left" style:justify-single-word="false"/>
      <style:text-properties officeooo:rsid="008be6fd" officeooo:paragraph-rsid="008be6fd"/>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color="#569cd6" loext:opacity="100%"/>
    </style:style>
    <style:style style:name="T4" style:family="text">
      <style:text-properties fo:color="#4ec9b0" loext:opacity="100%"/>
    </style:style>
    <style:style style:name="T5" style:family="text">
      <style:text-properties fo:color="#569cd6" loext:opacity="100%" style:font-name="Consolas" fo:font-size="10.5pt" fo:font-weight="normal"/>
    </style:style>
    <style:style style:name="T6" style:family="text">
      <style:text-properties style:font-name="Consolas" fo:font-size="10.5pt" fo:font-weight="normal"/>
    </style:style>
    <style:style style:name="T7" style:family="text">
      <style:text-properties fo:color="#9cdcfe" loext:opacity="100%" style:font-name="Consolas" fo:font-size="10.5pt" fo:font-weight="normal"/>
    </style:style>
    <style:style style:name="T8" style:family="text">
      <style:text-properties fo:color="#dcdcaa" loext:opacity="100%" style:font-name="Consolas" fo:font-size="10.5pt" fo:font-weight="normal"/>
    </style:style>
    <style:style style:name="T9" style:family="text">
      <style:text-properties fo:color="#ce9178" loext:opacity="100%" style:font-name="Consolas" fo:font-size="10.5pt" fo:font-weight="normal"/>
    </style:style>
    <style:style style:name="T10" style:family="text">
      <style:text-properties officeooo:rsid="009e181c"/>
    </style:style>
    <style:style style:name="T11" style:family="text">
      <style:text-properties fo:color="#4fc1ff" loext:opacity="100%" style:font-name="Consolas" fo:font-size="10.5pt" fo:font-weight="normal"/>
    </style:style>
    <style:style style:name="T12" style:family="text">
      <style:text-properties fo:color="#c586c0" loext:opacity="100%" style:font-name="Consolas" fo:font-size="10.5pt" fo:font-weight="normal"/>
    </style:style>
    <style:style style:name="T13" style:family="text">
      <style:text-properties fo:color="#b5cea8" loext:opacity="100%" style:font-name="Consolas" fo:font-size="10.5pt" fo:font-weight="normal"/>
    </style:style>
    <style:style style:name="T14" style:family="text">
      <style:text-properties fo:color="#d16969" loext:opacity="100%" style:font-name="Consolas" fo:font-size="10.5pt" fo:font-weight="normal"/>
    </style:style>
    <style:style style:name="T15" style:family="text">
      <style:text-properties fo:color="#d7ba7d" loext:opacity="100%" style:font-name="Consolas" fo:font-size="10.5pt" fo:font-weight="normal"/>
    </style:style>
    <style:style style:name="T16" style:family="text">
      <style:text-properties fo:color="#4ec9b0" loext:opacity="100%" style:font-name="Consolas" fo:font-size="10.5pt" fo:font-weight="normal"/>
    </style:style>
    <style:style style:name="T17" style:family="text">
      <style:text-properties fo:color="#3465a4" loext:opacity="100%"/>
    </style:style>
    <style:style style:name="T18" style:family="text">
      <style:text-properties fo:color="#2a6099" loext:opacity="100%"/>
    </style:style>
    <style:style style:name="T19" style:family="text">
      <style:text-properties officeooo:rsid="009fe0ea"/>
    </style:style>
    <style:style style:name="T20" style:family="text">
      <style:text-properties fo:color="#2a6099" loext:opacity="100%" officeooo:rsid="001e7bba"/>
    </style:style>
    <style:style style:name="T21" style:family="text">
      <style:text-properties fo:color="#3465a4" loext:opacity="100%" officeooo:rsid="007a70bf"/>
    </style:style>
    <style:style style:name="T22" style:family="text">
      <style:text-properties fo:color="#000000" loext:opacity="100%"/>
    </style:style>
    <style:style style:name="T23" style:family="text">
      <style:text-properties fo:color="#00a933" loext:opacity="100%"/>
    </style:style>
    <style:style style:name="T24" style:family="text">
      <style:text-properties officeooo:rsid="007c4028"/>
    </style:style>
    <style:style style:name="T25" style:family="text">
      <style:text-properties style:font-name="Consolas" fo:font-size="10.5pt" fo:font-weight="normal" officeooo:rsid="007c4028"/>
    </style:style>
    <style:style style:name="T26" style:family="text">
      <style:text-properties officeooo:rsid="002d57bb"/>
    </style:style>
    <style:style style:name="T27" style:family="text">
      <style:text-properties officeooo:rsid="006c750c"/>
    </style:style>
    <style:style style:name="T28" style:family="text">
      <style:text-properties officeooo:rsid="00a149e1"/>
    </style:style>
    <style:style style:name="T29" style:family="text">
      <style:text-properties fo:color="#2a6099" loext:opacity="100%" officeooo:rsid="008a5acc"/>
    </style:style>
    <style:style style:name="T30" style:family="text">
      <style:text-properties officeooo:rsid="008a5acc"/>
    </style:style>
    <style:style style:name="T31" style:family="text">
      <style:text-properties officeooo:rsid="006e60ad"/>
    </style:style>
    <style:style style:name="T32" style:family="text">
      <style:text-properties fo:color="#00a933" loext:opacity="100%" officeooo:rsid="002e7533"/>
    </style:style>
    <style:style style:name="T33" style:family="text">
      <style:text-properties officeooo:rsid="002e7533"/>
    </style:style>
    <style:style style:name="T34" style:family="text">
      <style:text-properties fo:language="en" fo:country="US"/>
    </style:style>
    <style:style style:name="T35" style:family="text">
      <style:text-properties fo:color="#00a933" loext:opacity="100%" officeooo:rsid="006e60ad"/>
    </style:style>
    <style:style style:name="T36" style:family="text">
      <style:text-properties officeooo:rsid="003279ba"/>
    </style:style>
    <style:style style:name="T37" style:family="text">
      <style:text-properties fo:color="#dcdcaa" loext:opacity="100%"/>
    </style:style>
    <style:style style:name="T38" style:family="text">
      <style:text-properties fo:color="#9cdcfe" loext:opacity="100%"/>
    </style:style>
    <style:style style:name="T39" style:family="text">
      <style:text-properties fo:color="#c586c0" loext:opacity="100%"/>
    </style:style>
    <style:style style:name="T40" style:family="text">
      <style:text-properties fo:color="#569cd6" loext:opacity="100%" style:font-name="Consolas" fo:font-size="10.5pt" fo:font-weight="normal" fo:background-color="#1e1e1e" loext:char-shading-value="0"/>
    </style:style>
    <style:style style:name="T41" style:family="text">
      <style:text-properties fo:color="#d4d4d4" loext:opacity="100%" style:font-name="Consolas" fo:font-size="10.5pt" fo:font-weight="normal" fo:background-color="#1e1e1e" loext:char-shading-value="0"/>
    </style:style>
    <style:style style:name="T42" style:family="text">
      <style:text-properties fo:color="#dcdcaa" loext:opacity="100%" style:font-name="Consolas" fo:font-size="10.5pt" fo:font-weight="normal" fo:background-color="#1e1e1e" loext:char-shading-value="0"/>
    </style:style>
    <style:style style:name="T43" style:family="text">
      <style:text-properties fo:color="#b5cea8" loext:opacity="100%"/>
    </style:style>
    <style:style style:name="T44" style:family="text">
      <style:text-properties fo:color="#4fc1ff" loext:opacity="100%"/>
    </style:style>
    <style:style style:name="T45" style:family="text">
      <style:text-properties fo:color="#00a933" loext:opacity="100%" officeooo:rsid="006fd96c"/>
    </style:style>
    <style:style style:name="T46" style:family="text">
      <style:text-properties fo:color="#ce9178" loext:opacity="100%"/>
    </style:style>
    <style:style style:name="T47" style:family="text">
      <style:text-properties fo:color="#9cdcfe" loext:opacity="100%" officeooo:rsid="0048e889"/>
    </style:style>
    <style:style style:name="T48" style:family="text">
      <style:text-properties fo:color="#00a933" loext:opacity="100%" officeooo:rsid="00701655"/>
    </style:style>
    <style:style style:name="T49" style:family="text">
      <style:text-properties fo:color="#569cd6" loext:opacity="100%" style:font-name="Consolas" fo:font-size="10.5pt" fo:font-weight="normal" officeooo:rsid="0049ddd9"/>
    </style:style>
    <style:style style:name="T50" style:family="text">
      <style:text-properties style:font-name="Consolas" fo:font-size="10.5pt" fo:font-weight="normal" officeooo:rsid="0049ddd9"/>
    </style:style>
    <style:style style:name="T51" style:family="text">
      <style:text-properties fo:color="#dcdcaa" loext:opacity="100%" style:font-name="Consolas" fo:font-size="10.5pt" fo:font-weight="normal" officeooo:rsid="0049ddd9"/>
    </style:style>
    <style:style style:name="T52" style:family="text">
      <style:text-properties fo:color="#9cdcfe" loext:opacity="100%" style:font-name="Consolas" fo:font-size="10.5pt" fo:font-weight="normal" officeooo:rsid="0049ddd9"/>
    </style:style>
    <style:style style:name="T53" style:family="text">
      <style:text-properties fo:color="#dcdcaa" loext:opacity="100%" style:font-name="Consolas" fo:font-size="10.5pt" fo:font-weight="normal" officeooo:rsid="0049ddd9" fo:background-color="#1e1e1e" loext:char-shading-value="0"/>
    </style:style>
    <style:style style:name="T54" style:family="text">
      <style:text-properties style:font-name="Liberation Mono"/>
    </style:style>
    <style:style style:name="T55" style:family="text">
      <style:text-properties officeooo:rsid="00a834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ice: Documentation pending review. If you have any questions, please consult the documentation in Portuguese.</text:p>
      <text:p text:style-name="P2"/>
      <text:p text:style-name="P2"><text:span text:style-name="T1">Kalida</text:span> is a Javascript framework designed for creating views quickly and intuitively.</text:p>
      <text:p text:style-name="P2"/>
      <text:p text:style-name="P3">In Kalida, a view is an instance of a class that inherits from JView and has an HTML element assigned to the variable $view. This approach allows us to specify the view in the appending statement because the element indicated in the $view variable will be appended.</text:p>
      <text:p text:style-name="P3"/>
      <text:p text:style-name="P4">You must keep in mind the difference between an instance of type view and the $view variable.</text:p>
      <text:p text:style-name="P4">By default, when the first variable is declared in A mode, it creates a $view variable, even if you do not specify them, for example in the instructions A.div(), A.p(‘view’), A.form(‘varName’), all of them will create the $view variable as long as it is the first instruction to create an element in A or A_SAVED mode, noting that the same does not apply if the first instruction is not to create an html element, but rather a JView and this will cause an error, that is, A.jView cannot be the first instruction in the creation of a view, because it does not create the $view variable.</text:p>
      <text:p text:style-name="P3"/>
      <text:p text:style-name="P2">The heart of Kalida is the TAG.js library, and it was built on the concepts of triple assignment, identification by inspection, manageability through controllers and actions, and dilution of the HTTP response in the composition of a view.</text:p>
      <text:p text:style-name="P5"/>
      <text:p text:style-name="P6">Triple assignment consists of three actions performed in one instruction, which would be:</text:p>
      <text:p text:style-name="P6">a) creation of the HTML element;</text:p>
      <text:p text:style-name="P6">b) assignment of the created HTML element to a variable; and</text:p>
      <text:p text:style-name="P6">c) based on the variable name, addition of a CSS style to the created HTML element.</text:p>
      <text:p text:style-name="P6"/>
      <text:p text:style-name="P6">Note that one instruction has three assignments in the sense of performing the three actions mentioned above. However, it is correct to observe that Kalida is responsible for the other instructions that generate the desired effect.</text:p>
      <text:p text:style-name="P7"/>
      <text:p text:style-name="P7">How does it work?</text:p>
      <text:p text:style-name="P7"/>
      <text:p text:style-name="P7">The TAG library has two constants for creating HTML elements:</text:p>
      <text:p text:style-name="P7">1 – the constant E (Element); and</text:p>
      <text:p text:style-name="P7">2 – the constant A (Advanced);</text:p>
      <text:p text:style-name="P8"/>
      <text:p text:style-name="P8">The constant E creates HTML elements, but the constant A is an "upgrade" of the constant E, and works with the concept of triple assignment.</text:p>
      <text:p text:style-name="P8"/>
      <text:p text:style-name="P7">The constant A should preferably be invoked within the _init method in classes that inherit from JView, that is, a class that represents a view.</text:p>
      <text:p text:style-name="P7"/>
      <text:p text:style-name="P9">Thus, when you declare A.div(“varName”), three actions are performed:</text:p>
      <text:p text:style-name="P9">1) We create an HTML element of type div;</text:p>
      <text:p text:style-name="P9">2) We create a variable named $varName that references the created div; and</text:p>
      <text:p text:style-name="P9">3) We add a CSS class to the div element using the $varName variable in the format className_varName, which allows the variable to be identified by inspection in the browser.</text:p>
      <text:p text:style-name="P9"/>
      <text:p text:style-name="P10">Notice that a single instruction, A.div(“varName”), was provided, but three actions were performed.</text:p>
      <text:p text:style-name="P11"/>
      <text:p text:style-name="P9">Because it is an "extension" of the constant E, the constant A currently has 93 declarations for creating HTML elements, such as a, p, span, div, textarea, etc.</text:p>
      <text:p text:style-name="P9"><text:soft-page-break/>If you cannot find the desired HTML element, you could add the desired reference to the constant E, which will automatically be inherited by the constant A.</text:p>
      <text:p text:style-name="P9"/>
      <text:p text:style-name="P9">For standardization purposes, some HTML elements are declared as inputs, for example: inputSubmit, inputNumber, inputEmail, etc.</text:p>
      <text:p text:style-name="P10">For standardization purposes, HTML elements that serve as input are declared as inputVarName or inputUpdateVarName when the field is updatable, as this makes a difference in retrieving variable values ​​from views.</text:p>
      <text:p text:style-name="P12"/>
      <text:p text:style-name="P13">BASIC PROBLEMS</text:p>
      <text:p text:style-name="P14">The constant A represents a write right, so it should preferably be invoked in the <text:span text:style-name="T2">init method if you invoke the mount</text:span>() method.</text:p>
      <text:p text:style-name="P15">Because it represents a write right, if you are mounting a view in the _init method and invoke the creation of another view, the write right passes to the second view and the triple assignment occurs in the second view. That is, if the triple assignment should occur in the first view under construction and it starts to occur in the second view under construction, this will generate a series of problems. To work around the write right problem, there are three options:</text:p>
      <text:p text:style-name="P16">a) Create the view with the instruction A.jView(anotherView, this, varName), as this will return write permissions to the first view being built. Note that if varName is omitted, the variable name will assume the name of the view's class;</text:p>
      <text:p text:style-name="P16"/>
      <text:p text:style-name="P16">b) Use let aSaved = A_SAVED(this). It works the same way as the constant A, however, it maintains write permissions, and when you declare another view within the view being built, the write permissions in the aSaved variable will not be modified.</text:p>
      <text:p text:style-name="P16"/>
      <text:p text:style-name="P16">c) Within the view being built, after invoking another view for construction, invoke this.aMode_(), which returns write permissions to the class that invoked that instruction.</text:p>
      <text:p text:style-name="P16"/>
      <text:p text:style-name="P16">Note: A.jView does not add CSS to the view being appended..</text:p>
      <text:p text:style-name="P17"/>
      <text:p text:style-name="P18">If you've built views and don't know which one has write access, simply call this.aMode_(), and the triple assignment will be directed to the class that called the aMode_() method. So, to work with the constant A, you need to know the write access. With A_SAVED, the write access is fixed, and you won't have any problems, so why use A instead of A_SAVED? For simplicity, that's all.</text:p>
      <text:p text:style-name="Text_20_body"/>
      <text:p text:style-name="P19"/>
      <text:p text:style-name="P20">One of the strengths of triple attribution is the ability to identify elements through browser inspection, which facilitates the identification of applied CSS styles and greatly aids in development.</text:p>
      <text:p text:style-name="P21"/>
      <text:p text:style-name="P22">BASIC STRUCTURE OF A KALIDA PROJECT</text:p>
      <text:p text:style-name="P21"/>
      <text:p text:style-name="P21">-js</text:p>
      <text:p text:style-name="P21"><text:s text:c="4"/>- actions</text:p>
      <text:p text:style-name="P21"><text:tab/>ActionsSet.js</text:p>
      <text:p text:style-name="P21"><text:tab/>ActionsLogin.js</text:p>
      <text:p text:style-name="P21"><text:tab/>ActionsMenu.js</text:p>
      <text:p text:style-name="P21"><text:soft-page-break/><text:tab/>ActionsNavigation.js</text:p>
      <text:p text:style-name="P21"><text:tab/>ActionsSearch.js</text:p>
      <text:p text:style-name="P21"><text:s text:c="4"/>-api</text:p>
      <text:p text:style-name="P21"><text:tab/>APIS.js</text:p>
      <text:p text:style-name="P21"><text:s text:c="4"/>-aspect</text:p>
      <text:p text:style-name="P21"><text:tab/>Aspect.js</text:p>
      <text:p text:style-name="P21"><text:s text:c="4"/>-controller</text:p>
      <text:p text:style-name="P21"><text:s text:c="4"/>-lang</text:p>
      <text:p text:style-name="P21"><text:tab/>Language.js</text:p>
      <text:p text:style-name="P21"><text:s text:c="4"/>-tag</text:p>
      <text:p text:style-name="P21"><text:tab/>TAG.js</text:p>
      <text:p text:style-name="P21"><text:tab/>TAGTools.js</text:p>
      <text:p text:style-name="P21"><text:s text:c="4"/>-view</text:p>
      <text:p text:style-name="P21"/>
      <text:p text:style-name="P23">ActionSet.js unifica as demais actions: ActionsLogin.js, ActionsMenu.js, ActionsNavigation.js, ActionsSearch.js</text:p>
      <text:p text:style-name="P24"/>
      <text:p text:style-name="P24">APIS.js is responsible for communication with different APIs, each with its own tokens.</text:p>
      <text:p text:style-name="P24"/>
      <text:p text:style-name="P24">Aspect.js for handling basic errors.</text:p>
      <text:p text:style-name="P24"/>
      <text:p text:style-name="P24">Language.js for the application language</text:p>
      <text:p text:style-name="P24"/>
      <text:p text:style-name="P24">TAG.js is the heart of Kalida.</text:p>
      <text:p text:style-name="P24"/>
      <text:p text:style-name="P24">TAGTools contains some additional tools.</text:p>
      <text:p text:style-name="P25"/>
      <text:p text:style-name="P26">BASIC CONVENTIONS</text:p>
      <text:p text:style-name="P25"/>
      <text:p text:style-name="P23">1 - Views should not have events or behavioral codes (methods) with great complexity; in theory, they are only for creating and adding HTML elements, meaning they have very few methods, generally only the _init method.</text:p>
      <text:p text:style-name="P23">2 – View behaviors are implemented in controllers, and when it comes to behavior shared across multiple windows, view behaviors are implemented by actions.</text:p>
      <text:p text:style-name="P25"/>
      <text:p text:style-name="P27"/>
      <text:p text:style-name="P28">ABOUT THE TAG.js LIBRARY</text:p>
      <text:p text:style-name="P28"/>
      <text:p text:style-name="P28"/>
      <text:p text:style-name="P29">As mentioned, the TAG.js library is the core of Kalida.</text:p>
      <text:p text:style-name="P30"/>
      <text:p text:style-name="P31">=======================================================================</text:p>
      <text:p text:style-name="P31">= <text:s text:c="55"/>CLASS JMount <text:s text:c="64"/>=</text:p>
      <text:p text:style-name="P31">=======================================================================</text:p>
      <text:p text:style-name="P30"/>
      <text:p text:style-name="P30"/>
      <text:p text:style-name="P32"><text:span text:style-name="T3">class</text:span> <text:span text:style-name="T4">JMount</text:span>{</text:p>
      <text:p text:style-name="P33">    <text:span text:style-name="T5">constructor</text:span><text:span text:style-name="T6">(</text:span><text:span text:style-name="T7">data</text:span><text:span text:style-name="T6"> = {}){</text:span></text:p>
      <text:p text:style-name="P33">        <text:span text:style-name="T8">overJson</text:span><text:span text:style-name="T6">(</text:span><text:span text:style-name="T7">data</text:span><text:span text:style-name="T6">, </text:span><text:span text:style-name="T5">this</text:span><text:span text:style-name="T6">)</text:span></text:p>
      <text:p text:style-name="P33">    <text:span text:style-name="T6">}</text:span></text:p>
      <text:p text:style-name="P33">    </text:p>
      <text:p text:style-name="P33">    <text:span text:style-name="T8">mount_</text:span><text:span text:style-name="T6">(){</text:span></text:p>
      <text:p text:style-name="P33"><text:soft-page-break/>        <text:span text:style-name="T6">[</text:span></text:p>
      <text:p text:style-name="P33">            <text:span text:style-name="T9">'_init'</text:span><text:span text:style-name="T6">,</text:span></text:p>
      <text:p text:style-name="P33">            <text:span text:style-name="T9">'_appends'</text:span><text:span text:style-name="T6">,</text:span></text:p>
      <text:p text:style-name="P33">            <text:span text:style-name="T9">'_events'</text:span><text:span text:style-name="T6">,</text:span></text:p>
      <text:p text:style-name="P33">            <text:span text:style-name="T9">'_limits'</text:span><text:span text:style-name="T6">,</text:span></text:p>
      <text:p text:style-name="P33">            <text:span text:style-name="T9">'_requests'</text:span></text:p>
      <text:p text:style-name="P33">        <text:span text:style-name="T6">].</text:span><text:span text:style-name="T8">forEach</text:span><text:span text:style-name="T6">(</text:span><text:span text:style-name="T7">mountMethod</text:span><text:span text:style-name="T6"> </text:span><text:span text:style-name="T5">=&gt;</text:span><text:span text:style-name="T6"> </text:span><text:span text:style-name="T5">this</text:span><text:span text:style-name="T6">[</text:span><text:span text:style-name="T7">mountMethod</text:span><text:span text:style-name="T6">]?.())</text:span></text:p>
      <text:p text:style-name="P33">    <text:span text:style-name="T6">}</text:span></text:p>
      <text:p text:style-name="P34">}</text:p>
      <text:p text:style-name="P30"/>
      <text:p text:style-name="P29">JMount is the base class for JView and any Controllers that may be created.</text:p>
      <text:p text:style-name="P35">When you extract the essential data from a response into a JSON and pass this JSON to the constructor of an object that inherits from JMount, the JSON is "diluted" and the key:value pairs are "assimilated" by the class instance into a variable with name = key and value = value of the key in the JSON.</text:p>
      <text:p text:style-name="P35"/>
      <text:p text:style-name="P35">For example, when we pass the json {name:”Kalida”, type:”Framework”} the overJson method will “dilute” the object and the class instance will then have the variables name=”Kalida”, type=”Framework”.</text:p>
      <text:p text:style-name="P35"/>
      <text:p text:style-name="P36">There is a problem related to key-value dilution, because if a response is received in which one or more keys exist in a JView, the JView keys will be overwritten, generating an inconsistency problem due to key name collision. To mitigate this, the JView fields have underscores “_”.</text:p>
      <text:p text:style-name="P36"/>
      <text:p text:style-name="P36">Therefore, the response should not contain keys that conflict with the JView keys.</text:p>
      <text:p text:style-name="P35"/>
      <text:p text:style-name="P37">The `mount_()` method checks if the class that inherits from `JMount` contains any of the methods declared in the array, and if so, executes them in the order of the array:</text:p>
      <text:p text:style-name="P37">a) first `_init`;</text:p>
      <text:p text:style-name="P37">b) second `_appends`; and</text:p>
      <text:p text:style-name="P37">c) so on until `_requests`;</text:p>
      <text:p text:style-name="P37"/>
      <text:p text:style-name="P37">The `mount_()` method can be called in the constructor of the child class, not necessarily at the beginning of the constructor, as it will depend on how the instructions will be invoked. This provides flexibility in building the view.</text:p>
      <text:p text:style-name="P38"/>
      <text:p text:style-name="P38">======================================================================== <text:s text:c="57"/>CLASS JView </text:p>
      <text:p text:style-name="P31"><text:s text:c="3"/>===========================================================<text:span text:style-name="T10">==</text:span>===========</text:p>
      <text:p text:style-name="P30"/>
      <text:p text:style-name="P39"><text:span text:style-name="T3">class</text:span> <text:span text:style-name="T4">JView</text:span> <text:span text:style-name="T3">extends</text:span> <text:span text:style-name="T4">JMount</text:span>{</text:p>
      <text:p text:style-name="P40"/>
      <text:p text:style-name="P33">    <text:span text:style-name="T5">constructor</text:span><text:span text:style-name="T6">(</text:span><text:span text:style-name="T7">jsonEntity</text:span><text:span text:style-name="T6">, </text:span><text:span text:style-name="T7">includeThisKeys</text:span><text:span text:style-name="T6">, ... </text:span><text:span text:style-name="T7">sourceIds</text:span><text:span text:style-name="T6">) {</text:span></text:p>
      <text:p text:style-name="P33">        <text:span text:style-name="T5">super</text:span><text:span text:style-name="T6">()</text:span></text:p>
      <text:p text:style-name="P33">        <text:span text:style-name="T7">jsonEntity</text:span><text:span text:style-name="T6"> = </text:span><text:span text:style-name="T7">jsonEntity</text:span><text:span text:style-name="T6"> || {}</text:span></text:p>
      <text:p text:style-name="P33">        <text:span text:style-name="T5">this</text:span><text:span text:style-name="T6">.</text:span><text:span text:style-name="T7">_sourceKeys</text:span><text:span text:style-name="T6"> = </text:span><text:span text:style-name="T8">keysOf</text:span><text:span text:style-name="T6">(</text:span><text:span text:style-name="T7">jsonEntity</text:span><text:span text:style-name="T6">)</text:span></text:p>
      <text:p text:style-name="P33">        <text:span text:style-name="T5">this</text:span><text:span text:style-name="T6">.</text:span><text:span text:style-name="T7">_prefix</text:span><text:span text:style-name="T6"> = </text:span><text:span text:style-name="T5">this</text:span><text:span text:style-name="T6">.</text:span><text:span text:style-name="T7">constructor</text:span><text:span text:style-name="T6">.</text:span><text:span text:style-name="T11">name</text:span><text:span text:style-name="T6"> + </text:span><text:span text:style-name="T9">'_'</text:span></text:p>
      <text:p text:style-name="P33">        <text:span text:style-name="T5">this</text:span><text:span text:style-name="T6">.</text:span><text:span text:style-name="T7">_isTagMount</text:span><text:span text:style-name="T6"> = </text:span><text:span text:style-name="T5">true</text:span></text:p>
      <text:p text:style-name="P33">        <text:span text:style-name="T5">this</text:span><text:span text:style-name="T6">.</text:span><text:span text:style-name="T7">_updated</text:span><text:span text:style-name="T6"> = </text:span><text:span text:style-name="T5">true</text:span></text:p>
      <text:p text:style-name="P33">        <text:span text:style-name="T5">this</text:span><text:span text:style-name="T6">.</text:span><text:span text:style-name="T7">_sourceIds</text:span><text:span text:style-name="T6"> = </text:span><text:span text:style-name="T8">arrayInSpread</text:span><text:span text:style-name="T6">(</text:span><text:span text:style-name="T7">sourceIds</text:span><text:span text:style-name="T6">)</text:span></text:p>
      <text:p text:style-name="P33">        <text:span text:style-name="T12">if</text:span><text:span text:style-name="T6">(</text:span><text:span text:style-name="T7">includeThisKeys</text:span><text:span text:style-name="T6"> == </text:span><text:span text:style-name="T13">0</text:span><text:span text:style-name="T6"> || </text:span><text:span text:style-name="T7">includeThisKeys</text:span><text:span text:style-name="T6">) </text:span><text:span text:style-name="T5">this</text:span><text:span text:style-name="T6">.</text:span><text:span text:style-name="T8">addSourceKeys_</text:span><text:span text:style-name="T6">(</text:span><text:span text:style-name="T7">includeThisKeys</text:span><text:span text:style-name="T6">)</text:span></text:p>
      <text:p text:style-name="P33"><text:soft-page-break/>        <text:span text:style-name="T5">this</text:span><text:span text:style-name="T6">.</text:span><text:span text:style-name="T8">keyChain_</text:span><text:span text:style-name="T6">(</text:span><text:span text:style-name="T7">jsonEntity</text:span><text:span text:style-name="T6">)</text:span></text:p>
      <text:p text:style-name="P33">        <text:span text:style-name="T5">this</text:span><text:span text:style-name="T6">.</text:span><text:span text:style-name="T8">aMode_</text:span><text:span text:style-name="T6">()</text:span></text:p>
      <text:p text:style-name="P33">    <text:span text:style-name="T6">}</text:span></text:p>
      <text:p text:style-name="P40"/>
      <text:p text:style-name="P33">    <text:span text:style-name="T8">aMode_</text:span><text:span text:style-name="T6"> = () </text:span><text:span text:style-name="T5">=&gt;</text:span><text:span text:style-name="T6"> </text:span><text:span text:style-name="T7">A_MODE_SOURCE</text:span><text:span text:style-name="T6"> = </text:span><text:span text:style-name="T5">this</text:span></text:p>
      <text:p text:style-name="P33"/>
      <text:p text:style-name="P33">    <text:span text:style-name="T8">addSourceKeys_</text:span><text:span text:style-name="T6"> = (... </text:span><text:span text:style-name="T7">keys</text:span><text:span text:style-name="T6">) </text:span><text:span text:style-name="T5">=&gt;</text:span><text:span text:style-name="T6"> {</text:span></text:p>
      <text:p text:style-name="P33">        <text:span text:style-name="T5">this</text:span><text:span text:style-name="T6">.</text:span><text:span text:style-name="T7">_sourceKeys</text:span><text:span text:style-name="T6"> = </text:span><text:span text:style-name="T5">this</text:span><text:span text:style-name="T6">.</text:span><text:span text:style-name="T7">_sourceKeys</text:span><text:span text:style-name="T6">.</text:span><text:span text:style-name="T8">concat</text:span><text:span text:style-name="T6">(</text:span><text:span text:style-name="T8">arrayInSpread</text:span><text:span text:style-name="T6">(</text:span><text:span text:style-name="T7">keys</text:span><text:span text:style-name="T6">))</text:span></text:p>
      <text:p text:style-name="P33">        <text:span text:style-name="T12">return</text:span><text:span text:style-name="T6"> </text:span><text:span text:style-name="T5">this</text:span><text:span text:style-name="T6">.</text:span><text:span text:style-name="T8">osk_</text:span><text:span text:style-name="T6">()</text:span></text:p>
      <text:p text:style-name="P33">    <text:span text:style-name="T6">}</text:span></text:p>
      <text:p text:style-name="P33"/>
      <text:p text:style-name="P33">    <text:span text:style-name="T8">ask_</text:span><text:span text:style-name="T6"> = </text:span><text:span text:style-name="T5">this</text:span><text:span text:style-name="T6">.</text:span><text:span text:style-name="T8">addSourceKeys_</text:span></text:p>
      <text:p text:style-name="P40"/>
      <text:p text:style-name="P33">    <text:span text:style-name="T8">overSourceKeys_</text:span><text:span text:style-name="T6"> = (... </text:span><text:span text:style-name="T7">keys</text:span><text:span text:style-name="T6">) </text:span><text:span text:style-name="T5">=&gt;</text:span><text:span text:style-name="T6"> {</text:span></text:p>
      <text:p text:style-name="P33">        <text:span text:style-name="T7">keys</text:span><text:span text:style-name="T6"> = </text:span><text:span text:style-name="T8">arrayInSpread</text:span><text:span text:style-name="T6">(</text:span><text:span text:style-name="T7">keys</text:span><text:span text:style-name="T6">)</text:span></text:p>
      <text:p text:style-name="P33">        <text:span text:style-name="T12">return</text:span><text:span text:style-name="T6"> </text:span><text:span text:style-name="T8">overJson</text:span><text:span text:style-name="T6">(</text:span><text:span text:style-name="T5">this</text:span><text:span text:style-name="T6">, {}, </text:span><text:span text:style-name="T7">keys</text:span><text:span text:style-name="T6">.</text:span><text:span text:style-name="T7">length</text:span><text:span text:style-name="T6">? </text:span><text:span text:style-name="T7">keys</text:span><text:span text:style-name="T6"> : </text:span><text:span text:style-name="T5">this</text:span><text:span text:style-name="T6">.</text:span><text:span text:style-name="T7">_sourceKeys</text:span><text:span text:style-name="T6">)</text:span></text:p>
      <text:p text:style-name="P33">    <text:span text:style-name="T6">}</text:span></text:p>
      <text:p text:style-name="P40"/>
      <text:p text:style-name="P33">    <text:span text:style-name="T8">osk_</text:span><text:span text:style-name="T6"> = </text:span><text:span text:style-name="T5">this</text:span><text:span text:style-name="T6">.</text:span><text:span text:style-name="T8">overSourceKeys_</text:span></text:p>
      <text:p text:style-name="P40"/>
      <text:p text:style-name="P33">    <text:span text:style-name="T8">overSourceKeysPlus_</text:span><text:span text:style-name="T6"> = (... </text:span><text:span text:style-name="T7">keys</text:span><text:span text:style-name="T6">) </text:span><text:span text:style-name="T5">=&gt;</text:span><text:span text:style-name="T6"> {</text:span></text:p>
      <text:p text:style-name="P33">        <text:span text:style-name="T7">keys</text:span><text:span text:style-name="T6"> = </text:span><text:span text:style-name="T5">this</text:span><text:span text:style-name="T6">.</text:span><text:span text:style-name="T7">_sourceKeys</text:span><text:span text:style-name="T6">.</text:span><text:span text:style-name="T8">concat</text:span><text:span text:style-name="T6">(</text:span><text:span text:style-name="T8">arrayInSpread</text:span><text:span text:style-name="T6">(</text:span><text:span text:style-name="T7">keys</text:span><text:span text:style-name="T6">))</text:span></text:p>
      <text:p text:style-name="P33">        <text:span text:style-name="T12">return</text:span><text:span text:style-name="T6"> </text:span><text:span text:style-name="T5">this</text:span><text:span text:style-name="T6">.</text:span><text:span text:style-name="T8">osk_</text:span><text:span text:style-name="T6">(</text:span><text:span text:style-name="T7">keys</text:span><text:span text:style-name="T6">)</text:span></text:p>
      <text:p text:style-name="P33">    <text:span text:style-name="T6">}</text:span></text:p>
      <text:p text:style-name="P33"/>
      <text:p text:style-name="P33">    <text:span text:style-name="T8">psk_</text:span><text:span text:style-name="T6"> = </text:span><text:span text:style-name="T5">this</text:span><text:span text:style-name="T6">.</text:span><text:span text:style-name="T8">overSourceKeysPlus_</text:span></text:p>
      <text:p text:style-name="P40"/>
      <text:p text:style-name="P33">    <text:span text:style-name="T8">innerAnchor_</text:span><text:span text:style-name="T6"> = (</text:span><text:span text:style-name="T7">elementAnchor</text:span><text:span text:style-name="T6">, </text:span><text:span text:style-name="T7">elementName</text:span><text:span text:style-name="T6">) </text:span><text:span text:style-name="T5">=&gt;</text:span><text:span text:style-name="T6"> {</text:span></text:p>
      <text:p text:style-name="P33">        <text:span text:style-name="T5">this</text:span><text:span text:style-name="T6">[</text:span><text:span text:style-name="T7">elementName</text:span><text:span text:style-name="T6">].</text:span><text:span text:style-name="T7">id</text:span><text:span text:style-name="T6"> = </text:span><text:span text:style-name="T5">this</text:span><text:span text:style-name="T6">.</text:span><text:span text:style-name="T7">_prefix</text:span><text:span text:style-name="T6"> + </text:span><text:span text:style-name="T7">elementName</text:span><text:span text:style-name="T6"> + </text:span><text:span text:style-name="T11">ID_MAKER</text:span><text:span text:style-name="T6">.</text:span><text:span text:style-name="T8">next</text:span><text:span text:style-name="T6">().</text:span><text:span text:style-name="T7">value</text:span></text:p>
      <text:p text:style-name="P33">        <text:span text:style-name="T7">elementAnchor</text:span><text:span text:style-name="T6">.</text:span><text:span text:style-name="T7">href</text:span><text:span text:style-name="T6"> = </text:span><text:span text:style-name="T9">'#'</text:span><text:span text:style-name="T6"> + </text:span><text:span text:style-name="T5">this</text:span><text:span text:style-name="T6">[</text:span><text:span text:style-name="T7">elementName</text:span><text:span text:style-name="T6">].</text:span><text:span text:style-name="T7">id</text:span></text:p>
      <text:p text:style-name="P33">    <text:span text:style-name="T6">};</text:span></text:p>
      <text:p text:style-name="P33"/>
      <text:p text:style-name="P33">    <text:span text:style-name="T8">defClasses_</text:span><text:span text:style-name="T6"> = (... </text:span><text:span text:style-name="T7">classes</text:span><text:span text:style-name="T6">) </text:span><text:span text:style-name="T5">=&gt;</text:span><text:span text:style-name="T6"> </text:span><text:span text:style-name="T8">arrayInSpread</text:span><text:span text:style-name="T6">(</text:span><text:span text:style-name="T7">classes</text:span><text:span text:style-name="T6">)</text:span></text:p>
      <text:p text:style-name="P33">        <text:span text:style-name="T6">.</text:span><text:span text:style-name="T8">reduce</text:span><text:span text:style-name="T6">((</text:span><text:span text:style-name="T7">list</text:span><text:span text:style-name="T6">, </text:span><text:span text:style-name="T7">cls</text:span><text:span text:style-name="T6">) </text:span><text:span text:style-name="T5">=&gt;</text:span><text:span text:style-name="T6"> </text:span><text:span text:style-name="T7">list</text:span><text:span text:style-name="T6">.</text:span><text:span text:style-name="T8">concat</text:span><text:span text:style-name="T6">(</text:span><text:span text:style-name="T5">this</text:span><text:span text:style-name="T6">.</text:span><text:span text:style-name="T7">_prefix</text:span><text:span text:style-name="T6"> + (</text:span><text:span text:style-name="T14">/</text:span><text:span text:style-name="T8">^</text:span><text:span text:style-name="T15">\$</text:span><text:span text:style-name="T14">/</text:span><text:span text:style-name="T6">.</text:span><text:span text:style-name="T8">test</text:span><text:span text:style-name="T6">(</text:span><text:span text:style-name="T7">cls</text:span><text:span text:style-name="T6">) ? </text:span><text:span text:style-name="T7">cls</text:span><text:span text:style-name="T6">.</text:span><text:span text:style-name="T8">substring</text:span><text:span text:style-name="T6">(</text:span><text:span text:style-name="T13">1</text:span><text:span text:style-name="T6">) : </text:span><text:span text:style-name="T7">cls</text:span><text:span text:style-name="T6">)), [])</text:span></text:p>
      <text:p text:style-name="P33"/>
      <text:p text:style-name="P33">    <text:span text:style-name="T8">insertClasses_</text:span><text:span text:style-name="T6"> = (</text:span><text:span text:style-name="T7">element</text:span><text:span text:style-name="T6">, ... </text:span><text:span text:style-name="T7">classes</text:span><text:span text:style-name="T6">) </text:span><text:span text:style-name="T5">=&gt;</text:span><text:span text:style-name="T6"> </text:span><text:span text:style-name="T8">addClasses</text:span><text:span text:style-name="T6">(</text:span><text:span text:style-name="T7">element</text:span><text:span text:style-name="T6">, </text:span><text:span text:style-name="T5">this</text:span><text:span text:style-name="T6">.</text:span><text:span text:style-name="T8">defClasses_</text:span><text:span text:style-name="T6">(</text:span><text:span text:style-name="T7">classes</text:span><text:span text:style-name="T6">))</text:span></text:p>
      <text:p text:style-name="P33"/>
      <text:p text:style-name="P33">    <text:span text:style-name="T8">removeClasses_</text:span><text:span text:style-name="T6"> = (</text:span><text:span text:style-name="T7">element</text:span><text:span text:style-name="T6">, ... </text:span><text:span text:style-name="T7">classes</text:span><text:span text:style-name="T6">) </text:span><text:span text:style-name="T5">=&gt;</text:span><text:span text:style-name="T6"> </text:span><text:span text:style-name="T8">removeClasses</text:span><text:span text:style-name="T6">(</text:span><text:span text:style-name="T7">element</text:span><text:span text:style-name="T6">, </text:span><text:span text:style-name="T5">this</text:span><text:span text:style-name="T6">.</text:span><text:span text:style-name="T8">defClasses_</text:span><text:span text:style-name="T6">(</text:span><text:span text:style-name="T7">classes</text:span><text:span text:style-name="T6">))</text:span></text:p>
      <text:p text:style-name="P33"/>
      <text:p text:style-name="P33">    <text:span text:style-name="T8">viewValues_</text:span><text:span text:style-name="T6"> = (</text:span><text:span text:style-name="T7">fromUpdate</text:span><text:span text:style-name="T6">, ... </text:span><text:span text:style-name="T7">addVarKeys</text:span><text:span text:style-name="T6">) </text:span><text:span text:style-name="T5">=&gt;</text:span><text:span text:style-name="T6"> {</text:span></text:p>
      <text:p text:style-name="P33">        <text:span text:style-name="T5">let</text:span><text:span text:style-name="T6"> </text:span><text:span text:style-name="T7">regInput</text:span><text:span text:style-name="T6"> =</text:span><text:span text:style-name="T14"> /</text:span><text:span text:style-name="T8">^</text:span><text:span text:style-name="T15">\$</text:span><text:span text:style-name="T14">input</text:span><text:span text:style-name="T9">(</text:span><text:span text:style-name="T14">.</text:span><text:span text:style-name="T9">)(</text:span><text:span text:style-name="T14">.</text:span><text:span text:style-name="T15">*</text:span><text:span text:style-name="T9">)</text:span><text:span text:style-name="T14">/</text:span><text:span text:style-name="T6">,</text:span></text:p>
      <text:p text:style-name="P33">            <text:span text:style-name="T7">regUpdate</text:span><text:span text:style-name="T6"> =</text:span><text:span text:style-name="T14"> /</text:span><text:span text:style-name="T8">^</text:span><text:span text:style-name="T15">\$</text:span><text:span text:style-name="T14">inputUpdate</text:span><text:span text:style-name="T9">(</text:span><text:span text:style-name="T14">.</text:span><text:span text:style-name="T9">)(</text:span><text:span text:style-name="T14">.</text:span><text:span text:style-name="T15">*</text:span><text:span text:style-name="T9">)</text:span><text:span text:style-name="T14">/</text:span><text:span text:style-name="T6">,</text:span></text:p>
      <text:p text:style-name="P33">            <text:span text:style-name="T7">index</text:span><text:span text:style-name="T6"> = </text:span><text:span text:style-name="T7">fromUpdate</text:span><text:span text:style-name="T6">? </text:span><text:span text:style-name="T13">12</text:span><text:span text:style-name="T6"> : </text:span><text:span text:style-name="T13">6</text:span><text:span text:style-name="T6">,</text:span></text:p>
      <text:p text:style-name="P33">            <text:span text:style-name="T7">strike</text:span><text:span text:style-name="T6"> = </text:span><text:span text:style-name="T8">arrayInSpread</text:span><text:span text:style-name="T6">(</text:span><text:span text:style-name="T7">addVarKeys</text:span><text:span text:style-name="T6">).</text:span><text:span text:style-name="T8">reduce</text:span><text:span text:style-name="T6">((</text:span><text:span text:style-name="T7">json</text:span><text:span text:style-name="T6">, </text:span><text:span text:style-name="T7">key</text:span><text:span text:style-name="T6">) </text:span><text:span text:style-name="T5">=&gt;</text:span><text:span text:style-name="T6"> {</text:span><text:span text:style-name="T7">json</text:span><text:span text:style-name="T6">[</text:span><text:span text:style-name="T7">key</text:span><text:span text:style-name="T6">] = </text:span><text:span text:style-name="T5">this</text:span><text:span text:style-name="T6">[</text:span><text:span text:style-name="T7">key</text:span><text:span text:style-name="T6">]; </text:span><text:span text:style-name="T12">return</text:span><text:span text:style-name="T6"> </text:span><text:span text:style-name="T7">json</text:span><text:span text:style-name="T6">}, {}),</text:span></text:p>
      <text:p text:style-name="P33">            <text:span text:style-name="T7">source</text:span><text:span text:style-name="T6"> = </text:span><text:span text:style-name="T8">keysOf</text:span><text:span text:style-name="T6">(</text:span><text:span text:style-name="T5">this</text:span><text:span text:style-name="T6">).</text:span><text:span text:style-name="T8">reduce</text:span><text:span text:style-name="T6">((</text:span><text:span text:style-name="T7">json</text:span><text:span text:style-name="T6">, </text:span><text:span text:style-name="T7">key</text:span><text:span text:style-name="T6">) </text:span><text:span text:style-name="T5">=&gt;</text:span><text:span text:style-name="T6"> {   </text:span></text:p>
      <text:p text:style-name="P33"><text:soft-page-break/>                <text:span text:style-name="T12">if</text:span><text:span text:style-name="T6">(</text:span><text:span text:style-name="T7">fromUpdate</text:span><text:span text:style-name="T6">? </text:span><text:span text:style-name="T7">regUpdate</text:span><text:span text:style-name="T6">.</text:span><text:span text:style-name="T8">test</text:span><text:span text:style-name="T6">(</text:span><text:span text:style-name="T7">key</text:span><text:span text:style-name="T6">) : </text:span><text:span text:style-name="T7">regInput</text:span><text:span text:style-name="T6">.</text:span><text:span text:style-name="T8">test</text:span><text:span text:style-name="T6">(</text:span><text:span text:style-name="T7">key</text:span><text:span text:style-name="T6">) &amp;&amp; !</text:span><text:span text:style-name="T7">regUpdate</text:span><text:span text:style-name="T6">.</text:span><text:span text:style-name="T8">test</text:span><text:span text:style-name="T6">(</text:span><text:span text:style-name="T7">key</text:span><text:span text:style-name="T6">)){</text:span></text:p>
      <text:p text:style-name="P33">                    <text:span text:style-name="T5">let</text:span><text:span text:style-name="T6"> </text:span><text:span text:style-name="T7">value</text:span><text:span text:style-name="T6"> = </text:span><text:span text:style-name="T5">this</text:span><text:span text:style-name="T6">[</text:span><text:span text:style-name="T7">key</text:span><text:span text:style-name="T6">].</text:span><text:span text:style-name="T7">value</text:span><text:span text:style-name="T6">,</text:span></text:p>
      <text:p text:style-name="P33">                        <text:span text:style-name="T7">varKey</text:span><text:span text:style-name="T6"> = </text:span><text:span text:style-name="T7">key</text:span><text:span text:style-name="T6">[</text:span><text:span text:style-name="T7">index</text:span><text:span text:style-name="T6">].</text:span><text:span text:style-name="T8">toLowerCase</text:span><text:span text:style-name="T6">() + </text:span><text:span text:style-name="T7">key</text:span><text:span text:style-name="T6">.</text:span><text:span text:style-name="T8">substring</text:span><text:span text:style-name="T6">(</text:span><text:span text:style-name="T7">index</text:span><text:span text:style-name="T6">+</text:span><text:span text:style-name="T13">1</text:span><text:span text:style-name="T6">),</text:span></text:p>
      <text:p text:style-name="P33">                        <text:span text:style-name="T7">inType</text:span><text:span text:style-name="T6"> = </text:span><text:span text:style-name="T5">this</text:span><text:span text:style-name="T6">[</text:span><text:span text:style-name="T7">key</text:span><text:span text:style-name="T6">].</text:span><text:span text:style-name="T7">type</text:span><text:span text:style-name="T6">;</text:span></text:p>
      <text:p text:style-name="P40"/>
      <text:p text:style-name="P33">                    <text:span text:style-name="T5">let</text:span><text:span text:style-name="T6"> </text:span><text:span text:style-name="T7">inValues</text:span><text:span text:style-name="T6"> = {</text:span></text:p>
      <text:p text:style-name="P33">                        <text:span text:style-name="T9">'number'</text:span><text:span text:style-name="T7">:</text:span><text:span text:style-name="T6"> +</text:span><text:span text:style-name="T7">value</text:span><text:span text:style-name="T6">,</text:span></text:p>
      <text:p text:style-name="P33">                        <text:span text:style-name="T9">'checkbox'</text:span><text:span text:style-name="T7">:</text:span><text:span text:style-name="T6"> </text:span><text:span text:style-name="T5">this</text:span><text:span text:style-name="T6">[</text:span><text:span text:style-name="T7">key</text:span><text:span text:style-name="T6">].</text:span><text:span text:style-name="T7">checked</text:span></text:p>
      <text:p text:style-name="P33">                    <text:span text:style-name="T6">};</text:span></text:p>
      <text:p text:style-name="P33">                    <text:span text:style-name="T7">json</text:span><text:span text:style-name="T6">[</text:span><text:span text:style-name="T7">varKey</text:span><text:span text:style-name="T6">] = </text:span><text:span text:style-name="T7">inType</text:span><text:span text:style-name="T6"> </text:span><text:span text:style-name="T5">in</text:span><text:span text:style-name="T6"> </text:span><text:span text:style-name="T7">inValues</text:span><text:span text:style-name="T6">? </text:span><text:span text:style-name="T7">inValues</text:span><text:span text:style-name="T6">[</text:span><text:span text:style-name="T7">inType</text:span><text:span text:style-name="T6">] : </text:span><text:span text:style-name="T7">value</text:span></text:p>
      <text:p text:style-name="P33">                    <text:span text:style-name="T12">if</text:span><text:span text:style-name="T6">(</text:span><text:span text:style-name="T7">json</text:span><text:span text:style-name="T6">[</text:span><text:span text:style-name="T7">varKey</text:span><text:span text:style-name="T6">] !== </text:span><text:span text:style-name="T5">this</text:span><text:span text:style-name="T6">[</text:span><text:span text:style-name="T7">varKey</text:span><text:span text:style-name="T6">]) </text:span><text:span text:style-name="T5">this</text:span><text:span text:style-name="T6">.</text:span><text:span text:style-name="T7">_updated</text:span><text:span text:style-name="T6"> = </text:span><text:span text:style-name="T5">false</text:span></text:p>
      <text:p text:style-name="P33">                <text:span text:style-name="T6">}</text:span></text:p>
      <text:p text:style-name="P33">                <text:span text:style-name="T12">return</text:span><text:span text:style-name="T6"> </text:span><text:span text:style-name="T7">json</text:span></text:p>
      <text:p text:style-name="P33">            <text:span text:style-name="T6">}, {});</text:span></text:p>
      <text:p text:style-name="P33">    </text:p>
      <text:p text:style-name="P33">        <text:span text:style-name="T5">this</text:span><text:span text:style-name="T6">.</text:span><text:span text:style-name="T7">_sourceKeys</text:span><text:span text:style-name="T6">.</text:span><text:span text:style-name="T8">filter</text:span><text:span text:style-name="T6">(</text:span><text:span text:style-name="T7">key</text:span><text:span text:style-name="T6"> </text:span><text:span text:style-name="T5">=&gt;</text:span><text:span text:style-name="T14"> /</text:span><text:span text:style-name="T8">^</text:span><text:span text:style-name="T14">id/</text:span><text:span text:style-name="T6">.</text:span><text:span text:style-name="T8">test</text:span><text:span text:style-name="T6">(</text:span><text:span text:style-name="T7">key</text:span><text:span text:style-name="T6">) &amp;&amp; </text:span><text:span text:style-name="T5">new</text:span><text:span text:style-name="T6"> </text:span><text:span text:style-name="T16">RegExp</text:span><text:span text:style-name="T6">(</text:span><text:span text:style-name="T7">key</text:span><text:span text:style-name="T6">.</text:span><text:span text:style-name="T8">replace</text:span><text:span text:style-name="T6">(</text:span><text:span text:style-name="T9">'id'</text:span><text:span text:style-name="T6">,</text:span><text:span text:style-name="T9">''</text:span><text:span text:style-name="T6">), </text:span><text:span text:style-name="T9">'i'</text:span><text:span text:style-name="T6">).</text:span><text:span text:style-name="T8">test</text:span><text:span text:style-name="T6">(</text:span><text:span text:style-name="T5">this</text:span><text:span text:style-name="T6">.</text:span><text:span text:style-name="T7">_prefix</text:span><text:span text:style-name="T6">))</text:span></text:p>
      <text:p text:style-name="P33">            <text:span text:style-name="T6">.</text:span><text:span text:style-name="T8">forEach</text:span><text:span text:style-name="T6">(</text:span><text:span text:style-name="T7">relativeId</text:span><text:span text:style-name="T6"> </text:span><text:span text:style-name="T5">=&gt;</text:span><text:span text:style-name="T6"> </text:span><text:span text:style-name="T7">source</text:span><text:span text:style-name="T6">[</text:span><text:span text:style-name="T7">relativeId</text:span><text:span text:style-name="T6">] = </text:span><text:span text:style-name="T5">this</text:span><text:span text:style-name="T6">[</text:span><text:span text:style-name="T7">relativeId</text:span><text:span text:style-name="T6">])</text:span></text:p>
      <text:p text:style-name="P33">        <text:span text:style-name="T5">this</text:span><text:span text:style-name="T6">.</text:span><text:span text:style-name="T7">_sourceIds</text:span><text:span text:style-name="T6">.</text:span><text:span text:style-name="T8">forEach</text:span><text:span text:style-name="T6">(</text:span><text:span text:style-name="T7">id</text:span><text:span text:style-name="T6"> </text:span><text:span text:style-name="T5">=&gt;</text:span><text:span text:style-name="T6"> </text:span><text:span text:style-name="T7">source</text:span><text:span text:style-name="T6">[</text:span><text:span text:style-name="T7">id</text:span><text:span text:style-name="T6">] = </text:span><text:span text:style-name="T5">this</text:span><text:span text:style-name="T6">[</text:span><text:span text:style-name="T7">id</text:span><text:span text:style-name="T6">])</text:span></text:p>
      <text:p text:style-name="P33">        <text:span text:style-name="T12">return</text:span><text:span text:style-name="T6"> {...</text:span><text:span text:style-name="T7">strike</text:span><text:span text:style-name="T6">, ...</text:span><text:span text:style-name="T7">source</text:span><text:span text:style-name="T6">}</text:span></text:p>
      <text:p text:style-name="P33">    <text:span text:style-name="T6">}</text:span></text:p>
      <text:p text:style-name="P33"/>
      <text:p text:style-name="P33">    <text:span text:style-name="T8">isUpdated_</text:span><text:span text:style-name="T6"> = () </text:span><text:span text:style-name="T5">=&gt;</text:span><text:span text:style-name="T6"> </text:span><text:span text:style-name="T5">this</text:span><text:span text:style-name="T6">.</text:span><text:span text:style-name="T7">_updated</text:span></text:p>
      <text:p text:style-name="P41"/>
      <text:p text:style-name="P33">    <text:span text:style-name="T8">updateView_</text:span><text:span text:style-name="T6"> = (</text:span><text:span text:style-name="T7">updatedSource</text:span><text:span text:style-name="T6">, </text:span><text:span text:style-name="T7">isUpdated</text:span><text:span text:style-name="T6"> = </text:span><text:span text:style-name="T5">true</text:span><text:span text:style-name="T6">) </text:span><text:span text:style-name="T5">=&gt;</text:span><text:span text:style-name="T6"> {</text:span></text:p>
      <text:p text:style-name="P33">        <text:span text:style-name="T8">keysOf</text:span><text:span text:style-name="T6">(</text:span><text:span text:style-name="T7">updatedSource</text:span><text:span text:style-name="T6"> || </text:span><text:span text:style-name="T5">this</text:span><text:span text:style-name="T6">.</text:span><text:span text:style-name="T8">viewValues_</text:span><text:span text:style-name="T6">(</text:span><text:span text:style-name="T5">true</text:span><text:span text:style-name="T6">)).</text:span><text:span text:style-name="T8">forEach</text:span><text:span text:style-name="T6">(</text:span><text:span text:style-name="T7">varName</text:span><text:span text:style-name="T6"> </text:span><text:span text:style-name="T5">=&gt;</text:span><text:span text:style-name="T6"> </text:span><text:span text:style-name="T5">this</text:span><text:span text:style-name="T6">[</text:span><text:span text:style-name="T7">varName</text:span><text:span text:style-name="T6">] = </text:span><text:span text:style-name="T7">updatedSource</text:span><text:span text:style-name="T6">[</text:span><text:span text:style-name="T7">varName</text:span><text:span text:style-name="T6">])</text:span></text:p>
      <text:p text:style-name="P33">        <text:span text:style-name="T5">this</text:span><text:span text:style-name="T6">.</text:span><text:span text:style-name="T7">_updated</text:span><text:span text:style-name="T6"> = </text:span><text:span text:style-name="T7">isUpdated</text:span></text:p>
      <text:p text:style-name="P33">    <text:span text:style-name="T6">}</text:span></text:p>
      <text:p text:style-name="P40"/>
      <text:p text:style-name="P33">    <text:span text:style-name="T8">keyChain_</text:span><text:span text:style-name="T6">(</text:span><text:span text:style-name="T7">jsonEntity</text:span><text:span text:style-name="T6">){</text:span></text:p>
      <text:p text:style-name="P33">        <text:span text:style-name="T12">if</text:span><text:span text:style-name="T6"> (</text:span><text:span text:style-name="T7">jsonEntity</text:span><text:span text:style-name="T6">) {</text:span></text:p>
      <text:p text:style-name="P33">            <text:span text:style-name="T5">let</text:span><text:span text:style-name="T6"> </text:span><text:span text:style-name="T7">entityKeys</text:span><text:span text:style-name="T6"> = </text:span><text:span text:style-name="T8">keysOf</text:span><text:span text:style-name="T6">(</text:span><text:span text:style-name="T7">jsonEntity</text:span><text:span text:style-name="T6">);</text:span></text:p>
      <text:p text:style-name="P33">            <text:span text:style-name="T12">if</text:span><text:span text:style-name="T6">(</text:span><text:span text:style-name="T7">jsonEntity</text:span><text:span text:style-name="T6">.</text:span><text:span text:style-name="T7">_isTagMount</text:span><text:span text:style-name="T6">){</text:span></text:p>
      <text:p text:style-name="P33">                <text:span text:style-name="T11">DEVELOPMENT_MODE</text:span><text:span text:style-name="T6">.</text:span><text:span text:style-name="T8">log</text:span><text:span text:style-name="T6">(</text:span><text:span text:style-name="T5">true</text:span><text:span text:style-name="T6">, </text:span><text:span text:style-name="T9">`Received tagMount in jsonEntity, it probably will provoke inconsistences for override attributes of </text:span><text:span text:style-name="T5">${this</text:span><text:span text:style-name="T6">.</text:span><text:span text:style-name="T7">constructor</text:span><text:span text:style-name="T6">.</text:span><text:span text:style-name="T11">name</text:span><text:span text:style-name="T5">}</text:span><text:span text:style-name="T9">. You can call osk_() instead pass the view`</text:span><text:span text:style-name="T6">)</text:span></text:p>
      <text:p text:style-name="P33">                <text:span text:style-name="T5">let</text:span><text:span text:style-name="T6"> </text:span><text:span text:style-name="T7">thisKeys</text:span><text:span text:style-name="T6"> = </text:span><text:span text:style-name="T8">keysOf</text:span><text:span text:style-name="T6">(</text:span><text:span text:style-name="T5">this</text:span><text:span text:style-name="T6">);</text:span></text:p>
      <text:p text:style-name="P33">                <text:span text:style-name="T7">entityKeys</text:span><text:span text:style-name="T6">.</text:span><text:span text:style-name="T8">filter</text:span><text:span text:style-name="T6">(</text:span><text:span text:style-name="T7">key</text:span><text:span text:style-name="T6"> </text:span><text:span text:style-name="T5">=&gt;</text:span><text:span text:style-name="T6"> !</text:span><text:span text:style-name="T7">thisKeys</text:span><text:span text:style-name="T6">.</text:span><text:span text:style-name="T8">includes</text:span><text:span text:style-name="T6">(</text:span><text:span text:style-name="T7">key</text:span><text:span text:style-name="T6">)).</text:span><text:span text:style-name="T8">forEach</text:span><text:span text:style-name="T6">(</text:span><text:span text:style-name="T7">key</text:span><text:span text:style-name="T6"> </text:span><text:span text:style-name="T5">=&gt;</text:span><text:span text:style-name="T6"> {</text:span></text:p>
      <text:p text:style-name="P33">                    <text:span text:style-name="T5">let</text:span><text:span text:style-name="T6"> </text:span><text:span text:style-name="T7">val</text:span><text:span text:style-name="T6"> = </text:span><text:span text:style-name="T7">jsonEntity</text:span><text:span text:style-name="T6">[</text:span><text:span text:style-name="T7">key</text:span><text:span text:style-name="T6">],</text:span></text:p>
      <text:p text:style-name="P33">                        <text:span text:style-name="T7">add</text:span><text:span text:style-name="T6"> = !</text:span><text:span text:style-name="T7">val</text:span><text:span text:style-name="T6">?.</text:span><text:span text:style-name="T7">isTagChild</text:span><text:span text:style-name="T6">;  </text:span></text:p>
      <text:p text:style-name="P33">                    <text:span text:style-name="T12">if</text:span><text:span text:style-name="T6">(</text:span><text:span text:style-name="T7">add</text:span><text:span text:style-name="T6">) </text:span><text:span text:style-name="T5">this</text:span><text:span text:style-name="T6">[</text:span><text:span text:style-name="T7">key</text:span><text:span text:style-name="T6">] = </text:span><text:span text:style-name="T7">val</text:span></text:p>
      <text:p text:style-name="P33">                <text:span text:style-name="T6">})</text:span></text:p>
      <text:p text:style-name="P33">            <text:span text:style-name="T6">}</text:span><text:span text:style-name="T12">else</text:span><text:span text:style-name="T6">{</text:span></text:p>
      <text:p text:style-name="P33">                <text:span text:style-name="T8">overJson</text:span><text:span text:style-name="T6">(</text:span><text:span text:style-name="T7">jsonEntity</text:span><text:span text:style-name="T6">, </text:span><text:span text:style-name="T5">this</text:span><text:span text:style-name="T6">)</text:span></text:p>
      <text:p text:style-name="P33">            <text:span text:style-name="T6">}</text:span></text:p>
      <text:p text:style-name="P33">            <text:span text:style-name="T5">this</text:span><text:span text:style-name="T6">.</text:span><text:span text:style-name="T7">_sourceKeys</text:span><text:span text:style-name="T6"> = </text:span><text:span text:style-name="T5">this</text:span><text:span text:style-name="T6">.</text:span><text:span text:style-name="T7">_sourceKeys</text:span><text:span text:style-name="T6">.</text:span><text:span text:style-name="T8">concat</text:span><text:span text:style-name="T6">(</text:span><text:span text:style-name="T7">entityKeys</text:span><text:span text:style-name="T6">)</text:span></text:p>
      <text:p text:style-name="P33">        <text:span text:style-name="T6">}</text:span></text:p>
      <text:p text:style-name="P33">    <text:span text:style-name="T6">}</text:span></text:p>
      <text:p text:style-name="P40"><text:soft-page-break/></text:p>
      <text:p text:style-name="P33">    <text:span text:style-name="T8">append_</text:span><text:span text:style-name="T6">(</text:span><text:span text:style-name="T7">element</text:span><text:span text:style-name="T6">){</text:span></text:p>
      <text:p text:style-name="P33">        <text:span text:style-name="T7">A_MODE_SOURCE</text:span><text:span text:style-name="T6"> = </text:span><text:span text:style-name="T5">this</text:span></text:p>
      <text:p text:style-name="P33">        <text:span text:style-name="T12">if</text:span><text:span text:style-name="T6">(!</text:span><text:span text:style-name="T5">this</text:span><text:span text:style-name="T6">.</text:span><text:span text:style-name="T7">$view</text:span><text:span text:style-name="T6">) </text:span><text:span text:style-name="T11">A</text:span><text:span text:style-name="T6">.</text:span><text:span text:style-name="T8">div</text:span><text:span text:style-name="T6">(</text:span><text:span text:style-name="T9">'view'</text:span><text:span text:style-name="T6">);</text:span></text:p>
      <text:p text:style-name="P33">        <text:span text:style-name="T5">this</text:span><text:span text:style-name="T6">.</text:span><text:span text:style-name="T7">$view</text:span><text:span text:style-name="T6">.</text:span><text:span text:style-name="T8">a</text:span><text:span text:style-name="T6">(</text:span><text:span text:style-name="T7">element</text:span><text:span text:style-name="T6">)</text:span></text:p>
      <text:p text:style-name="P33">        <text:span text:style-name="T12">return</text:span><text:span text:style-name="T6"> </text:span><text:span text:style-name="T5">this</text:span></text:p>
      <text:p text:style-name="P33">    <text:span text:style-name="T6">} </text:span></text:p>
      <text:p text:style-name="P40"/>
      <text:p text:style-name="P33">    <text:span text:style-name="T8">disapend_</text:span><text:span text:style-name="T6">(... </text:span><text:span text:style-name="T7">elements</text:span><text:span text:style-name="T6">){</text:span></text:p>
      <text:p text:style-name="P33">        <text:span text:style-name="T7">elements</text:span><text:span text:style-name="T6">.</text:span><text:span text:style-name="T7">length</text:span><text:span text:style-name="T6">? </text:span><text:span text:style-name="T8">removeElements</text:span><text:span text:style-name="T6">(</text:span><text:span text:style-name="T5">this</text:span><text:span text:style-name="T6">, </text:span><text:span text:style-name="T7">elements</text:span><text:span text:style-name="T6">) : </text:span><text:span text:style-name="T8">disapend</text:span><text:span text:style-name="T6">(</text:span><text:span text:style-name="T5">this</text:span><text:span text:style-name="T6">)</text:span></text:p>
      <text:p text:style-name="P33">        <text:span text:style-name="T12">return</text:span><text:span text:style-name="T6"> </text:span><text:span text:style-name="T5">this</text:span></text:p>
      <text:p text:style-name="P33">    <text:span text:style-name="T6">}</text:span></text:p>
      <text:p text:style-name="P40"/>
      <text:p text:style-name="P34">}</text:p>
      <text:p text:style-name="P39"/>
      <text:p text:style-name="P30"/>
      <text:p text:style-name="P42">The JView class inherits from JMount and is the basis for creating views.</text:p>
      <text:p text:style-name="P43">Explaining the constructor.</text:p>
      <text:p text:style-name="P43">If a JSON is passed to the constructor, it will be diluted, and the key:value pair will be assimilated by the class that inherits from JView in the format variableName = key and variableValue = value.</text:p>
      <text:p text:style-name="P43">Since this involves "diluting" JSON, passing a view directly to the constructor of another view should be avoided, as this will cause variable name collisions.</text:p>
      <text:p text:style-name="P43">If it is necessary to pass the view in a JSON, for example {myView: view}, this will cause the "dilution" to create a variable called myView with value = view and will not dilute the key:value pairs of the view itself.</text:p>
      <text:p text:style-name="P44"/>
      <text:p text:style-name="P44">Sometimes it's necessary to include a key-value pair related to keys that aren't present initially, and we can do this with includeThisKeys.</text:p>
      <text:p text:style-name="P44"/>
      <text:p text:style-name="P44">Sometimes it's necessary to include a key-value pair related to IDs that aren't present initially, and we can do this with sourceIds.</text:p>
      <text:p text:style-name="P45"/>
      <text:p text:style-name="P46">Explaining the methods.</text:p>
      <text:p text:style-name="P47"/>
      <text:p text:style-name="P47"><text:span text:style-name="T17">aMode_() </text:span>Write permission request for triple assignment purposes.</text:p>
      <text:p text:style-name="P47"/>
      <text:p text:style-name="P48">addSourceKeys_(...keys)</text:p>
      <text:p text:style-name="P47">Generates a JSON based on the JSON passed in the constructor plus the keys specified in the keys parameter.</text:p>
      <text:p text:style-name="P47">In a subsequent request, the keys do not need to be specified.</text:p>
      <text:p text:style-name="P47">These keys correspond to variables with the same name existing in the class, whose origin occurred in the dilution of the original JSON passed in the constructor.</text:p>
      <text:p text:style-name="P47">If the variable is not found, the key will receive the value undefined.</text:p>
      <text:p text:style-name="P47"/>
      <text:p text:style-name="P47"><text:span text:style-name="T18">ask_</text:span> = addSourceKeys_ <text:span text:style-name="T19">it</text:span></text:p>
      <text:p text:style-name="P47"/>
      <text:p text:style-name="P47"><text:span text:style-name="T18">overSourceKeys_</text:span>(...keys)</text:p>
      <text:p text:style-name="P47">Generates a JSON based on the JSON that was passed in the constructor or in the keys parameter.</text:p>
      <text:p text:style-name="P47">These keys correspond to variables with the same name existing in the class whose origin occurred in the dilution of the original JSON passed in the constructor.</text:p>
      <text:p text:style-name="P47"/>
      <text:p text:style-name="P47">If the variable is not found, the key will receive the value undefined.</text:p>
      <text:p text:style-name="P47"><text:soft-page-break/></text:p>
      <text:p text:style-name="P47"><text:span text:style-name="T20">o</text:span><text:span text:style-name="T18">sk_</text:span> = overSourceKeys_</text:p>
      <text:p text:style-name="P47"/>
      <text:p text:style-name="P49"><text:span text:style-name="T18">overSourceKeysPlus_</text:span>(...keys)</text:p>
      <text:p text:style-name="P50">Generates a JSON based on the JSON passed in the constructor plus the keys specified in the `keys` parameter.</text:p>
      <text:p text:style-name="P50">In a subsequent request, the keys must be provided;</text:p>
      <text:p text:style-name="P50"/>
      <text:p text:style-name="P50">These keys correspond to variables with the same name existing in the class, whose origin occurred in the dilution of the original JSON passed in the constructor.</text:p>
      <text:p text:style-name="P50">If the variable is not found, the key will receive the value `undefined`.</text:p>
      <text:p text:style-name="P50"/>
      <text:p text:style-name="P49"><text:span text:style-name="T18">psk_</text:span> = overSourceKeysPlus</text:p>
      <text:p text:style-name="P49"/>
      <text:p text:style-name="P49"><text:span text:style-name="T18">innerAnchor_</text:span>(elementAnchor, elementName)</text:p>
      <text:p text:style-name="P49">Assigns an ID to the elementAnchor(element html) taking into account the elementName (String).</text:p>
      <text:p text:style-name="P49"/>
      <text:p text:style-name="P49"><text:span text:style-name="T18">defClasses_</text:span>(…classes)</text:p>
      <text:p text:style-name="P49">Define "inspectable" classes for an HTML element.</text:p>
      <text:p text:style-name="P49"/>
      <text:p text:style-name="P51"><text:span text:style-name="T18">insertClasses_</text:span>(element, classes)</text:p>
      <text:p text:style-name="P51">Adds "inspectable" classes to the HTML element.</text:p>
      <text:p text:style-name="P51"/>
      <text:p text:style-name="P51"><text:span text:style-name="T18">removeClasses_</text:span>(element, classes)</text:p>
      <text:p text:style-name="P51">Removes “inspectable” classes from the html element.</text:p>
      <text:p text:style-name="P51"/>
      <text:p text:style-name="P51"><text:span text:style-name="T18">viewValues_</text:span>(fromUpdate, … addVarKeys)</text:p>
      <text:p text:style-name="P51">Generates a JSON based on the JSON passed in the constructor and includes the keys passed in addVarKeys.</text:p>
      <text:p text:style-name="P51">If fromUpdate = true, the JSON includes the input values ​​of type update (inputUpdateVarname).</text:p>
      <text:p text:style-name="P51">If fromUpdate = false, the JSON includes the values ​​of existing entries in the view that are not of type update.</text:p>
      <text:p text:style-name="P51">In both cases, try to check if the view fields are already updated.</text:p>
      <text:p text:style-name="P52"/>
      <text:p text:style-name="P52"><text:span text:style-name="T18">isUpdated_</text:span>()</text:p>
      <text:p text:style-name="P52">It should be executed after viewValues ​​is invoked; it checks if the view fields are already updated, potentially preventing an unnecessary request to the server.</text:p>
      <text:p text:style-name="P52"/>
      <text:p text:style-name="P52"><text:span text:style-name="T18">updateView</text:span>(updateSource, isUpdated=true)</text:p>
      <text:p text:style-name="P52">Populates the view based on the updateSource JSON, typically received as a response to a request.</text:p>
      <text:p text:style-name="P53"><text:span text:style-name="T17">updateSource</text:span>: JSON received in response to the request.</text:p>
      <text:p text:style-name="P52"><text:span text:style-name="T21">i</text:span><text:span text:style-name="T17">sUpdated</text:span>: The default is true; if false is entered, the view remains with the status of not updated.</text:p>
      <text:p text:style-name="P54"/>
      <text:p text:style-name="P55"><text:span text:style-name="T18">keyChain_</text:span>(jsonEntity)</text:p>
      <text:p text:style-name="P55">Perform integrity checks, as passing a view directly to the constructor of another view causes inconsistencies.</text:p>
      <text:p text:style-name="P55">If it is necessary to pass the view in a JSON, for example: {viewName: desiredView}. This will cause only the viewName key to be diluted.</text:p>
      <text:p text:style-name="P55"/>
      <text:p text:style-name="P55">If you pass the desiredView directly to the constructor, there will be attribute overwriting, which will cause inconsistencies in the application.</text:p>
      <text:p text:style-name="P55"/>
      <text:p text:style-name="P56"><text:soft-page-break/><text:span text:style-name="T18">append_</text:span>(element)</text:p>
      <text:p text:style-name="P56">Adds an HTML element to the view.</text:p>
      <text:p text:style-name="P56"/>
      <text:p text:style-name="P56"><text:span text:style-name="T18">disapend_</text:span>(...elements)</text:p>
      <text:p text:style-name="P57">elements: list of HTML elements.</text:p>
      <text:p text:style-name="P58">If <text:span text:style-name="T17">elements</text:span> are specified, they will be detached from the view.</text:p>
      <text:p text:style-name="P58">If <text:span text:style-name="T17">elements</text:span> are not specified, the view itself is detached.</text:p>
      <text:p text:style-name="P58">If you specify an element that does not belong to the view, it will cause an error.</text:p>
      <text:p text:style-name="P59"/>
      <text:p text:style-name="P59"/>
      <text:p text:style-name="P60"><text:span text:style-name="T3">class</text:span> <text:span text:style-name="T4">ViewInitialize</text:span> <text:span text:style-name="T3">extends</text:span> <text:span text:style-name="T4">JView</text:span>{</text:p>
      <text:p text:style-name="P33">    </text:p>
      <text:p text:style-name="P33">    <text:span text:style-name="T5">static</text:span><text:span text:style-name="T6"> </text:span><text:span text:style-name="T7">MENU</text:span><text:span text:style-name="T6"> = </text:span><text:span text:style-name="T9">'menu'</text:span></text:p>
      <text:p text:style-name="P33">    <text:span text:style-name="T5">static</text:span><text:span text:style-name="T6"> </text:span><text:span text:style-name="T7">NAVIGATION</text:span><text:span text:style-name="T6"> = </text:span><text:span text:style-name="T9">'navigation'</text:span></text:p>
      <text:p text:style-name="P33">    <text:span text:style-name="T5">static</text:span><text:span text:style-name="T6"> </text:span><text:span text:style-name="T7">CONTENT</text:span><text:span text:style-name="T6"> = </text:span><text:span text:style-name="T9">'content'</text:span></text:p>
      <text:p text:style-name="P33">    <text:span text:style-name="T5">static</text:span><text:span text:style-name="T6"> </text:span><text:span text:style-name="T7">FOOTER</text:span><text:span text:style-name="T6"> = </text:span><text:span text:style-name="T9">'footer'</text:span></text:p>
      <text:p text:style-name="P40"/>
      <text:p text:style-name="P33">    <text:span text:style-name="T5">constructor</text:span><text:span text:style-name="T6">(... </text:span><text:span text:style-name="T7">notIncludeDivs</text:span><text:span text:style-name="T6">){</text:span></text:p>
      <text:p text:style-name="P33">        <text:span text:style-name="T5">super</text:span><text:span text:style-name="T6">({</text:span><text:span text:style-name="T7">notIncludeDivs:</text:span><text:span text:style-name="T6"> </text:span><text:span text:style-name="T8">arrayInSpread</text:span><text:span text:style-name="T6">(</text:span><text:span text:style-name="T7">notIncludeDivs</text:span><text:span text:style-name="T6">)}).</text:span><text:span text:style-name="T8">mount_</text:span><text:span text:style-name="T6">()</text:span></text:p>
      <text:p text:style-name="P33">    <text:span text:style-name="T6">}</text:span></text:p>
      <text:p text:style-name="P40"/>
      <text:p text:style-name="P33">    <text:span text:style-name="T8">_init</text:span><text:span text:style-name="T6">(){</text:span></text:p>
      <text:p text:style-name="P33">        <text:span text:style-name="T5">let</text:span><text:span text:style-name="T6"> </text:span><text:span text:style-name="T7">elementOptions</text:span><text:span text:style-name="T6"> = [</text:span><text:span text:style-name="T9">'menu'</text:span><text:span text:style-name="T6">, </text:span><text:span text:style-name="T9">'navigation'</text:span><text:span text:style-name="T6">, </text:span><text:span text:style-name="T9">'content'</text:span><text:span text:style-name="T6">, </text:span><text:span text:style-name="T9">'footer'</text:span><text:span text:style-name="T6">];</text:span></text:p>
      <text:p text:style-name="P33">        <text:span text:style-name="T7">elementOptions</text:span><text:span text:style-name="T6">.</text:span><text:span text:style-name="T8">filter</text:span><text:span text:style-name="T6">(</text:span><text:span text:style-name="T7">eOption</text:span><text:span text:style-name="T6"> </text:span><text:span text:style-name="T5">=&gt;</text:span><text:span text:style-name="T6"> !(</text:span><text:span text:style-name="T5">this</text:span><text:span text:style-name="T6">.</text:span><text:span text:style-name="T7">notIncludeDivs</text:span><text:span text:style-name="T6">.</text:span><text:span text:style-name="T8">includes</text:span><text:span text:style-name="T6">(</text:span><text:span text:style-name="T7">eOption</text:span><text:span text:style-name="T6">)))</text:span></text:p>
      <text:p text:style-name="P33">            <text:span text:style-name="T6">.</text:span><text:span text:style-name="T8">map</text:span><text:span text:style-name="T6">(</text:span><text:span text:style-name="T7">eOption</text:span><text:span text:style-name="T6"> </text:span><text:span text:style-name="T5">=&gt;</text:span><text:span text:style-name="T6"> </text:span><text:span text:style-name="T11">A</text:span><text:span text:style-name="T6">.</text:span><text:span text:style-name="T8">div</text:span><text:span text:style-name="T6">(</text:span><text:span text:style-name="T7">eOption</text:span><text:span text:style-name="T6">))</text:span></text:p>
      <text:p text:style-name="P33">            <text:span text:style-name="T6">.</text:span><text:span text:style-name="T8">forEach</text:span><text:span text:style-name="T6">(</text:span><text:span text:style-name="T7">aElement</text:span><text:span text:style-name="T6"> </text:span><text:span text:style-name="T5">=&gt;</text:span><text:span text:style-name="T6"> </text:span><text:span text:style-name="T7">document</text:span><text:span text:style-name="T6">.</text:span><text:span text:style-name="T7">body</text:span><text:span text:style-name="T6">.</text:span><text:span text:style-name="T8">a</text:span><text:span text:style-name="T6">(</text:span><text:span text:style-name="T7">aElement</text:span><text:span text:style-name="T6">))</text:span></text:p>
      <text:p text:style-name="P33">    <text:span text:style-name="T6">}</text:span></text:p>
      <text:p text:style-name="P40"/>
      <text:p text:style-name="P33">    <text:span text:style-name="T8">setViewMenu</text:span><text:span text:style-name="T6">(</text:span><text:span text:style-name="T7">viewMenu</text:span><text:span text:style-name="T6">){</text:span></text:p>
      <text:p text:style-name="P33">        <text:span text:style-name="T5">this</text:span><text:span text:style-name="T6">.</text:span><text:span text:style-name="T8">_setObjectView</text:span><text:span text:style-name="T6">(</text:span><text:span text:style-name="T7">viewMenu</text:span><text:span text:style-name="T6">, </text:span><text:span text:style-name="T16">ViewInitialize</text:span><text:span text:style-name="T6">.</text:span><text:span text:style-name="T7">MENU</text:span><text:span text:style-name="T6">)</text:span></text:p>
      <text:p text:style-name="P33">    <text:span text:style-name="T6">}</text:span></text:p>
      <text:p text:style-name="P40"/>
      <text:p text:style-name="P33">    <text:span text:style-name="T8">setViewNavigation</text:span><text:span text:style-name="T6">(</text:span><text:span text:style-name="T7">viewNavigation</text:span><text:span text:style-name="T6">){</text:span></text:p>
      <text:p text:style-name="P33">        <text:span text:style-name="T5">this</text:span><text:span text:style-name="T6">.</text:span><text:span text:style-name="T8">_setObjectView</text:span><text:span text:style-name="T6">(</text:span><text:span text:style-name="T7">viewNavigation</text:span><text:span text:style-name="T6">, </text:span><text:span text:style-name="T16">ViewInitialize</text:span><text:span text:style-name="T6">.</text:span><text:span text:style-name="T7">NAVIGATION</text:span><text:span text:style-name="T6">)</text:span></text:p>
      <text:p text:style-name="P33">    <text:span text:style-name="T6">}</text:span></text:p>
      <text:p text:style-name="P40"/>
      <text:p text:style-name="P33">    <text:span text:style-name="T8">setViewContent</text:span><text:span text:style-name="T6">(</text:span><text:span text:style-name="T7">viewContent</text:span><text:span text:style-name="T6">){</text:span></text:p>
      <text:p text:style-name="P33">        <text:span text:style-name="T5">this</text:span><text:span text:style-name="T6">.</text:span><text:span text:style-name="T8">_setObjectView</text:span><text:span text:style-name="T6">(</text:span><text:span text:style-name="T7">viewContent</text:span><text:span text:style-name="T6">, </text:span><text:span text:style-name="T16">ViewInitialize</text:span><text:span text:style-name="T6">.</text:span><text:span text:style-name="T7">CONTENT</text:span><text:span text:style-name="T6">)</text:span></text:p>
      <text:p text:style-name="P33">    <text:span text:style-name="T6">}</text:span></text:p>
      <text:p text:style-name="P40"/>
      <text:p text:style-name="P33">    <text:span text:style-name="T8">setViewFooter</text:span><text:span text:style-name="T6">(</text:span><text:span text:style-name="T7">viewFooter</text:span><text:span text:style-name="T6">){</text:span></text:p>
      <text:p text:style-name="P33">        <text:span text:style-name="T5">this</text:span><text:span text:style-name="T6">.</text:span><text:span text:style-name="T8">_setObjectView</text:span><text:span text:style-name="T6">(</text:span><text:span text:style-name="T7">viewFooter</text:span><text:span text:style-name="T6">, </text:span><text:span text:style-name="T16">ViewInitialize</text:span><text:span text:style-name="T6">.</text:span><text:span text:style-name="T7">FOOTER</text:span><text:span text:style-name="T6">)</text:span></text:p>
      <text:p text:style-name="P33">    <text:span text:style-name="T6">}</text:span></text:p>
      <text:p text:style-name="P40"/>
      <text:p text:style-name="P33">    <text:span text:style-name="T8">getViewMenu</text:span><text:span text:style-name="T6">(){</text:span><text:span text:style-name="T12">return</text:span><text:span text:style-name="T6"> </text:span><text:span text:style-name="T5">this</text:span><text:span text:style-name="T6">.</text:span><text:span text:style-name="T7">viewMenu</text:span><text:span text:style-name="T6">}</text:span></text:p>
      <text:p text:style-name="P40"/>
      <text:p text:style-name="P33">    <text:span text:style-name="T8">getViewNavigation</text:span><text:span text:style-name="T6">(){ </text:span><text:span text:style-name="T12">return</text:span><text:span text:style-name="T6"> </text:span><text:span text:style-name="T5">this</text:span><text:span text:style-name="T6">.</text:span><text:span text:style-name="T7">viewNavigation</text:span><text:span text:style-name="T6">}</text:span></text:p>
      <text:p text:style-name="P40"/>
      <text:p text:style-name="P33">    <text:span text:style-name="T8">getViewContent</text:span><text:span text:style-name="T6">(){ </text:span><text:span text:style-name="T12">return</text:span><text:span text:style-name="T6"> </text:span><text:span text:style-name="T5">this</text:span><text:span text:style-name="T6">.</text:span><text:span text:style-name="T7">viewContent</text:span><text:span text:style-name="T6">}</text:span></text:p>
      <text:p text:style-name="P40"/>
      <text:p text:style-name="P33">    <text:span text:style-name="T8">getViewFooter</text:span><text:span text:style-name="T6">(){</text:span><text:span text:style-name="T12">return</text:span><text:span text:style-name="T6"> </text:span><text:span text:style-name="T5">this</text:span><text:span text:style-name="T6">.</text:span><text:span text:style-name="T7">viewFooter</text:span><text:span text:style-name="T6">}</text:span></text:p>
      <text:p text:style-name="P40"><text:soft-page-break/></text:p>
      <text:p text:style-name="P33">    <text:span text:style-name="T8">clearDivMenu</text:span><text:span text:style-name="T6">(){ </text:span><text:span text:style-name="T8">removeChildren</text:span><text:span text:style-name="T6">(</text:span><text:span text:style-name="T5">this</text:span><text:span text:style-name="T6">.</text:span><text:span text:style-name="T7">$menu</text:span><text:span text:style-name="T6">)}</text:span></text:p>
      <text:p text:style-name="P40"/>
      <text:p text:style-name="P33">    <text:span text:style-name="T8">clearDivNavigation</text:span><text:span text:style-name="T6">(){ </text:span><text:span text:style-name="T8">removeChildren</text:span><text:span text:style-name="T6">(</text:span><text:span text:style-name="T5">this</text:span><text:span text:style-name="T6">.</text:span><text:span text:style-name="T7">$navigation</text:span><text:span text:style-name="T6">)}</text:span></text:p>
      <text:p text:style-name="P40"/>
      <text:p text:style-name="P33">    <text:span text:style-name="T8">clearDivContent</text:span><text:span text:style-name="T6">(){ </text:span><text:span text:style-name="T8">removeChildren</text:span><text:span text:style-name="T6">(</text:span><text:span text:style-name="T5">this</text:span><text:span text:style-name="T6">.</text:span><text:span text:style-name="T7">$content</text:span><text:span text:style-name="T6">)}</text:span></text:p>
      <text:p text:style-name="P40"/>
      <text:p text:style-name="P33">    <text:span text:style-name="T8">clearDivFooter</text:span><text:span text:style-name="T6">() {</text:span><text:span text:style-name="T8">removeChildren</text:span><text:span text:style-name="T6">(</text:span><text:span text:style-name="T5">this</text:span><text:span text:style-name="T6">.</text:span><text:span text:style-name="T7">$footer</text:span><text:span text:style-name="T6">)}</text:span></text:p>
      <text:p text:style-name="P40"/>
      <text:p text:style-name="P33">    <text:span text:style-name="T8">disapendDivMenu</text:span><text:span text:style-name="T6">(){</text:span><text:span text:style-name="T8">disapend</text:span><text:span text:style-name="T6">(</text:span><text:span text:style-name="T5">this</text:span><text:span text:style-name="T6">.</text:span><text:span text:style-name="T7">$menu</text:span><text:span text:style-name="T6">)}</text:span></text:p>
      <text:p text:style-name="P40"/>
      <text:p text:style-name="P33">    <text:span text:style-name="T8">disapendDivNavigation</text:span><text:span text:style-name="T6">(){</text:span><text:span text:style-name="T8">disapend</text:span><text:span text:style-name="T6">(</text:span><text:span text:style-name="T5">this</text:span><text:span text:style-name="T6">.</text:span><text:span text:style-name="T7">$navigation</text:span><text:span text:style-name="T6">)}</text:span></text:p>
      <text:p text:style-name="P40"/>
      <text:p text:style-name="P33">    <text:span text:style-name="T8">disapendDivContent</text:span><text:span text:style-name="T6">(){</text:span><text:span text:style-name="T8">disapend</text:span><text:span text:style-name="T6">(</text:span><text:span text:style-name="T5">this</text:span><text:span text:style-name="T6">.</text:span><text:span text:style-name="T7">$content</text:span><text:span text:style-name="T6">)}</text:span></text:p>
      <text:p text:style-name="P40"/>
      <text:p text:style-name="P33">    <text:span text:style-name="T8">disapendDivFooter</text:span><text:span text:style-name="T6">(){</text:span><text:span text:style-name="T8">disapend</text:span><text:span text:style-name="T6">(</text:span><text:span text:style-name="T5">this</text:span><text:span text:style-name="T6">.</text:span><text:span text:style-name="T7">$footer</text:span><text:span text:style-name="T6">)}</text:span></text:p>
      <text:p text:style-name="P61"/>
      <text:p text:style-name="P33">    <text:span text:style-name="T8">_setObjectView</text:span><text:span text:style-name="T6">(</text:span><text:span text:style-name="T7">view</text:span><text:span text:style-name="T6">, </text:span><text:span text:style-name="T7">elementName</text:span><text:span text:style-name="T6">){</text:span></text:p>
      <text:p text:style-name="P33">        <text:span text:style-name="T5">let</text:span><text:span text:style-name="T6"> </text:span><text:span text:style-name="T7">element</text:span><text:span text:style-name="T6"> = </text:span><text:span text:style-name="T5">this</text:span><text:span text:style-name="T6">[</text:span><text:span text:style-name="T9">'$'</text:span><text:span text:style-name="T6">+</text:span><text:span text:style-name="T7">elementName</text:span><text:span text:style-name="T6">];</text:span></text:p>
      <text:p text:style-name="P33">        <text:span text:style-name="T8">removeChildren</text:span><text:span text:style-name="T6">(</text:span><text:span text:style-name="T7">element</text:span><text:span text:style-name="T6">)</text:span></text:p>
      <text:p text:style-name="P33">        <text:span text:style-name="T7">element</text:span><text:span text:style-name="T6">.</text:span><text:span text:style-name="T8">a</text:span><text:span text:style-name="T6">(</text:span><text:span text:style-name="T7">view</text:span><text:span text:style-name="T6">)</text:span></text:p>
      <text:p text:style-name="P33">        <text:span text:style-name="T5">this</text:span><text:span text:style-name="T6">[</text:span><text:span text:style-name="T9">'view'</text:span><text:span text:style-name="T6">+</text:span><text:span text:style-name="T7">elementName</text:span><text:span text:style-name="T6">[</text:span><text:span text:style-name="T13">0</text:span><text:span text:style-name="T6">].</text:span><text:span text:style-name="T8">toUpperCase</text:span><text:span text:style-name="T6">()+</text:span><text:span text:style-name="T7">elementName</text:span><text:span text:style-name="T6">.</text:span><text:span text:style-name="T8">substring</text:span><text:span text:style-name="T6">(</text:span><text:span text:style-name="T13">1</text:span><text:span text:style-name="T6">)] = </text:span><text:span text:style-name="T7">view</text:span></text:p>
      <text:p text:style-name="P33">    <text:span text:style-name="T6">}</text:span></text:p>
      <text:p text:style-name="P34">}</text:p>
      <text:p text:style-name="P59"/>
      <text:p text:style-name="P62"/>
      <text:p text:style-name="P63">Explaining the constructor</text:p>
      <text:p text:style-name="P56">constructor(...notIncludeDivs)</text:p>
      <text:p text:style-name="P56"><text:span text:style-name="T17">notIncludeDivs</text:span><text:span text:style-name="T22">:</text:span> receives the strings menu, navigation, content and footer.</text:p>
      <text:p text:style-name="P56">If one of these strings is provided, the corresponding div is not created. Remember that any divs that are created will be created with triple assignment.</text:p>
      <text:p text:style-name="P56"/>
      <text:p text:style-name="P56">Explaining the methods.</text:p>
      <text:p text:style-name="P56"/>
      <text:p text:style-name="P56"><text:span text:style-name="T18">setViewMenu</text:span>(viewMenu)</text:p>
      <text:p text:style-name="P56">Inserts a view into the $menu div.</text:p>
      <text:p text:style-name="P56"/>
      <text:p text:style-name="P64"><text:span text:style-name="T18">setViewNavigation</text:span>(viewNavigation)</text:p>
      <text:p text:style-name="P64">Inserts a view into the $navigation div.</text:p>
      <text:p text:style-name="P64"/>
      <text:p text:style-name="P64"><text:span text:style-name="T18">setViewContent</text:span>(viewContent)</text:p>
      <text:p text:style-name="P64">Inserts a view into the $content div.</text:p>
      <text:p text:style-name="P64"/>
      <text:p text:style-name="P64"><text:span text:style-name="T18">setViewFooter</text:span>(viewFooter)</text:p>
      <text:p text:style-name="P50">Inserts a view into the $footer div.</text:p>
      <text:p text:style-name="P50"/>
      <text:p text:style-name="P64">The other methods do what the method name says.</text:p>
      <text:p text:style-name="P65"/>
      <text:p text:style-name="P66"><text:span text:style-name="T3">class</text:span> <text:span text:style-name="T4">Enderessable</text:span>{</text:p>
      <text:p text:style-name="P33">    <text:span text:style-name="T5">constructor</text:span><text:span text:style-name="T6">(</text:span><text:span text:style-name="T7">enderesableSource</text:span><text:span text:style-name="T6">){</text:span></text:p>
      <text:p text:style-name="P33"><text:soft-page-break/>        <text:span text:style-name="T5">this</text:span><text:span text:style-name="T6">.</text:span><text:span text:style-name="T7">apiBase</text:span><text:span text:style-name="T6"> = </text:span><text:span text:style-name="T7">enderesableSource</text:span><text:span text:style-name="T6">.</text:span><text:span text:style-name="T7">apiBase</text:span></text:p>
      <text:p text:style-name="P33">        <text:span text:style-name="T5">this</text:span><text:span text:style-name="T6">.</text:span><text:span text:style-name="T7">urlDest</text:span><text:span text:style-name="T6"> = </text:span><text:span text:style-name="T8">encodeURI</text:span><text:span text:style-name="T6">(</text:span><text:span text:style-name="T7">enderesableSource</text:span><text:span text:style-name="T6">.</text:span><text:span text:style-name="T7">urlDest</text:span><text:span text:style-name="T6"> || </text:span><text:span text:style-name="T7">enderesableSource</text:span><text:span text:style-name="T6">)</text:span></text:p>
      <text:p text:style-name="P33">        <text:span text:style-name="T5">this</text:span><text:span text:style-name="T6">.</text:span><text:span text:style-name="T7">onconnectionerror</text:span><text:span text:style-name="T6"> = </text:span><text:span text:style-name="T5">this</text:span><text:span text:style-name="T6">.</text:span><text:span text:style-name="T7">apiBase</text:span><text:span text:style-name="T6">?.</text:span><text:span text:style-name="T7">onconnectionerror</text:span></text:p>
      <text:p text:style-name="P33">    <text:span text:style-name="T6">}</text:span></text:p>
      <text:p text:style-name="P40"/>
      <text:p text:style-name="P33">    <text:span text:style-name="T8">isAPIBase</text:span><text:span text:style-name="T6">(){</text:span></text:p>
      <text:p text:style-name="P33">        <text:span text:style-name="T12">return</text:span><text:span text:style-name="T6"> !!</text:span><text:span text:style-name="T5">this</text:span><text:span text:style-name="T6">.</text:span><text:span text:style-name="T7">apiBase</text:span></text:p>
      <text:p text:style-name="P33">    <text:span text:style-name="T6">}</text:span></text:p>
      <text:p text:style-name="P34">}</text:p>
      <text:p text:style-name="P65"/>
      <text:p text:style-name="P67">Explaining the constructor</text:p>
      <text:p text:style-name="P68">constructor(enderessableSource)</text:p>
      <text:p text:style-name="P68"><text:span text:style-name="T23">enderessableSource</text:span>: It can be a URL in string format or an object that extends APIBase.</text:p>
      <text:p text:style-name="P69"/>
      <text:p text:style-name="P69"/>
      <text:p text:style-name="P66"><text:span text:style-name="T3">class</text:span> <text:span text:style-name="T4">APIBase</text:span>{</text:p>
      <text:p text:style-name="P33">    <text:span text:style-name="T5">static</text:span><text:span text:style-name="T6"> </text:span><text:span text:style-name="T7">AUTH_PREFIX</text:span><text:span text:style-name="T6"> = </text:span><text:span text:style-name="T9">'Bearer '</text:span></text:p>
      <text:p text:style-name="P33">    <text:span text:style-name="T5">static</text:span><text:span text:style-name="T6"> </text:span><text:span text:style-name="T7">AUTH_TOKEN_PATH</text:span><text:span text:style-name="T6"> = [</text:span><text:span text:style-name="T9">'token'</text:span><text:span text:style-name="T6">]</text:span></text:p>
      <text:p text:style-name="P40"/>
      <text:p text:style-name="P33">    <text:span text:style-name="T5">constructor</text:span><text:span text:style-name="T6">(</text:span><text:span text:style-name="T7">urlBase</text:span><text:span text:style-name="T6">){</text:span></text:p>
      <text:p text:style-name="P33">        <text:span text:style-name="T5">this</text:span><text:span text:style-name="T6">.</text:span><text:span text:style-name="T7">urlBase</text:span><text:span text:style-name="T6"> = </text:span><text:span text:style-name="T7">urlBase</text:span><text:span text:style-name="T6">.</text:span><text:span text:style-name="T8">replace</text:span><text:span text:style-name="T6">(</text:span><text:span text:style-name="T14">/</text:span><text:span text:style-name="T9">([^</text:span><text:span text:style-name="T15">\/</text:span><text:span text:style-name="T9">])</text:span><text:span text:style-name="T15">\/+</text:span><text:span text:style-name="T8">$</text:span><text:span text:style-name="T14">/</text:span><text:span text:style-name="T6">, </text:span><text:span text:style-name="T9">'$1'</text:span><text:span text:style-name="T6">)</text:span></text:p>
      <text:p text:style-name="P33">    <text:span text:style-name="T6">}</text:span></text:p>
      <text:p text:style-name="P40"/>
      <text:p text:style-name="P33">    <text:span text:style-name="T8">onconnectionerror</text:span><text:span text:style-name="T6">(){</text:span><text:span text:style-name="T8">alert</text:span><text:span text:style-name="T6">(</text:span><text:span text:style-name="T9">'Connection error...'</text:span><text:span text:style-name="T6">)}</text:span></text:p>
      <text:p text:style-name="P40"/>
      <text:p text:style-name="P33">    <text:span text:style-name="T8">getToken</text:span><text:span text:style-name="T6"> = </text:span><text:span text:style-name="T7">_</text:span><text:span text:style-name="T6"> </text:span><text:span text:style-name="T5">=&gt;</text:span><text:span text:style-name="T6"> </text:span><text:span text:style-name="T5">this</text:span><text:span text:style-name="T6">.</text:span><text:span text:style-name="T8">getInfo</text:span><text:span text:style-name="T6">(</text:span><text:span text:style-name="T9">'token'</text:span><text:span text:style-name="T6">)</text:span></text:p>
      <text:p text:style-name="P33">    <text:span text:style-name="T8">setToken</text:span><text:span text:style-name="T6"> = </text:span><text:span text:style-name="T7">token</text:span><text:span text:style-name="T6"> </text:span><text:span text:style-name="T5">=&gt;</text:span><text:span text:style-name="T6"> </text:span><text:span text:style-name="T5">this</text:span><text:span text:style-name="T6">.</text:span><text:span text:style-name="T8">setInfo</text:span><text:span text:style-name="T6">(</text:span><text:span text:style-name="T9">'token'</text:span><text:span text:style-name="T6">, </text:span><text:span text:style-name="T7">token</text:span><text:span text:style-name="T6">)</text:span></text:p>
      <text:p text:style-name="P33">    <text:span text:style-name="T8">removeToken</text:span><text:span text:style-name="T6"> = </text:span><text:span text:style-name="T7">_</text:span><text:span text:style-name="T6"> </text:span><text:span text:style-name="T5">=&gt;</text:span><text:span text:style-name="T6"> </text:span><text:span text:style-name="T5">this</text:span><text:span text:style-name="T6">.</text:span><text:span text:style-name="T8">removeInfo</text:span><text:span text:style-name="T6">(</text:span><text:span text:style-name="T9">'token'</text:span><text:span text:style-name="T6">)</text:span></text:p>
      <text:p text:style-name="P34"/>
      <text:p text:style-name="P40"/>
      <text:p text:style-name="P33">    <text:span text:style-name="T8">getUser</text:span><text:span text:style-name="T6"> = </text:span><text:span text:style-name="T7">_</text:span><text:span text:style-name="T6"> </text:span><text:span text:style-name="T5">=&gt;</text:span><text:span text:style-name="T6"> </text:span><text:span text:style-name="T7">JSON</text:span><text:span text:style-name="T6">.</text:span><text:span text:style-name="T8">parse</text:span><text:span text:style-name="T6">(</text:span><text:span text:style-name="T5">this</text:span><text:span text:style-name="T6">.</text:span><text:span text:style-name="T8">getInfo</text:span><text:span text:style-name="T6">(</text:span><text:span text:style-name="T9">'user'</text:span><text:span text:style-name="T6">))</text:span></text:p>
      <text:p text:style-name="P33">    <text:span text:style-name="T8">setUser</text:span><text:span text:style-name="T6"> = </text:span><text:span text:style-name="T7">user</text:span><text:span text:style-name="T6"> </text:span><text:span text:style-name="T5">=&gt;</text:span><text:span text:style-name="T6"> </text:span><text:span text:style-name="T5">this</text:span><text:span text:style-name="T6">.</text:span><text:span text:style-name="T8">setInfo</text:span><text:span text:style-name="T6">(</text:span><text:span text:style-name="T9">'user'</text:span><text:span text:style-name="T6">, </text:span><text:span text:style-name="T7">JSON</text:span><text:span text:style-name="T6">.</text:span><text:span text:style-name="T8">stringify</text:span><text:span text:style-name="T6">(</text:span><text:span text:style-name="T7">user</text:span><text:span text:style-name="T6">))</text:span></text:p>
      <text:p text:style-name="P33">    <text:span text:style-name="T8">removeUser</text:span><text:span text:style-name="T6"> = </text:span><text:span text:style-name="T7">_</text:span><text:span text:style-name="T6"> </text:span><text:span text:style-name="T5">=&gt;</text:span><text:span text:style-name="T6"> {</text:span></text:p>
      <text:p text:style-name="P33">        <text:span text:style-name="T5">let</text:span><text:span text:style-name="T6"> </text:span><text:span text:style-name="T7">codLang</text:span><text:span text:style-name="T6"> = </text:span><text:span text:style-name="T7">localStorage</text:span><text:span text:style-name="T6">.</text:span><text:span text:style-name="T8">getItem</text:span><text:span text:style-name="T6">(</text:span><text:span text:style-name="T9">'cod_lang'</text:span><text:span text:style-name="T6">);</text:span></text:p>
      <text:p text:style-name="P33">        <text:span text:style-name="T7">localStorage</text:span><text:span text:style-name="T6">.</text:span><text:span text:style-name="T8">clear</text:span><text:span text:style-name="T6">()</text:span></text:p>
      <text:p text:style-name="P70">        <text:span text:style-name="T7">codLang</text:span><text:span text:style-name="T24"> </text:span><text:span text:style-name="T25">&amp;&amp;</text:span><text:span text:style-name="T24"> </text:span><text:span text:style-name="T7">localStorage</text:span><text:span text:style-name="T6">.</text:span><text:span text:style-name="T8">setItem</text:span><text:span text:style-name="T6">(</text:span><text:span text:style-name="T9">'cod_lang'</text:span><text:span text:style-name="T6">, </text:span><text:span text:style-name="T7">codLang</text:span><text:span text:style-name="T6">)</text:span></text:p>
      <text:p text:style-name="P33">    <text:span text:style-name="T6">}</text:span></text:p>
      <text:p text:style-name="P40"/>
      <text:p text:style-name="P33">    <text:span text:style-name="T8">toResource</text:span><text:span text:style-name="T6">(</text:span><text:span text:style-name="T7">resource</text:span><text:span text:style-name="T6">, </text:span><text:span text:style-name="T7">fragment</text:span><text:span text:style-name="T6">){</text:span></text:p>
      <text:p text:style-name="P33">        <text:span text:style-name="T12">if</text:span><text:span text:style-name="T6">(</text:span><text:span text:style-name="T7">resource</text:span><text:span text:style-name="T6"> &amp;&amp; </text:span><text:span text:style-name="T5">typeof</text:span><text:span text:style-name="T6"> </text:span><text:span text:style-name="T7">resource</text:span><text:span text:style-name="T6"> != </text:span><text:span text:style-name="T9">'string'</text:span><text:span text:style-name="T6">) </text:span><text:span text:style-name="T12">throw</text:span><text:span text:style-name="T6"> </text:span><text:span text:style-name="T9">`type of argument resource is inválid: </text:span><text:span text:style-name="T5">${</text:span><text:span text:style-name="T7">resource</text:span><text:span text:style-name="T5">}</text:span><text:span text:style-name="T9">`</text:span></text:p>
      <text:p text:style-name="P33">        <text:span text:style-name="T7">resource</text:span><text:span text:style-name="T6"> = </text:span><text:span text:style-name="T16">APIBase</text:span><text:span text:style-name="T6">.</text:span><text:span text:style-name="T8">complementURL</text:span><text:span text:style-name="T6">(</text:span><text:span text:style-name="T7">resource</text:span><text:span text:style-name="T6">)</text:span></text:p>
      <text:p text:style-name="P33">        <text:span text:style-name="T12">if</text:span><text:span text:style-name="T6">(</text:span><text:span text:style-name="T7">fragment</text:span><text:span text:style-name="T6"> &amp;&amp; </text:span><text:span text:style-name="T5">typeof</text:span><text:span text:style-name="T6"> </text:span><text:span text:style-name="T7">fragment</text:span><text:span text:style-name="T6"> == </text:span><text:span text:style-name="T9">'object'</text:span><text:span text:style-name="T6">){</text:span></text:p>
      <text:p text:style-name="P33">            <text:span text:style-name="T5">let</text:span><text:span text:style-name="T6"> </text:span><text:span text:style-name="T7">subPath</text:span><text:span text:style-name="T6"> = </text:span><text:span text:style-name="T16">APIBase</text:span><text:span text:style-name="T6">.</text:span><text:span text:style-name="T8">complementURL</text:span><text:span text:style-name="T6">(</text:span><text:span text:style-name="T7">fragment</text:span><text:span text:style-name="T6">.</text:span><text:span text:style-name="T7">subPath</text:span><text:span text:style-name="T6">);</text:span></text:p>
      <text:p text:style-name="P33">            <text:span text:style-name="T7">fragment</text:span><text:span text:style-name="T6"> = {...</text:span><text:span text:style-name="T7">fragment</text:span><text:span text:style-name="T6">}</text:span></text:p>
      <text:p text:style-name="P33">            <text:span text:style-name="T5">delete</text:span><text:span text:style-name="T6"> </text:span><text:span text:style-name="T7">fragment</text:span><text:span text:style-name="T6">.</text:span><text:span text:style-name="T7">subPath</text:span></text:p>
      <text:p text:style-name="P33">            <text:span text:style-name="T7">fragment</text:span><text:span text:style-name="T6"> = </text:span><text:span text:style-name="T16">Object</text:span><text:span text:style-name="T6">.</text:span><text:span text:style-name="T8">keys</text:span><text:span text:style-name="T6">(</text:span><text:span text:style-name="T7">fragment</text:span><text:span text:style-name="T6">).</text:span><text:span text:style-name="T8">map</text:span><text:span text:style-name="T6">((</text:span><text:span text:style-name="T7">key</text:span><text:span text:style-name="T6">)</text:span><text:span text:style-name="T5">=&gt;</text:span><text:span text:style-name="T6"> </text:span><text:span text:style-name="T9">`</text:span><text:span text:style-name="T5">${</text:span><text:span text:style-name="T7">key</text:span><text:span text:style-name="T5">}</text:span><text:span text:style-name="T9">=</text:span><text:span text:style-name="T5">${</text:span><text:span text:style-name="T7">fragment</text:span><text:span text:style-name="T6">[</text:span><text:span text:style-name="T7">key</text:span><text:span text:style-name="T6">]</text:span><text:span text:style-name="T5">}</text:span><text:span text:style-name="T9">`</text:span><text:span text:style-name="T6">).</text:span><text:span text:style-name="T8">join</text:span><text:span text:style-name="T6">(</text:span><text:span text:style-name="T9">'&amp;'</text:span><text:span text:style-name="T6">)</text:span></text:p>
      <text:p text:style-name="P33">            <text:span text:style-name="T7">fragment</text:span><text:span text:style-name="T6"> = </text:span><text:span text:style-name="T7">subPath</text:span><text:span text:style-name="T6">+(</text:span><text:span text:style-name="T7">fragment</text:span><text:span text:style-name="T6">.</text:span><text:span text:style-name="T7">length</text:span><text:span text:style-name="T6">? </text:span><text:span text:style-name="T9">'?'</text:span><text:span text:style-name="T6">:</text:span><text:span text:style-name="T9">''</text:span><text:span text:style-name="T6">) + </text:span><text:span text:style-name="T7">fragment</text:span></text:p>
      <text:p text:style-name="P33">        <text:span text:style-name="T6">}</text:span><text:span text:style-name="T12">else</text:span><text:span text:style-name="T6">{</text:span></text:p>
      <text:p text:style-name="P33">            <text:span text:style-name="T7">fragment</text:span><text:span text:style-name="T6"> = </text:span><text:span text:style-name="T16">APIBase</text:span><text:span text:style-name="T6">.</text:span><text:span text:style-name="T8">complementURL</text:span><text:span text:style-name="T6">(</text:span><text:span text:style-name="T7">fragment</text:span><text:span text:style-name="T6">)</text:span></text:p>
      <text:p text:style-name="P33"><text:soft-page-break/>        <text:span text:style-name="T6">}</text:span></text:p>
      <text:p text:style-name="P33">        <text:span text:style-name="T5">let</text:span><text:span text:style-name="T6"> </text:span><text:span text:style-name="T7">urlDest</text:span><text:span text:style-name="T6"> = </text:span><text:span text:style-name="T5">this</text:span><text:span text:style-name="T6">.</text:span><text:span text:style-name="T7">urlBase</text:span><text:span text:style-name="T6"> + </text:span><text:span text:style-name="T7">resource</text:span><text:span text:style-name="T6"> + </text:span><text:span text:style-name="T7">fragment</text:span><text:span text:style-name="T6">;</text:span></text:p>
      <text:p text:style-name="P33">        <text:span text:style-name="T12">return</text:span><text:span text:style-name="T6"> </text:span><text:span text:style-name="T5">new</text:span><text:span text:style-name="T6"> </text:span><text:span text:style-name="T16">Enderessable</text:span><text:span text:style-name="T6">({</text:span><text:span text:style-name="T7">apiBase:</text:span><text:span text:style-name="T5">this</text:span><text:span text:style-name="T6">, </text:span><text:span text:style-name="T7">urlDest</text:span><text:span text:style-name="T6">})</text:span></text:p>
      <text:p text:style-name="P33">    <text:span text:style-name="T6">}</text:span></text:p>
      <text:p text:style-name="P40"/>
      <text:p text:style-name="P33">    <text:span text:style-name="T8">toUrlBase</text:span><text:span text:style-name="T6"> = (</text:span><text:span text:style-name="T7">fragment</text:span><text:span text:style-name="T6">) </text:span><text:span text:style-name="T5">=&gt;</text:span><text:span text:style-name="T6"> </text:span><text:span text:style-name="T5">this</text:span><text:span text:style-name="T6">.</text:span><text:span text:style-name="T8">toResource</text:span><text:span text:style-name="T6">(</text:span><text:span text:style-name="T5">‘’</text:span><text:span text:style-name="T6">, </text:span><text:span text:style-name="T7">fragment</text:span><text:span text:style-name="T6">)</text:span></text:p>
      <text:p text:style-name="P40"/>
      <text:p text:style-name="P33">    <text:span text:style-name="T5">static</text:span><text:span text:style-name="T6"> </text:span><text:span text:style-name="T8">complementURL</text:span><text:span text:style-name="T6">(</text:span><text:span text:style-name="T7">urlFragment</text:span><text:span text:style-name="T6">){</text:span></text:p>
      <text:p text:style-name="P33">        <text:span text:style-name="T7">urlFragment</text:span><text:span text:style-name="T6"> = </text:span><text:span text:style-name="T7">urlFragment</text:span><text:span text:style-name="T6"> ?? </text:span><text:span text:style-name="T9">''</text:span></text:p>
      <text:p text:style-name="P33">        <text:span text:style-name="T12">return</text:span><text:span text:style-name="T6"> (</text:span><text:span text:style-name="T14">/</text:span><text:span text:style-name="T8">^</text:span><text:span text:style-name="T14">\w/</text:span><text:span text:style-name="T6">.</text:span><text:span text:style-name="T8">test</text:span><text:span text:style-name="T6">(</text:span><text:span text:style-name="T7">urlFragment</text:span><text:span text:style-name="T6">)? </text:span><text:span text:style-name="T9">'/'</text:span><text:span text:style-name="T6">:</text:span><text:span text:style-name="T9">''</text:span><text:span text:style-name="T6">) + </text:span><text:span text:style-name="T7">urlFragment</text:span></text:p>
      <text:p text:style-name="P33">    <text:span text:style-name="T6">}</text:span></text:p>
      <text:p text:style-name="P40"/>
      <text:p text:style-name="P34">}</text:p>
      <text:p text:style-name="P65"/>
      <text:p text:style-name="P69">Explaining the constructor</text:p>
      <text:p text:style-name="P69">constructor(urlBase)</text:p>
      <text:p text:style-name="P69">`<text:span text:style-name="T23">urlBase</text:span>` is a string specifying the base URL of the API, for example http://localhost:8080</text:p>
      <text:p text:style-name="P69"/>
      <text:p text:style-name="P69">Explaining the methods</text:p>
      <text:p text:style-name="P69"><text:span text:style-name="T18">onConnectionError</text:span><text:span text:style-name="T26">()</text:span>, By default, it displays an error alert when there is a connection error, noting that this method can be overridden.</text:p>
      <text:p text:style-name="P69"/>
      <text:p text:style-name="P71"><text:span text:style-name="T18">getToken</text:span>() </text:p>
      <text:p text:style-name="P71">Returns the API token.</text:p>
      <text:p text:style-name="P71">Requires that getInfo be implemented in the child class.</text:p>
      <text:p text:style-name="P71"/>
      <text:p text:style-name="P71"><text:span text:style-name="T18">setToken</text:span>(token)</text:p>
      <text:p text:style-name="P71"><text:span text:style-name="T27">Insert the token into local storage.</text:span></text:p>
      <text:p text:style-name="P71">Requires that setInfo be implemented in the child class.</text:p>
      <text:p text:style-name="P71"/>
      <text:p text:style-name="P71"><text:span text:style-name="T18">removeToken</text:span>()</text:p>
      <text:p text:style-name="P71">Remove the token from the API</text:p>
      <text:p text:style-name="P71">Requires that removeInfo is implemented in the child class.</text:p>
      <text:p text:style-name="P71"/>
      <text:p text:style-name="P71"><text:span text:style-name="T18">getUser</text:span>()</text:p>
      <text:p text:style-name="P71">Retrieves the user.</text:p>
      <text:p text:style-name="P71">Requires that getInfo be implemented in the child class.</text:p>
      <text:p text:style-name="P71"/>
      <text:p text:style-name="P71"><text:span text:style-name="T18">setUser</text:span>(user)</text:p>
      <text:p text:style-name="P72">Inserts the API user into localStorage.</text:p>
      <text:p text:style-name="P72">Requires that setInfo be implemented in the child class.</text:p>
      <text:p text:style-name="P72"/>
      <text:p text:style-name="P72"><text:span text:style-name="T18">removeUser</text:span>()</text:p>
      <text:p text:style-name="P72">Clears localStorage and retains the language if it exists.</text:p>
      <text:p text:style-name="P72"/>
      <text:p text:style-name="P72"><text:span text:style-name="T18">toResource</text:span>(resource, fragment)</text:p>
      <text:p text:style-name="P72"><text:span text:style-name="T23">resource</text:span>: Indicates the resource you wish to access in the target API.</text:p>
      <text:p text:style-name="P72"><text:span text:style-name="T23">fragment</text:span>: Used preferably when we want to pass parameters in the request, and may contain an extension of the desired resource, it can be written in the following format:</text:p>
      <text:p text:style-name="P72">let fragment = {</text:p>
      <text:p text:style-name="P72"><text:s text:c="4"/>subPath: “<text:span text:style-name="T28">desired_resource</text:span>”,</text:p>
      <text:p text:style-name="P72"><text:s text:c="4"/>param1: “param 1”,</text:p>
      <text:p text:style-name="P72"><text:soft-page-break/><text:s text:c="4"/>param2: “param2”,</text:p>
      <text:p text:style-name="P72"><text:s text:c="4"/>paramN: “paramN”</text:p>
      <text:p text:style-name="P72">}</text:p>
      <text:p text:style-name="P72"/>
      <text:p text:style-name="P72"><text:span text:style-name="T18">toUrlBase</text:span>(fragment)</text:p>
      <text:p text:style-name="P72">This indicates that the desired resource will be accessed at the urlBase passed in the constructor, and the fragment is the same as that used in toResource.</text:p>
      <text:p text:style-name="P72"/>
      <text:p text:style-name="P72"><text:span text:style-name="T18">complementURL</text:span>(urlFragment)</text:p>
      <text:p text:style-name="P72">Internal method within the class for URL completion purposes.</text:p>
      <text:p text:style-name="P72"/>
      <text:p text:style-name="P73">=======================================================================</text:p>
      <text:p text:style-name="P74">CLASSE DE REQUISIÇÕES</text:p>
      <text:p text:style-name="P74">=======================================================================</text:p>
      <text:p text:style-name="P75"><text:span text:style-name="T3">class</text:span> <text:span text:style-name="T4">JRequest</text:span>{</text:p>
      <text:p text:style-name="P40"/>
      <text:p text:style-name="P33">    <text:span text:style-name="T5">constructor</text:span><text:span text:style-name="T6">(</text:span><text:span text:style-name="T7">enderessable</text:span><text:span text:style-name="T6">, </text:span><text:span text:style-name="T7">data</text:span><text:span text:style-name="T6"> = {}, </text:span><text:span text:style-name="T7">contentType</text:span><text:span text:style-name="T6"> = </text:span><text:span text:style-name="T9">'application/json;charset=utf-8'</text:span><text:span text:style-name="T6">){</text:span></text:p>
      <text:p text:style-name="P33">        <text:span text:style-name="T5">this</text:span><text:span text:style-name="T6">.</text:span><text:span text:style-name="T8">setEnderessable</text:span><text:span text:style-name="T6">(</text:span><text:span text:style-name="T7">enderessable</text:span><text:span text:style-name="T6">)</text:span></text:p>
      <text:p text:style-name="P33">        <text:span text:style-name="T5">this</text:span><text:span text:style-name="T6">.</text:span><text:span text:style-name="T7">data</text:span><text:span text:style-name="T6"> = </text:span><text:span text:style-name="T7">data</text:span></text:p>
      <text:p text:style-name="P33">        <text:span text:style-name="T5">this</text:span><text:span text:style-name="T6">.</text:span><text:span text:style-name="T7">headers</text:span><text:span text:style-name="T6"> = []</text:span></text:p>
      <text:p text:style-name="P33">        <text:span text:style-name="T5">this</text:span><text:span text:style-name="T6">.</text:span><text:span text:style-name="T7">contentType</text:span><text:span text:style-name="T6"> = </text:span><text:span text:style-name="T7">contentType</text:span></text:p>
      <text:p text:style-name="P33">    <text:span text:style-name="T6">}</text:span></text:p>
      <text:p text:style-name="P40"/>
      <text:p text:style-name="P33">    <text:span text:style-name="T5">static</text:span><text:span text:style-name="T6"> </text:span><text:span text:style-name="T8">prepare</text:span><text:span text:style-name="T6">(</text:span><text:span text:style-name="T7">enderessable</text:span><text:span text:style-name="T6">, </text:span><text:span text:style-name="T7">data</text:span><text:span text:style-name="T6"> = {}, </text:span><text:span text:style-name="T7">contentType</text:span><text:span text:style-name="T6"> = </text:span><text:span text:style-name="T9">'application/json;charset=utf-8'</text:span><text:span text:style-name="T6">){ </text:span></text:p>
      <text:p text:style-name="P33">        <text:span text:style-name="T12">return</text:span><text:span text:style-name="T6"> </text:span><text:span text:style-name="T5">new</text:span><text:span text:style-name="T6"> </text:span><text:span text:style-name="T16">JRequest</text:span><text:span text:style-name="T6">(</text:span><text:span text:style-name="T7">enderessable</text:span><text:span text:style-name="T6">, </text:span><text:span text:style-name="T7">data</text:span><text:span text:style-name="T6">, </text:span><text:span text:style-name="T7">contentType</text:span><text:span text:style-name="T6">)</text:span></text:p>
      <text:p text:style-name="P33">    <text:span text:style-name="T6">}</text:span></text:p>
      <text:p text:style-name="P40"/>
      <text:p text:style-name="P33">    <text:span text:style-name="T5">static</text:span><text:span text:style-name="T6"> </text:span><text:span text:style-name="T8">prepareFiles</text:span><text:span text:style-name="T6">(</text:span><text:span text:style-name="T7">enderessable</text:span><text:span text:style-name="T6">, </text:span><text:span text:style-name="T7">formData</text:span><text:span text:style-name="T6">){ </text:span></text:p>
      <text:p text:style-name="P33">        <text:span text:style-name="T12">return</text:span><text:span text:style-name="T6"> </text:span><text:span text:style-name="T5">new</text:span><text:span text:style-name="T6"> </text:span><text:span text:style-name="T16">JRequest</text:span><text:span text:style-name="T6">(</text:span><text:span text:style-name="T7">enderessable</text:span><text:span text:style-name="T6">, </text:span><text:span text:style-name="T7">data</text:span><text:span text:style-name="T6">, </text:span><text:span text:style-name="T5">null</text:span><text:span text:style-name="T6">)</text:span></text:p>
      <text:p text:style-name="P33">    <text:span text:style-name="T6">}</text:span></text:p>
      <text:p text:style-name="P40"/>
      <text:p text:style-name="P33">    <text:span text:style-name="T8">send</text:span><text:span text:style-name="T6">(</text:span><text:span text:style-name="T7">method</text:span><text:span text:style-name="T6"> = </text:span><text:span text:style-name="T9">'GET'</text:span><text:span text:style-name="T6">){</text:span></text:p>
      <text:p text:style-name="P33">        <text:span text:style-name="T11">DEVELOPMENT_MODE</text:span><text:span text:style-name="T6">?.</text:span><text:span text:style-name="T8">log</text:span><text:span text:style-name="T6">?.(!(</text:span><text:span text:style-name="T9">'onsuccess'</text:span><text:span text:style-name="T6"> </text:span><text:span text:style-name="T5">in</text:span><text:span text:style-name="T6"> </text:span><text:span text:style-name="T5">this</text:span><text:span text:style-name="T6">), </text:span><text:span text:style-name="T9">'onsuccess not declared in request: '</text:span><text:span text:style-name="T6">+</text:span><text:span text:style-name="T5">this</text:span><text:span text:style-name="T6">.</text:span><text:span text:style-name="T7">url</text:span><text:span text:style-name="T6">, </text:span><text:span text:style-name="T11">DEVELOPMENT_MODE</text:span><text:span text:style-name="T6">.</text:span><text:span text:style-name="T7">WARNING</text:span><text:span text:style-name="T6">)</text:span></text:p>
      <text:p text:style-name="P33">        <text:span text:style-name="T5">this</text:span><text:span text:style-name="T6">.</text:span><text:span text:style-name="T8">_sendAjax</text:span><text:span text:style-name="T6">(</text:span><text:span text:style-name="T7">method</text:span><text:span text:style-name="T6">)</text:span></text:p>
      <text:p text:style-name="P33">        <text:span text:style-name="T12">return</text:span><text:span text:style-name="T6"> </text:span><text:span text:style-name="T5">this</text:span><text:span text:style-name="T6">  </text:span></text:p>
      <text:p text:style-name="P33">    <text:span text:style-name="T6">}</text:span></text:p>
      <text:p text:style-name="P40"/>
      <text:p text:style-name="P33">    <text:span text:style-name="T8">post</text:span><text:span text:style-name="T6"> = </text:span><text:span text:style-name="T7">_</text:span><text:span text:style-name="T6"> </text:span><text:span text:style-name="T5">=&gt;</text:span><text:span text:style-name="T6"> </text:span><text:span text:style-name="T5">this</text:span><text:span text:style-name="T6">.</text:span><text:span text:style-name="T8">send</text:span><text:span text:style-name="T6">(</text:span><text:span text:style-name="T9">'POST'</text:span><text:span text:style-name="T6">)</text:span></text:p>
      <text:p text:style-name="P33">    <text:span text:style-name="T8">get</text:span><text:span text:style-name="T6"> = </text:span><text:span text:style-name="T7">_</text:span><text:span text:style-name="T6"> </text:span><text:span text:style-name="T5">=&gt;</text:span><text:span text:style-name="T6"> </text:span><text:span text:style-name="T5">this</text:span><text:span text:style-name="T6">.</text:span><text:span text:style-name="T8">send</text:span><text:span text:style-name="T6">(</text:span><text:span text:style-name="T9">'GET'</text:span><text:span text:style-name="T6">)</text:span></text:p>
      <text:p text:style-name="P33">    <text:span text:style-name="T8">put</text:span><text:span text:style-name="T6"> = </text:span><text:span text:style-name="T7">_</text:span><text:span text:style-name="T6"> </text:span><text:span text:style-name="T5">=&gt;</text:span><text:span text:style-name="T6"> </text:span><text:span text:style-name="T5">this</text:span><text:span text:style-name="T6">.</text:span><text:span text:style-name="T8">send</text:span><text:span text:style-name="T6">(</text:span><text:span text:style-name="T9">'PUT'</text:span><text:span text:style-name="T6">)</text:span></text:p>
      <text:p text:style-name="P33">    <text:span text:style-name="T8">delete</text:span><text:span text:style-name="T6"> = </text:span><text:span text:style-name="T7">_</text:span><text:span text:style-name="T6"> </text:span><text:span text:style-name="T5">=&gt;</text:span><text:span text:style-name="T6"> </text:span><text:span text:style-name="T5">this</text:span><text:span text:style-name="T6">.</text:span><text:span text:style-name="T8">send</text:span><text:span text:style-name="T6">(</text:span><text:span text:style-name="T9">'DELETE'</text:span><text:span text:style-name="T6">)</text:span></text:p>
      <text:p text:style-name="P33">    </text:p>
      <text:p text:style-name="P33">    <text:span text:style-name="T8">addHeaders</text:span><text:span text:style-name="T6">(...</text:span><text:span text:style-name="T7">headers</text:span><text:span text:style-name="T6">){</text:span></text:p>
      <text:p text:style-name="P33">        <text:span text:style-name="T5">let</text:span><text:span text:style-name="T6"> </text:span><text:span text:style-name="T7">newHeaders</text:span><text:span text:style-name="T6"> = </text:span><text:span text:style-name="T8">arrayInSpread</text:span><text:span text:style-name="T6">(</text:span><text:span text:style-name="T7">headers</text:span><text:span text:style-name="T6">).</text:span><text:span text:style-name="T8">map</text:span><text:span text:style-name="T6">(</text:span><text:span text:style-name="T7">header</text:span><text:span text:style-name="T6"> </text:span><text:span text:style-name="T5">=&gt;</text:span><text:span text:style-name="T6"> {</text:span></text:p>
      <text:p text:style-name="P33">            <text:span text:style-name="T12">if</text:span><text:span text:style-name="T6">(</text:span><text:span text:style-name="T7">header</text:span><text:span text:style-name="T6">.</text:span><text:span text:style-name="T7">name</text:span><text:span text:style-name="T6">) </text:span><text:span text:style-name="T12">return</text:span><text:span text:style-name="T6"> </text:span><text:span text:style-name="T7">header</text:span></text:p>
      <text:p text:style-name="P33">            <text:span text:style-name="T12">return</text:span><text:span text:style-name="T6"> {</text:span><text:span text:style-name="T7">name:header</text:span><text:span text:style-name="T6">, </text:span><text:span text:style-name="T7">value:</text:span><text:span text:style-name="T9">''</text:span><text:span text:style-name="T6">}</text:span></text:p>
      <text:p text:style-name="P33">        <text:span text:style-name="T6">});</text:span></text:p>
      <text:p text:style-name="P33">        </text:p>
      <text:p text:style-name="P33"><text:soft-page-break/>        <text:span text:style-name="T5">this</text:span><text:span text:style-name="T6">.</text:span><text:span text:style-name="T7">headers</text:span><text:span text:style-name="T6"> = </text:span><text:span text:style-name="T7">headers</text:span><text:span text:style-name="T6">.</text:span><text:span text:style-name="T8">filter</text:span><text:span text:style-name="T6">(</text:span><text:span text:style-name="T7">header</text:span><text:span text:style-name="T6"> </text:span><text:span text:style-name="T5">=&gt;</text:span><text:span text:style-name="T6"> !(</text:span><text:span text:style-name="T7">header</text:span><text:span text:style-name="T6">.</text:span><text:span text:style-name="T7">name</text:span><text:span text:style-name="T6"> </text:span><text:span text:style-name="T5">in</text:span><text:span text:style-name="T6"> </text:span><text:span text:style-name="T7">newHeaders</text:span><text:span text:style-name="T6">)).</text:span><text:span text:style-name="T8">concat</text:span><text:span text:style-name="T6">(</text:span><text:span text:style-name="T7">newHeaders</text:span><text:span text:style-name="T6">)</text:span></text:p>
      <text:p text:style-name="P33">        <text:span text:style-name="T12">return</text:span><text:span text:style-name="T6"> </text:span><text:span text:style-name="T5">this</text:span></text:p>
      <text:p text:style-name="P33">    <text:span text:style-name="T6">}</text:span></text:p>
      <text:p text:style-name="P40"/>
      <text:p text:style-name="P33">    <text:span text:style-name="T8">setEnderessable</text:span><text:span text:style-name="T6"> = </text:span><text:span text:style-name="T7">enderessable</text:span><text:span text:style-name="T6"> </text:span><text:span text:style-name="T5">=&gt;</text:span><text:span text:style-name="T6"> {</text:span></text:p>
      <text:p text:style-name="P33">        <text:span text:style-name="T5">this</text:span><text:span text:style-name="T6">.</text:span><text:span text:style-name="T7">enderessable</text:span><text:span text:style-name="T6"> = </text:span><text:span text:style-name="T5">new</text:span><text:span text:style-name="T6"> </text:span><text:span text:style-name="T16">Enderessable</text:span><text:span text:style-name="T6">(</text:span><text:span text:style-name="T7">enderessable</text:span><text:span text:style-name="T6">)</text:span></text:p>
      <text:p text:style-name="P33">        <text:span text:style-name="T5">this</text:span><text:span text:style-name="T6">.</text:span><text:span text:style-name="T7">onconnectionerror</text:span><text:span text:style-name="T6"> = </text:span><text:span text:style-name="T7">enderessable</text:span><text:span text:style-name="T6">.</text:span><text:span text:style-name="T7">onconnectionerror</text:span></text:p>
      <text:p text:style-name="P33">        <text:span text:style-name="T12">return</text:span><text:span text:style-name="T6"> </text:span><text:span text:style-name="T5">this</text:span></text:p>
      <text:p text:style-name="P33">    <text:span text:style-name="T6">}</text:span></text:p>
      <text:p text:style-name="P40"/>
      <text:p text:style-name="P33">    <text:span text:style-name="T8">setOnConnectionError</text:span><text:span text:style-name="T6">(</text:span><text:span text:style-name="T7">onConnectionError</text:span><text:span text:style-name="T6">){</text:span></text:p>
      <text:p text:style-name="P33">        <text:span text:style-name="T5">this</text:span><text:span text:style-name="T6">.</text:span><text:span text:style-name="T7">onconnectionerror</text:span><text:span text:style-name="T6"> = </text:span><text:span text:style-name="T7">onConnectionError</text:span></text:p>
      <text:p text:style-name="P33">        <text:span text:style-name="T12">return</text:span><text:span text:style-name="T6"> </text:span><text:span text:style-name="T5">this</text:span></text:p>
      <text:p text:style-name="P33">    <text:span text:style-name="T6">}</text:span></text:p>
      <text:p text:style-name="P40"/>
      <text:p text:style-name="P33">    <text:span text:style-name="T8">inSequence</text:span><text:span text:style-name="T6">(</text:span><text:span text:style-name="T7">onbefore</text:span><text:span text:style-name="T6">, </text:span><text:span text:style-name="T7">onready</text:span><text:span text:style-name="T6">, </text:span><text:span text:style-name="T7">onsuccess</text:span><text:span text:style-name="T6">, </text:span><text:span text:style-name="T7">onerror</text:span><text:span text:style-name="T6">, </text:span><text:span text:style-name="T7">onafter</text:span><text:span text:style-name="T6">){</text:span></text:p>
      <text:p text:style-name="P33">        <text:span text:style-name="T5">this</text:span><text:span text:style-name="T6">.</text:span><text:span text:style-name="T7">onbefore</text:span><text:span text:style-name="T6"> = </text:span><text:span text:style-name="T7">onbefore</text:span></text:p>
      <text:p text:style-name="P33">        <text:span text:style-name="T5">this</text:span><text:span text:style-name="T6">.</text:span><text:span text:style-name="T7">onready</text:span><text:span text:style-name="T6"> = </text:span><text:span text:style-name="T7">onready</text:span></text:p>
      <text:p text:style-name="P33">        <text:span text:style-name="T12">return</text:span><text:span text:style-name="T6"> </text:span><text:span text:style-name="T5">this</text:span><text:span text:style-name="T6">.</text:span><text:span text:style-name="T8">inResponse</text:span><text:span text:style-name="T6">(</text:span><text:span text:style-name="T7">onsuccess</text:span><text:span text:style-name="T6">, </text:span><text:span text:style-name="T7">onerror</text:span><text:span text:style-name="T6">, </text:span><text:span text:style-name="T7">onafter</text:span><text:span text:style-name="T6">)</text:span></text:p>
      <text:p text:style-name="P33">    <text:span text:style-name="T6">}</text:span></text:p>
      <text:p text:style-name="P40"/>
      <text:p text:style-name="P33">    <text:span text:style-name="T8">inResponse</text:span><text:span text:style-name="T6">(</text:span><text:span text:style-name="T7">onsuccess</text:span><text:span text:style-name="T6">, </text:span><text:span text:style-name="T7">onerror</text:span><text:span text:style-name="T6">, </text:span><text:span text:style-name="T7">onafter</text:span><text:span text:style-name="T6">){</text:span></text:p>
      <text:p text:style-name="P33">        <text:span text:style-name="T5">this</text:span><text:span text:style-name="T6">.</text:span><text:span text:style-name="T7">onsuccess</text:span><text:span text:style-name="T6"> = </text:span><text:span text:style-name="T7">onsuccess</text:span></text:p>
      <text:p text:style-name="P33">        <text:span text:style-name="T5">this</text:span><text:span text:style-name="T6">.</text:span><text:span text:style-name="T7">onerror</text:span><text:span text:style-name="T6"> = </text:span><text:span text:style-name="T7">onerror</text:span></text:p>
      <text:p text:style-name="P33">        <text:span text:style-name="T5">this</text:span><text:span text:style-name="T6">.</text:span><text:span text:style-name="T7">onafter</text:span><text:span text:style-name="T6"> = </text:span><text:span text:style-name="T7">onafter</text:span></text:p>
      <text:p text:style-name="P33">        <text:span text:style-name="T12">return</text:span><text:span text:style-name="T6"> </text:span><text:span text:style-name="T5">this</text:span><text:span text:style-name="T6">;</text:span></text:p>
      <text:p text:style-name="P33">    <text:span text:style-name="T6">}</text:span></text:p>
      <text:p text:style-name="P33">    </text:p>
      <text:p text:style-name="P33">    <text:span text:style-name="T8">_onreadystatechange</text:span><text:span text:style-name="T6"> = </text:span><text:span text:style-name="T7">ajaxEvent</text:span><text:span text:style-name="T6"> </text:span><text:span text:style-name="T5">=&gt;</text:span><text:span text:style-name="T6"> {</text:span></text:p>
      <text:p text:style-name="P33">        <text:span text:style-name="T5">let</text:span><text:span text:style-name="T6"> </text:span><text:span text:style-name="T7">response</text:span><text:span text:style-name="T6"> = </text:span><text:span text:style-name="T5">this</text:span><text:span text:style-name="T6">.</text:span><text:span text:style-name="T8">_ajaxResponse</text:span><text:span text:style-name="T6">(</text:span><text:span text:style-name="T7">ajaxEvent</text:span><text:span text:style-name="T6">);</text:span></text:p>
      <text:p text:style-name="P40"/>
      <text:p text:style-name="P33">        <text:span text:style-name="T12">if</text:span><text:span text:style-name="T6">(</text:span><text:span text:style-name="T7">response</text:span><text:span text:style-name="T6">){</text:span></text:p>
      <text:p text:style-name="P33">            <text:span text:style-name="T5">let</text:span><text:span text:style-name="T6"> {</text:span><text:span text:style-name="T7">success</text:span><text:span text:style-name="T6">, </text:span><text:span text:style-name="T7">hasError</text:span><text:span text:style-name="T6">, </text:span><text:span text:style-name="T7">details</text:span><text:span text:style-name="T6">, </text:span><text:span text:style-name="T7">codeType</text:span><text:span text:style-name="T6">} = </text:span><text:span text:style-name="T7">response</text:span><text:span text:style-name="T6">;</text:span></text:p>
      <text:p text:style-name="P33">            <text:span text:style-name="T12">if</text:span><text:span text:style-name="T6">(</text:span><text:span text:style-name="T7">codeType</text:span><text:span text:style-name="T6"> == </text:span><text:span text:style-name="T13">0</text:span><text:span text:style-name="T6">) </text:span><text:span text:style-name="T5">this</text:span><text:span text:style-name="T6">.</text:span><text:span text:style-name="T8">onconnectionerror</text:span><text:span text:style-name="T6">?.(</text:span><text:span text:style-name="T7">response</text:span><text:span text:style-name="T6">)</text:span></text:p>
      <text:p text:style-name="P40"/>
      <text:p text:style-name="P33">            <text:span text:style-name="T5">this</text:span><text:span text:style-name="T6">.</text:span><text:span text:style-name="T8">onready</text:span><text:span text:style-name="T6">?.(</text:span><text:span text:style-name="T7">details</text:span><text:span text:style-name="T6">, </text:span><text:span text:style-name="T7">response</text:span><text:span text:style-name="T6">, </text:span><text:span text:style-name="T7">ajaxEvent</text:span><text:span text:style-name="T6">)</text:span></text:p>
      <text:p text:style-name="P33">            <text:span text:style-name="T12">if</text:span><text:span text:style-name="T6">(</text:span><text:span text:style-name="T7">success</text:span><text:span text:style-name="T6">) </text:span><text:span text:style-name="T5">this</text:span><text:span text:style-name="T6">.</text:span><text:span text:style-name="T8">onsuccess</text:span><text:span text:style-name="T6">?.(</text:span><text:span text:style-name="T7">details</text:span><text:span text:style-name="T6">, </text:span><text:span text:style-name="T7">response</text:span><text:span text:style-name="T6">, </text:span><text:span text:style-name="T7">ajaxEvent</text:span><text:span text:style-name="T6">)</text:span></text:p>
      <text:p text:style-name="P33">            <text:span text:style-name="T12">if</text:span><text:span text:style-name="T6">(</text:span><text:span text:style-name="T7">hasError</text:span><text:span text:style-name="T6">) </text:span><text:span text:style-name="T5">this</text:span><text:span text:style-name="T6">.</text:span><text:span text:style-name="T8">onerror</text:span><text:span text:style-name="T6">?.(</text:span><text:span text:style-name="T7">details</text:span><text:span text:style-name="T6">, </text:span><text:span text:style-name="T7">response</text:span><text:span text:style-name="T6">, </text:span><text:span text:style-name="T7">ajaxEvent</text:span><text:span text:style-name="T6">)</text:span></text:p>
      <text:p text:style-name="P33">            <text:span text:style-name="T5">this</text:span><text:span text:style-name="T6">.</text:span><text:span text:style-name="T8">onafter</text:span><text:span text:style-name="T6">?.(</text:span><text:span text:style-name="T7">details</text:span><text:span text:style-name="T6">, </text:span><text:span text:style-name="T7">response</text:span><text:span text:style-name="T6">, </text:span><text:span text:style-name="T7">ajaxEvent</text:span><text:span text:style-name="T6">)</text:span></text:p>
      <text:p text:style-name="P33">        <text:span text:style-name="T6">}</text:span></text:p>
      <text:p text:style-name="P33">    <text:span text:style-name="T6">}</text:span></text:p>
      <text:p text:style-name="P40"/>
      <text:p text:style-name="P33">    <text:span text:style-name="T8">_insertAuthorization</text:span><text:span text:style-name="T6">(</text:span><text:span text:style-name="T7">enderessable</text:span><text:span text:style-name="T6">, </text:span><text:span text:style-name="T7">ajax</text:span><text:span text:style-name="T6">){</text:span></text:p>
      <text:p text:style-name="P33">        <text:span text:style-name="T5">let</text:span><text:span text:style-name="T6"> </text:span><text:span text:style-name="T7">token</text:span><text:span text:style-name="T6"> = </text:span><text:span text:style-name="T7">enderessable</text:span><text:span text:style-name="T6">.</text:span><text:span text:style-name="T7">apiBase</text:span><text:span text:style-name="T6">?.</text:span><text:span text:style-name="T8">getToken</text:span><text:span text:style-name="T6">?.();</text:span></text:p>
      <text:p text:style-name="P33">        <text:span text:style-name="T12">if</text:span><text:span text:style-name="T6">(</text:span><text:span text:style-name="T7">token</text:span><text:span text:style-name="T6">) </text:span><text:span text:style-name="T7">ajax</text:span><text:span text:style-name="T6">.</text:span><text:span text:style-name="T8">setRequestHeader</text:span><text:span text:style-name="T6">(</text:span><text:span text:style-name="T9">'Authorization'</text:span><text:span text:style-name="T6">, </text:span><text:span text:style-name="T7">token</text:span><text:span text:style-name="T6">)</text:span></text:p>
      <text:p text:style-name="P33">    <text:span text:style-name="T6">}</text:span></text:p>
      <text:p text:style-name="P40"/>
      <text:p text:style-name="P33">    <text:span text:style-name="T8">_sendAjax</text:span><text:span text:style-name="T6">(</text:span><text:span text:style-name="T7">method</text:span><text:span text:style-name="T6">){</text:span></text:p>
      <text:p text:style-name="P33">        <text:span text:style-name="T5">let</text:span><text:span text:style-name="T6"> </text:span><text:span text:style-name="T7">ajax</text:span><text:span text:style-name="T6"> = </text:span><text:span text:style-name="T5">new</text:span><text:span text:style-name="T6"> </text:span><text:span text:style-name="T16">XMLHttpRequest</text:span><text:span text:style-name="T6">(),</text:span></text:p>
      <text:p text:style-name="P33"><text:soft-page-break/>            <text:span text:style-name="T7">enderessable</text:span><text:span text:style-name="T6"> = </text:span><text:span text:style-name="T5">this</text:span><text:span text:style-name="T6">.</text:span><text:span text:style-name="T7">enderessable</text:span><text:span text:style-name="T6">,</text:span></text:p>
      <text:p text:style-name="P33">            <text:span text:style-name="T7">content</text:span><text:span text:style-name="T6"> = </text:span><text:span text:style-name="T5">this</text:span><text:span text:style-name="T6">.</text:span><text:span text:style-name="T7">data</text:span><text:span text:style-name="T6">;</text:span></text:p>
      <text:p text:style-name="P33">        <text:span text:style-name="T5">this</text:span><text:span text:style-name="T6">.</text:span><text:span text:style-name="T7">ajax</text:span><text:span text:style-name="T6"> = </text:span><text:span text:style-name="T7">ajax</text:span></text:p>
      <text:p text:style-name="P33">        <text:span text:style-name="T7">ajax</text:span><text:span text:style-name="T6">.</text:span><text:span text:style-name="T8">open</text:span><text:span text:style-name="T6">(</text:span><text:span text:style-name="T7">method</text:span><text:span text:style-name="T6">.</text:span><text:span text:style-name="T8">toUpperCase</text:span><text:span text:style-name="T6">(), </text:span><text:span text:style-name="T7">enderessable</text:span><text:span text:style-name="T6">.</text:span><text:span text:style-name="T7">urlDest</text:span><text:span text:style-name="T6">, </text:span><text:span text:style-name="T5">true</text:span><text:span text:style-name="T6">)</text:span></text:p>
      <text:p text:style-name="P33">        <text:span text:style-name="T5">this</text:span><text:span text:style-name="T6">.</text:span><text:span text:style-name="T8">_insertAuthorization</text:span><text:span text:style-name="T6">(</text:span><text:span text:style-name="T7">enderessable</text:span><text:span text:style-name="T6">, </text:span><text:span text:style-name="T7">ajax</text:span><text:span text:style-name="T6">)</text:span></text:p>
      <text:p text:style-name="P33">        <text:span text:style-name="T7">ajax</text:span><text:span text:style-name="T6">.</text:span><text:span text:style-name="T8">onreadystatechange</text:span><text:span text:style-name="T6"> = </text:span><text:span text:style-name="T5">this</text:span><text:span text:style-name="T6">.</text:span><text:span text:style-name="T8">_onreadystatechange</text:span></text:p>
      <text:p text:style-name="P33">        <text:span text:style-name="T12">if</text:span><text:span text:style-name="T6">(</text:span><text:span text:style-name="T5">this</text:span><text:span text:style-name="T6">.</text:span><text:span text:style-name="T7">contentType</text:span><text:span text:style-name="T6">){</text:span></text:p>
      <text:p text:style-name="P33">            <text:span text:style-name="T7">ajax</text:span><text:span text:style-name="T6">.</text:span><text:span text:style-name="T8">setRequestHeader</text:span><text:span text:style-name="T6">(</text:span><text:span text:style-name="T9">'Content-type'</text:span><text:span text:style-name="T6">, </text:span><text:span text:style-name="T5">this</text:span><text:span text:style-name="T6">.</text:span><text:span text:style-name="T7">contentType</text:span><text:span text:style-name="T6">)</text:span></text:p>
      <text:p text:style-name="P33">            <text:span text:style-name="T12">if</text:span><text:span text:style-name="T6">(</text:span><text:span text:style-name="T5">this</text:span><text:span text:style-name="T6">.</text:span><text:span text:style-name="T7">contentType</text:span><text:span text:style-name="T6">.</text:span><text:span text:style-name="T8">split</text:span><text:span text:style-name="T6">(</text:span><text:span text:style-name="T9">';'</text:span><text:span text:style-name="T6">)[</text:span><text:span text:style-name="T13">0</text:span><text:span text:style-name="T6">] == </text:span><text:span text:style-name="T9">'application/json'</text:span><text:span text:style-name="T6">) </text:span><text:span text:style-name="T7">content</text:span><text:span text:style-name="T6"> = </text:span><text:span text:style-name="T7">JSON</text:span><text:span text:style-name="T6">.</text:span><text:span text:style-name="T8">stringify</text:span><text:span text:style-name="T6">(</text:span><text:span text:style-name="T7">content</text:span><text:span text:style-name="T6">)</text:span></text:p>
      <text:p text:style-name="P33">        <text:span text:style-name="T6">}</text:span></text:p>
      <text:p text:style-name="P33">        <text:span text:style-name="T5">this</text:span><text:span text:style-name="T6">.</text:span><text:span text:style-name="T7">headers</text:span><text:span text:style-name="T6">.</text:span><text:span text:style-name="T8">forEach</text:span><text:span text:style-name="T6">(</text:span><text:span text:style-name="T7">header</text:span><text:span text:style-name="T6"> </text:span><text:span text:style-name="T5">=&gt;</text:span><text:span text:style-name="T6"> </text:span><text:span text:style-name="T7">ajax</text:span><text:span text:style-name="T6">.</text:span><text:span text:style-name="T8">setRequestHeader</text:span><text:span text:style-name="T6">(</text:span><text:span text:style-name="T7">header</text:span><text:span text:style-name="T6">.</text:span><text:span text:style-name="T7">name</text:span><text:span text:style-name="T6">, </text:span><text:span text:style-name="T7">header</text:span><text:span text:style-name="T6">.</text:span><text:span text:style-name="T7">value</text:span><text:span text:style-name="T6">))</text:span></text:p>
      <text:p text:style-name="P33">        <text:span text:style-name="T5">this</text:span><text:span text:style-name="T6">.</text:span><text:span text:style-name="T8">onbefore</text:span><text:span text:style-name="T6">?.(</text:span><text:span text:style-name="T7">ajax</text:span><text:span text:style-name="T6">)</text:span></text:p>
      <text:p text:style-name="P33">        <text:span text:style-name="T7">ajax</text:span><text:span text:style-name="T6">.</text:span><text:span text:style-name="T8">send</text:span><text:span text:style-name="T6">(</text:span><text:span text:style-name="T7">content</text:span><text:span text:style-name="T6">)</text:span></text:p>
      <text:p text:style-name="P33">    <text:span text:style-name="T6">}</text:span></text:p>
      <text:p text:style-name="P40"/>
      <text:p text:style-name="P33">    <text:span text:style-name="T8">_ajaxResponse</text:span><text:span text:style-name="T6">(</text:span><text:span text:style-name="T7">ajax</text:span><text:span text:style-name="T6">){</text:span></text:p>
      <text:p text:style-name="P40"/>
      <text:p text:style-name="P33">        <text:span text:style-name="T5">let</text:span><text:span text:style-name="T6"> </text:span><text:span text:style-name="T7">resp</text:span><text:span text:style-name="T6"> = </text:span><text:span text:style-name="T7">ajax</text:span><text:span text:style-name="T6">.</text:span><text:span text:style-name="T7">currentTarget</text:span><text:span text:style-name="T6">;</text:span></text:p>
      <text:p text:style-name="P33">        <text:span text:style-name="T12">if</text:span><text:span text:style-name="T6"> (</text:span><text:span text:style-name="T7">resp</text:span><text:span text:style-name="T6">.</text:span><text:span text:style-name="T7">readyState</text:span><text:span text:style-name="T6"> == </text:span><text:span text:style-name="T13">4</text:span><text:span text:style-name="T6">) {</text:span></text:p>
      <text:p text:style-name="P40"/>
      <text:p text:style-name="P33">            <text:span text:style-name="T5">let</text:span><text:span text:style-name="T6"> {</text:span><text:span text:style-name="T7">status</text:span><text:span text:style-name="T6">, </text:span><text:span text:style-name="T7">response</text:span><text:span text:style-name="T6">, </text:span><text:span text:style-name="T7">responseText</text:span><text:span text:style-name="T6">} = </text:span><text:span text:style-name="T7">resp</text:span><text:span text:style-name="T6">,</text:span></text:p>
      <text:p text:style-name="P33">                <text:span text:style-name="T7">details</text:span><text:span text:style-name="T6"> = </text:span><text:span text:style-name="T7">response</text:span><text:span text:style-name="T6"> || </text:span><text:span text:style-name="T7">responseText</text:span><text:span text:style-name="T6">,</text:span></text:p>
      <text:p text:style-name="P33">                <text:span text:style-name="T7">codeType</text:span><text:span text:style-name="T6"> = </text:span><text:span text:style-name="T7">Math</text:span><text:span text:style-name="T6">.</text:span><text:span text:style-name="T8">floor</text:span><text:span text:style-name="T6">(</text:span><text:span text:style-name="T7">status</text:span><text:span text:style-name="T6">/</text:span><text:span text:style-name="T13">100</text:span><text:span text:style-name="T6">),</text:span></text:p>
      <text:p text:style-name="P33">                <text:span text:style-name="T7">hasError</text:span><text:span text:style-name="T6"> = </text:span><text:span text:style-name="T7">codeType</text:span><text:span text:style-name="T6"> &gt; </text:span><text:span text:style-name="T13">3</text:span><text:span text:style-name="T6">;</text:span></text:p>
      <text:p text:style-name="P40"/>
      <text:p text:style-name="P33">            <text:span text:style-name="T7">resp</text:span><text:span text:style-name="T6">.</text:span><text:span text:style-name="T7">contentType</text:span><text:span text:style-name="T6"> = </text:span><text:span text:style-name="T7">resp</text:span><text:span text:style-name="T6">.</text:span><text:span text:style-name="T8">getResponseHeader</text:span><text:span text:style-name="T6">(</text:span><text:span text:style-name="T9">'content-type'</text:span><text:span text:style-name="T6">)</text:span></text:p>
      <text:p text:style-name="P33">            <text:span text:style-name="T11">DEVELOPMENT_MODE</text:span><text:span text:style-name="T6">?.</text:span><text:span text:style-name="T8">log</text:span><text:span text:style-name="T6">?.(</text:span><text:span text:style-name="T7">hasError</text:span><text:span text:style-name="T6">, </text:span><text:span text:style-name="T9">`%cstatus: </text:span><text:span text:style-name="T5">${</text:span><text:span text:style-name="T7">status</text:span><text:span text:style-name="T5">}</text:span><text:span text:style-name="T9"> </text:span><text:span text:style-name="T5">${</text:span><text:span text:style-name="T7">resp</text:span><text:span text:style-name="T6">.</text:span><text:span text:style-name="T7">statusText</text:span><text:span text:style-name="T5">}</text:span><text:span text:style-name="T15">\n</text:span><text:span text:style-name="T5">${</text:span><text:span text:style-name="T7">details</text:span><text:span text:style-name="T5">}</text:span><text:span text:style-name="T9">`</text:span><text:span text:style-name="T6">, </text:span><text:span text:style-name="T11">DEVELOPMENT_MODE</text:span><text:span text:style-name="T6">.</text:span><text:span text:style-name="T7">ERROR</text:span><text:span text:style-name="T6">)</text:span></text:p>
      <text:p text:style-name="P33">            <text:span text:style-name="T12">try</text:span><text:span text:style-name="T6"> { </text:span><text:span text:style-name="T12">if</text:span><text:span text:style-name="T6">(</text:span><text:span text:style-name="T7">resp</text:span><text:span text:style-name="T6">.</text:span><text:span text:style-name="T7">contentType</text:span><text:span text:style-name="T6"> == </text:span><text:span text:style-name="T9">'application/json'</text:span><text:span text:style-name="T6">) </text:span><text:span text:style-name="T7">details</text:span><text:span text:style-name="T6"> = </text:span><text:span text:style-name="T7">JSON</text:span><text:span text:style-name="T6">.</text:span><text:span text:style-name="T8">parse</text:span><text:span text:style-name="T6">(</text:span><text:span text:style-name="T7">details</text:span><text:span text:style-name="T6">)} </text:span><text:span text:style-name="T12">catch</text:span><text:span text:style-name="T6"> (</text:span><text:span text:style-name="T7">e</text:span><text:span text:style-name="T6">) {</text:span><text:span text:style-name="T7">console</text:span><text:span text:style-name="T6">.</text:span><text:span text:style-name="T8">log</text:span><text:span text:style-name="T6">(</text:span><text:span text:style-name="T7">e</text:span><text:span text:style-name="T6">)}</text:span></text:p>
      <text:p text:style-name="P40"/>
      <text:p text:style-name="P33">            <text:span text:style-name="T7">resp</text:span><text:span text:style-name="T6">.</text:span><text:span text:style-name="T7">details</text:span><text:span text:style-name="T6"> = </text:span><text:span text:style-name="T7">details</text:span></text:p>
      <text:p text:style-name="P33">            <text:span text:style-name="T7">resp</text:span><text:span text:style-name="T6">.</text:span><text:span text:style-name="T7">codeType</text:span><text:span text:style-name="T6"> = </text:span><text:span text:style-name="T7">codeType</text:span></text:p>
      <text:p text:style-name="P33">            <text:span text:style-name="T7">resp</text:span><text:span text:style-name="T6">.</text:span><text:span text:style-name="T7">success</text:span><text:span text:style-name="T6"> = </text:span><text:span text:style-name="T7">codeType</text:span><text:span text:style-name="T6"> == </text:span><text:span text:style-name="T13">2</text:span></text:p>
      <text:p text:style-name="P33">            <text:span text:style-name="T7">resp</text:span><text:span text:style-name="T6">.</text:span><text:span text:style-name="T7">hasError</text:span><text:span text:style-name="T6"> = </text:span><text:span text:style-name="T7">hasError</text:span></text:p>
      <text:p text:style-name="P40"/>
      <text:p text:style-name="P33">            <text:span text:style-name="T7">resp</text:span><text:span text:style-name="T6">.</text:span><text:span text:style-name="T7">getHeader</text:span><text:span text:style-name="T6"> = </text:span><text:span text:style-name="T7">resp</text:span><text:span text:style-name="T6">.</text:span><text:span text:style-name="T7">getResponseHeader</text:span></text:p>
      <text:p text:style-name="P33">            <text:span text:style-name="T7">resp</text:span><text:span text:style-name="T6">.</text:span><text:span text:style-name="T7">getAllHeaders</text:span><text:span text:style-name="T6"> = </text:span><text:span text:style-name="T7">resp</text:span><text:span text:style-name="T6">.</text:span><text:span text:style-name="T7">getAllResponseHeaders</text:span></text:p>
      <text:p text:style-name="P33">            <text:span text:style-name="T12">return</text:span><text:span text:style-name="T6"> </text:span><text:span text:style-name="T7">resp</text:span></text:p>
      <text:p text:style-name="P33">        <text:span text:style-name="T6">}</text:span></text:p>
      <text:p text:style-name="P33">    <text:span text:style-name="T6">}</text:span></text:p>
      <text:p text:style-name="P40"/>
      <text:p text:style-name="P34">}</text:p>
      <text:p text:style-name="P75"/>
      <text:p text:style-name="P73"/>
      <text:p text:style-name="P76">Explaining the constructor</text:p>
      <text:p text:style-name="P77">constructor(enderessable, data = {}, contentType= “application/json;charset=utf-8”)</text:p>
      <text:p text:style-name="P77">The constructor is designed to handle JSON objects by default; if you need to handle another type of object, you must change the contentType.</text:p>
      <text:p text:style-name="P73"><text:soft-page-break/></text:p>
      <text:p text:style-name="P76"><text:span text:style-name="T23">enderessable</text:span>: This can be a string referring to the desired URL or, preferably, an APIBase object (recommended).</text:p>
      <text:p text:style-name="P77"/>
      <text:p text:style-name="P77"><text:span text:style-name="T23">data</text:span>: o json ou objeto a ser enviado caso exista.</text:p>
      <text:p text:style-name="P77"/>
      <text:p text:style-name="P77">Explaining the methods:</text:p>
      <text:p text:style-name="P77">static <text:span text:style-name="T18">prepare</text:span>(enderessable, data = {}, contentType= “application/json;charset=utf-8”)</text:p>
      <text:p text:style-name="P77">Returns a JRequest object; it's an alternative to the default constructor.</text:p>
      <text:p text:style-name="P77"/>
      <text:p text:style-name="P78">static <text:span text:style-name="T18">prepare</text:span><text:span text:style-name="T29">Files</text:span>(enderessable, <text:span text:style-name="T30">formData</text:span>)</text:p>
      <text:p text:style-name="P78">Returns a JRequest object, an alternative to the standard constructor, used for sending files.</text:p>
      <text:p text:style-name="P77"/>
      <text:p text:style-name="P79"><text:span text:style-name="T18">send</text:span>(method<text:span text:style-name="T31">= “GET”</text:span>)</text:p>
      <text:p text:style-name="P79">Sends the HTTP request.</text:p>
      <text:p text:style-name="P80"><text:span text:style-name="T32">method</text:span><text:span text:style-name="T33">: </text:span><text:span text:style-name="T34">Optional. It can be get, put, post, delete, etc. The default method is GET.</text:span></text:p>
      <text:p text:style-name="P79"/>
      <text:p text:style-name="P79"><text:span text:style-name="T18">get</text:span>() </text:p>
      <text:p text:style-name="P79">Make a GET request.</text:p>
      <text:p text:style-name="P79"/>
      <text:p text:style-name="P79"><text:span text:style-name="T18">post</text:span>()</text:p>
      <text:p text:style-name="P79">Make a POST request.</text:p>
      <text:p text:style-name="P81"/>
      <text:p text:style-name="P82"><text:span text:style-name="T18">put</text:span>()</text:p>
      <text:p text:style-name="P79">Make a PUT request.</text:p>
      <text:p text:style-name="P79"/>
      <text:p text:style-name="P79"><text:span text:style-name="T18">delete</text:span>()</text:p>
      <text:p text:style-name="P79">Make a delete request.</text:p>
      <text:p text:style-name="P79"/>
      <text:p text:style-name="P79">Note: For other HTTP methods, add new methods to the class or, preferably, use send(method).</text:p>
      <text:p text:style-name="P83"/>
      <text:p text:style-name="P83"><text:span text:style-name="T18">addHeaders</text:span>(...headers)</text:p>
      <text:p text:style-name="P84">Add a list of HTTP headers.</text:p>
      <text:p text:style-name="P84"><text:span text:style-name="T35">headers</text:span><text:span text:style-name="T31">: A list composed of a string or JSON object in the format {name: “value”}.</text:span></text:p>
      <text:p text:style-name="P83"/>
      <text:p text:style-name="P83"><text:span text:style-name="T18">setEnderessable</text:span>(enderessable)</text:p>
      <text:p text:style-name="P83">Assigns the desired addressable.</text:p>
      <text:p text:style-name="P83"/>
      <text:p text:style-name="P83"><text:span text:style-name="T18">setOnConnectionError</text:span>(onConnectionError)</text:p>
      <text:p text:style-name="P83">Executes the onConnectionError(response) method when a connection error occurs.</text:p>
      <text:p text:style-name="P85"><text:span text:style-name="T23">onConnectionError</text:span>: callback function</text:p>
      <text:p text:style-name="P83"/>
      <text:p text:style-name="P83"><text:span text:style-name="T18">inSequence</text:span>(onbefore, onready, onsuccess, onerror, onafter)</text:p>
      <text:p text:style-name="P86"><text:span text:style-name="T23">onbefore</text:span>(ajax): Callback function. It is executed immediately before the request is sent.</text:p>
      <text:p text:style-name="P83"/>
      <text:p text:style-name="P83"><text:span text:style-name="T23">onready</text:span>(details, response, ajaxEvent)</text:p>
      <text:p text:style-name="P85">Callback function. It is executed as soon as the request response arrives.</text:p>
      <text:p text:style-name="P83"/>
      <text:p text:style-name="P87"><text:span text:style-name="T23">onsuccess</text:span>(details, response, ajaxEvent)</text:p>
      <text:p text:style-name="P85">Callback function. Executed if the response was successful.</text:p>
      <text:p text:style-name="P87"/>
      <text:p text:style-name="P87"><text:span text:style-name="T23">onerror</text:span>(details, response, ajaxEvent)</text:p>
      <text:p text:style-name="P88"><text:soft-page-break/>Callback function. Executed if the response contains an error.</text:p>
      <text:p text:style-name="P89"/>
      <text:p text:style-name="P89"><text:span text:style-name="T23">onafter</text:span>(details, response, ajaxEvent)</text:p>
      <text:p text:style-name="P90">Callback function. It is executed last after the request response.</text:p>
      <text:p text:style-name="P89"/>
      <text:p text:style-name="P91">Note: These callback functions are only executed if they are specified.</text:p>
      <text:p text:style-name="P89"/>
      <text:p text:style-name="P89"><text:span text:style-name="T18">inResponse</text:span>(onsucces, onerror, onafter)</text:p>
      <text:p text:style-name="P89">This method is a variation of inSequence, as it only includes onsuccess, onerror, and onafter.</text:p>
      <text:p text:style-name="P89"/>
      <text:p text:style-name="P92">The other methods are private and their implementation can be studied separately.</text:p>
      <text:p text:style-name="P92">Note: if the request is not being made, check if the http request method was specified (get, put, post, delete or send(method)).</text:p>
      <text:p text:style-name="P93">=======================================================================</text:p>
      <text:p text:style-name="P94">VALIDATION CLASS</text:p>
      <text:p text:style-name="P94">=======================================================================</text:p>
      <text:p text:style-name="P95"><text:span text:style-name="T3">class</text:span> <text:span text:style-name="T4">Validation</text:span>{</text:p>
      <text:p text:style-name="P33">    <text:span text:style-name="T5">constructor</text:span><text:span text:style-name="T6">(</text:span><text:span text:style-name="T7">valid</text:span><text:span text:style-name="T6">, </text:span><text:span text:style-name="T7">message</text:span><text:span text:style-name="T6">, </text:span><text:span text:style-name="T7">input</text:span><text:span text:style-name="T6">){</text:span></text:p>
      <text:p text:style-name="P33">        <text:span text:style-name="T8">overJson</text:span><text:span text:style-name="T6">({</text:span><text:span text:style-name="T7">valid</text:span><text:span text:style-name="T6">, </text:span><text:span text:style-name="T7">message</text:span><text:span text:style-name="T6">, </text:span><text:span text:style-name="T7">input</text:span><text:span text:style-name="T6">, </text:span><text:span text:style-name="T7">isValidation:</text:span><text:span text:style-name="T6"> </text:span><text:span text:style-name="T5">true</text:span><text:span text:style-name="T6">}, </text:span><text:span text:style-name="T5">this</text:span><text:span text:style-name="T6">)</text:span></text:p>
      <text:p text:style-name="P33">        <text:span text:style-name="T12">if</text:span><text:span text:style-name="T6">(</text:span><text:span text:style-name="T5">typeof</text:span><text:span text:style-name="T6"> </text:span><text:span text:style-name="T5">this</text:span><text:span text:style-name="T6">.</text:span><text:span text:style-name="T7">valid</text:span><text:span text:style-name="T6"> != </text:span><text:span text:style-name="T9">'boolean'</text:span><text:span text:style-name="T6">) </text:span><text:span text:style-name="T12">throw</text:span><text:span text:style-name="T6"> </text:span><text:span text:style-name="T9">`type of valid must be a boolean or a function that returns a boolean.</text:span><text:span text:style-name="T15">\n</text:span><text:span text:style-name="T9">confirm: </text:span><text:span text:style-name="T5">${</text:span><text:span text:style-name="T8">confirm</text:span><text:span text:style-name="T5">}</text:span><text:span text:style-name="T15">\n</text:span><text:span text:style-name="T9">message: </text:span><text:span text:style-name="T5">${</text:span><text:span text:style-name="T7">message</text:span><text:span text:style-name="T5">}</text:span><text:span text:style-name="T9">`</text:span></text:p>
      <text:p text:style-name="P33">    <text:span text:style-name="T6">}</text:span></text:p>
      <text:p text:style-name="P40"/>
      <text:p text:style-name="P33">    <text:span text:style-name="T5">static</text:span><text:span text:style-name="T6"> </text:span><text:span text:style-name="T8">validate</text:span><text:span text:style-name="T6">(... </text:span><text:span text:style-name="T7">validations</text:span><text:span text:style-name="T6">){</text:span></text:p>
      <text:p text:style-name="P40"/>
      <text:p text:style-name="P33">        <text:span text:style-name="T7">validations</text:span><text:span text:style-name="T6"> = </text:span><text:span text:style-name="T7">validations</text:span><text:span text:style-name="T6">.</text:span><text:span text:style-name="T8">map</text:span><text:span text:style-name="T6">(</text:span><text:span text:style-name="T7">validation</text:span><text:span text:style-name="T6"> </text:span><text:span text:style-name="T5">=&gt;</text:span><text:span text:style-name="T6"> {</text:span></text:p>
      <text:p text:style-name="P33">            <text:span text:style-name="T12">if</text:span><text:span text:style-name="T6">(!</text:span><text:span text:style-name="T7">validation</text:span><text:span text:style-name="T6">.</text:span><text:span text:style-name="T7">isValidation</text:span><text:span text:style-name="T6">) </text:span><text:span text:style-name="T7">validation</text:span><text:span text:style-name="T6"> = </text:span><text:span text:style-name="T5">new</text:span><text:span text:style-name="T6"> </text:span><text:span text:style-name="T16">Validation</text:span><text:span text:style-name="T6">(</text:span><text:span text:style-name="T7">validation</text:span><text:span text:style-name="T6">[</text:span><text:span text:style-name="T13">0</text:span><text:span text:style-name="T6">], </text:span><text:span text:style-name="T7">validation</text:span><text:span text:style-name="T6">[</text:span><text:span text:style-name="T13">1</text:span><text:span text:style-name="T6">], </text:span><text:span text:style-name="T7">validation</text:span><text:span text:style-name="T6">[</text:span><text:span text:style-name="T13">2</text:span><text:span text:style-name="T6">])</text:span></text:p>
      <text:p text:style-name="P33">            <text:span text:style-name="T12">if</text:span><text:span text:style-name="T6">(</text:span><text:span text:style-name="T7">validation</text:span><text:span text:style-name="T6">.</text:span><text:span text:style-name="T7">input</text:span><text:span text:style-name="T6"> &amp;&amp; </text:span><text:span text:style-name="T7">validation</text:span><text:span text:style-name="T6">.</text:span><text:span text:style-name="T7">input</text:span><text:span text:style-name="T6">.</text:span><text:span text:style-name="T7">errorGroup_</text:span><text:span text:style-name="T6">){</text:span></text:p>
      <text:p text:style-name="P33">                <text:span text:style-name="T8">disapend</text:span><text:span text:style-name="T6">(</text:span><text:span text:style-name="T7">validation</text:span><text:span text:style-name="T6">.</text:span><text:span text:style-name="T7">input</text:span><text:span text:style-name="T6">.</text:span><text:span text:style-name="T7">errorGroup_</text:span><text:span text:style-name="T6">)</text:span></text:p>
      <text:p text:style-name="P33">                <text:span text:style-name="T7">validation</text:span><text:span text:style-name="T6">.</text:span><text:span text:style-name="T7">input</text:span><text:span text:style-name="T6">.</text:span><text:span text:style-name="T7">errorGroup_</text:span><text:span text:style-name="T6"> = </text:span><text:span text:style-name="T5">null</text:span></text:p>
      <text:p text:style-name="P33">            <text:span text:style-name="T6">}</text:span></text:p>
      <text:p text:style-name="P33">            <text:span text:style-name="T12">return</text:span><text:span text:style-name="T6"> </text:span><text:span text:style-name="T7">validation</text:span><text:span text:style-name="T6">;</text:span></text:p>
      <text:p text:style-name="P33">        <text:span text:style-name="T6">}).</text:span><text:span text:style-name="T8">filter</text:span><text:span text:style-name="T6">(</text:span><text:span text:style-name="T7">validation</text:span><text:span text:style-name="T6"> </text:span><text:span text:style-name="T5">=&gt;</text:span><text:span text:style-name="T6"> !</text:span><text:span text:style-name="T7">validation</text:span><text:span text:style-name="T6">.</text:span><text:span text:style-name="T7">valid</text:span><text:span text:style-name="T6">)</text:span></text:p>
      <text:p text:style-name="P33">        <text:span text:style-name="T12">return</text:span><text:span text:style-name="T6"> {</text:span><text:span text:style-name="T7">valid:</text:span><text:span text:style-name="T6"> !</text:span><text:span text:style-name="T7">validations</text:span><text:span text:style-name="T6">.</text:span><text:span text:style-name="T7">length</text:span><text:span text:style-name="T6">, </text:span><text:span text:style-name="T7">errors:</text:span><text:span text:style-name="T6"> </text:span><text:span text:style-name="T7">validations</text:span><text:span text:style-name="T6">, </text:span><text:span text:style-name="T7">first:</text:span><text:span text:style-name="T6"> </text:span><text:span text:style-name="T7">validations</text:span><text:span text:style-name="T6">[</text:span><text:span text:style-name="T13">0</text:span><text:span text:style-name="T6">]}</text:span></text:p>
      <text:p text:style-name="P33">    <text:span text:style-name="T6">}</text:span></text:p>
      <text:p text:style-name="P40"/>
      <text:p text:style-name="P33">    <text:span text:style-name="T5">static</text:span><text:span text:style-name="T6"> </text:span><text:span text:style-name="T8">appendErrors</text:span><text:span text:style-name="T6">(</text:span><text:span text:style-name="T7">validations</text:span><text:span text:style-name="T6">, </text:span><text:span text:style-name="T7">typeGroup</text:span><text:span text:style-name="T6">=</text:span><text:span text:style-name="T9">'div'</text:span><text:span text:style-name="T6">){   </text:span></text:p>
      <text:p text:style-name="P33">        <text:span text:style-name="T5">let</text:span><text:span text:style-name="T6"> </text:span><text:span text:style-name="T7">errors</text:span><text:span text:style-name="T6"> = </text:span><text:span text:style-name="T7">validations</text:span><text:span text:style-name="T6">.</text:span><text:span text:style-name="T7">errors</text:span><text:span text:style-name="T6"> || </text:span><text:span text:style-name="T7">validations</text:span><text:span text:style-name="T6">;</text:span></text:p>
      <text:p text:style-name="P33">        <text:span text:style-name="T8">asArray</text:span><text:span text:style-name="T6">(</text:span><text:span text:style-name="T7">errors</text:span><text:span text:style-name="T6">).</text:span><text:span text:style-name="T8">filter</text:span><text:span text:style-name="T6">(</text:span><text:span text:style-name="T7">validation</text:span><text:span text:style-name="T6"> </text:span><text:span text:style-name="T5">=&gt;</text:span><text:span text:style-name="T6"> </text:span><text:span text:style-name="T7">validation</text:span><text:span text:style-name="T6">.</text:span><text:span text:style-name="T7">input</text:span><text:span text:style-name="T6">)</text:span></text:p>
      <text:p text:style-name="P33">            <text:span text:style-name="T6">.</text:span><text:span text:style-name="T8">forEach</text:span><text:span text:style-name="T6">(</text:span><text:span text:style-name="T7">validation</text:span><text:span text:style-name="T6"> </text:span><text:span text:style-name="T5">=&gt;</text:span><text:span text:style-name="T6"> {</text:span></text:p>
      <text:p text:style-name="P33">                <text:span text:style-name="T5">let</text:span><text:span text:style-name="T6"> </text:span><text:span text:style-name="T7">theInput</text:span><text:span text:style-name="T6"> = </text:span><text:span text:style-name="T7">validation</text:span><text:span text:style-name="T6">.</text:span><text:span text:style-name="T7">input</text:span><text:span text:style-name="T6">;</text:span></text:p>
      <text:p text:style-name="P33">                <text:span text:style-name="T12">if</text:span><text:span text:style-name="T6">(!</text:span><text:span text:style-name="T7">theInput</text:span><text:span text:style-name="T6">.</text:span><text:span text:style-name="T7">errorGroup_</text:span><text:span text:style-name="T6">){</text:span></text:p>
      <text:p text:style-name="P33">                    <text:span text:style-name="T7">theInput</text:span><text:span text:style-name="T6">.</text:span><text:span text:style-name="T7">errorGroup_</text:span><text:span text:style-name="T6"> = </text:span><text:span text:style-name="T11">E</text:span><text:span text:style-name="T6">[</text:span><text:span text:style-name="T7">typeGroup</text:span><text:span text:style-name="T6">]()</text:span></text:p>
      <text:p text:style-name="P33">                    <text:span text:style-name="T8">addClasses</text:span><text:span text:style-name="T6">(</text:span><text:span text:style-name="T7">theInput</text:span><text:span text:style-name="T6">.</text:span><text:span text:style-name="T7">errorGroup_</text:span><text:span text:style-name="T6">, </text:span><text:span text:style-name="T9">"Validation_errorGroup"</text:span><text:span text:style-name="T6">)</text:span></text:p>
      <text:p text:style-name="P33">                    <text:span text:style-name="T8">insertAfter</text:span><text:span text:style-name="T6">(</text:span><text:span text:style-name="T7">theInput</text:span><text:span text:style-name="T6">, </text:span><text:span text:style-name="T7">theInput</text:span><text:span text:style-name="T6">.</text:span><text:span text:style-name="T7">errorGroup_</text:span><text:span text:style-name="T6">)</text:span></text:p>
      <text:p text:style-name="P33">                <text:span text:style-name="T6">}</text:span></text:p>
      <text:p text:style-name="P33">                <text:span text:style-name="T5">let</text:span><text:span text:style-name="T6"> </text:span><text:span text:style-name="T7">elementError</text:span><text:span text:style-name="T6"> = </text:span><text:span text:style-name="T11">E</text:span><text:span text:style-name="T6">.</text:span><text:span text:style-name="T8">p</text:span><text:span text:style-name="T6">().</text:span><text:span text:style-name="T8">t</text:span><text:span text:style-name="T6">(</text:span><text:span text:style-name="T7">validation</text:span><text:span text:style-name="T6">.</text:span><text:span text:style-name="T7">message</text:span><text:span text:style-name="T6">);</text:span></text:p>
      <text:p text:style-name="P33">                <text:span text:style-name="T8">addClasses</text:span><text:span text:style-name="T6">(</text:span><text:span text:style-name="T7">elementError</text:span><text:span text:style-name="T6">, </text:span><text:span text:style-name="T9">"Validation_elementError"</text:span><text:span text:style-name="T6">)</text:span></text:p>
      <text:p text:style-name="P33">                <text:span text:style-name="T7">validation</text:span><text:span text:style-name="T6">.</text:span><text:span text:style-name="T7">input</text:span><text:span text:style-name="T6">.</text:span><text:span text:style-name="T7">errorGroup_</text:span><text:span text:style-name="T6">.</text:span><text:span text:style-name="T8">a</text:span><text:span text:style-name="T6">(</text:span><text:span text:style-name="T7">elementError</text:span><text:span text:style-name="T6">)</text:span></text:p>
      <text:p text:style-name="P33"><text:soft-page-break/>            <text:span text:style-name="T6">})</text:span></text:p>
      <text:p text:style-name="P33">    <text:span text:style-name="T6">}</text:span></text:p>
      <text:p text:style-name="P40"/>
      <text:p text:style-name="P34">}</text:p>
      <text:p text:style-name="P81"/>
      <text:p text:style-name="P96">Explaining the constructor:</text:p>
      <text:p text:style-name="P87">constructor(valid, message, input)</text:p>
      <text:p text:style-name="P87"><text:span text:style-name="T23">valid</text:span>: Receives true if valid or false if invalid.</text:p>
      <text:p text:style-name="P87"><text:span text:style-name="T23">message</text:span>: the message informing of the error that occurred</text:p>
      <text:p text:style-name="P87"><text:span text:style-name="T23">input</text:span>: Optional, it indicates the input that caused the error and to which the error message can be appended.</text:p>
      <text:p text:style-name="P87"/>
      <text:p text:style-name="P87">static <text:span text:style-name="T18">validate</text:span>(… validations)</text:p>
      <text:p text:style-name="P87">performs group validations</text:p>
      <text:p text:style-name="P87"/>
      <text:p text:style-name="P87">static <text:span text:style-name="T18">appendErrors</text:span>(validations, typeGroup= “div”)</text:p>
      <text:p text:style-name="P87">It appends any validations containing errors to the HTML element specified in the typeGroup, which will then be appended to the input that caused the error.</text:p>
      <text:p text:style-name="P97"/>
      <text:p text:style-name="P97"/>
      <text:p text:style-name="P98">=======================================================================</text:p>
      <text:p text:style-name="P99">CLASSE DE <text:span text:style-name="T36">JWTSimpleParser</text:span></text:p>
      <text:p text:style-name="P99">=======================================================================</text:p>
      <text:p text:style-name="P71"/>
      <text:p text:style-name="P100"><text:span text:style-name="T3">class</text:span> <text:span text:style-name="T4">JWTSimpleParser</text:span>{</text:p>
      <text:p text:style-name="P33">    <text:span text:style-name="T5">constructor</text:span><text:span text:style-name="T6">(</text:span><text:span text:style-name="T7">token</text:span><text:span text:style-name="T6">){</text:span></text:p>
      <text:p text:style-name="P33">        <text:span text:style-name="T5">this</text:span><text:span text:style-name="T6">.</text:span><text:span text:style-name="T7">token</text:span><text:span text:style-name="T6"> = </text:span><text:span text:style-name="T7">token</text:span><text:span text:style-name="T6">;</text:span></text:p>
      <text:p text:style-name="P33">        <text:span text:style-name="T5">this</text:span><text:span text:style-name="T6">.</text:span><text:span text:style-name="T7">_jobToken</text:span><text:span text:style-name="T6"> = </text:span><text:span text:style-name="T7">token</text:span><text:span text:style-name="T6">;</text:span></text:p>
      <text:p text:style-name="P33">        <text:span text:style-name="T5">this</text:span><text:span text:style-name="T6">.</text:span><text:span text:style-name="T8">_normalize</text:span><text:span text:style-name="T6">()</text:span></text:p>
      <text:p text:style-name="P33">        <text:span text:style-name="T5">this</text:span><text:span text:style-name="T6">.</text:span><text:span text:style-name="T8">_extractData</text:span><text:span text:style-name="T6">()</text:span></text:p>
      <text:p text:style-name="P33">    <text:span text:style-name="T6">}</text:span></text:p>
      <text:p text:style-name="P40"/>
      <text:p text:style-name="P33">    <text:span text:style-name="T8">_normalize</text:span><text:span text:style-name="T6">(){</text:span></text:p>
      <text:p text:style-name="P33">        <text:span text:style-name="T5">let</text:span><text:span text:style-name="T6"> </text:span><text:span text:style-name="T7">parts</text:span><text:span text:style-name="T6"> = </text:span><text:span text:style-name="T5">this</text:span><text:span text:style-name="T6">.</text:span><text:span text:style-name="T7">token</text:span><text:span text:style-name="T6">.</text:span><text:span text:style-name="T8">split</text:span><text:span text:style-name="T6">(</text:span><text:span text:style-name="T9">' '</text:span><text:span text:style-name="T6">);</text:span></text:p>
      <text:p text:style-name="P33">        <text:span text:style-name="T5">this</text:span><text:span text:style-name="T6">.</text:span><text:span text:style-name="T7">prefix</text:span><text:span text:style-name="T6"> = </text:span><text:span text:style-name="T9">''</text:span></text:p>
      <text:p text:style-name="P33">        <text:span text:style-name="T12">if</text:span><text:span text:style-name="T6">(</text:span><text:span text:style-name="T7">parts</text:span><text:span text:style-name="T6">.</text:span><text:span text:style-name="T7">length</text:span><text:span text:style-name="T6"> == </text:span><text:span text:style-name="T13">2</text:span><text:span text:style-name="T6">){</text:span></text:p>
      <text:p text:style-name="P33">            <text:span text:style-name="T5">this</text:span><text:span text:style-name="T6">.</text:span><text:span text:style-name="T7">prefix</text:span><text:span text:style-name="T6"> = </text:span><text:span text:style-name="T7">parts</text:span><text:span text:style-name="T6">[</text:span><text:span text:style-name="T13">0</text:span><text:span text:style-name="T6">] + </text:span><text:span text:style-name="T9">' '</text:span></text:p>
      <text:p text:style-name="P33">            <text:span text:style-name="T5">this</text:span><text:span text:style-name="T6">.</text:span><text:span text:style-name="T7">_jobToken</text:span><text:span text:style-name="T6"> = </text:span><text:span text:style-name="T7">parts</text:span><text:span text:style-name="T6">[</text:span><text:span text:style-name="T13">1</text:span><text:span text:style-name="T6">]</text:span></text:p>
      <text:p text:style-name="P33">        <text:span text:style-name="T6">}</text:span></text:p>
      <text:p text:style-name="P33">    <text:span text:style-name="T6">}</text:span></text:p>
      <text:p text:style-name="P40"/>
      <text:p text:style-name="P33">    <text:span text:style-name="T8">_extractData</text:span><text:span text:style-name="T6">(){</text:span></text:p>
      <text:p text:style-name="P33">        <text:span text:style-name="T5">let</text:span><text:span text:style-name="T6"> </text:span><text:span text:style-name="T7">jwt</text:span><text:span text:style-name="T6"> = </text:span><text:span text:style-name="T5">this</text:span><text:span text:style-name="T6">.</text:span><text:span text:style-name="T7">_jobToken</text:span><text:span text:style-name="T6">.</text:span><text:span text:style-name="T8">split</text:span><text:span text:style-name="T6">(</text:span><text:span text:style-name="T9">'.'</text:span><text:span text:style-name="T6">)</text:span></text:p>
      <text:p text:style-name="P33">        <text:span text:style-name="T5">this</text:span><text:span text:style-name="T6">.</text:span><text:span text:style-name="T7">_header</text:span><text:span text:style-name="T6"> = </text:span><text:span text:style-name="T5">this</text:span><text:span text:style-name="T6">.</text:span><text:span text:style-name="T8">_parse</text:span><text:span text:style-name="T6">(</text:span><text:span text:style-name="T7">jwt</text:span><text:span text:style-name="T6">[</text:span><text:span text:style-name="T13">0</text:span><text:span text:style-name="T6">])</text:span></text:p>
      <text:p text:style-name="P33">        <text:span text:style-name="T5">this</text:span><text:span text:style-name="T6">.</text:span><text:span text:style-name="T7">_payload</text:span><text:span text:style-name="T6"> = </text:span><text:span text:style-name="T5">this</text:span><text:span text:style-name="T6">.</text:span><text:span text:style-name="T8">_parse</text:span><text:span text:style-name="T6">(</text:span><text:span text:style-name="T7">jwt</text:span><text:span text:style-name="T6">[</text:span><text:span text:style-name="T13">1</text:span><text:span text:style-name="T6">])</text:span></text:p>
      <text:p text:style-name="P33">        <text:span text:style-name="T5">this</text:span><text:span text:style-name="T6">.</text:span><text:span text:style-name="T7">_signature</text:span><text:span text:style-name="T6"> = </text:span><text:span text:style-name="T7">jwt</text:span><text:span text:style-name="T6">[</text:span><text:span text:style-name="T13">2</text:span><text:span text:style-name="T6">]</text:span></text:p>
      <text:p text:style-name="P33">    <text:span text:style-name="T6">}</text:span></text:p>
      <text:p text:style-name="P40"/>
      <text:p text:style-name="P33">    <text:span text:style-name="T8">_parse</text:span><text:span text:style-name="T6">(</text:span><text:span text:style-name="T7">tokenPart</text:span><text:span text:style-name="T6">){</text:span></text:p>
      <text:p text:style-name="P33">        <text:span text:style-name="T12">return</text:span><text:span text:style-name="T6"> </text:span><text:span text:style-name="T7">JSON</text:span><text:span text:style-name="T6">.</text:span><text:span text:style-name="T8">parse</text:span><text:span text:style-name="T6">(</text:span><text:span text:style-name="T8">fromBase64</text:span><text:span text:style-name="T6">(</text:span><text:span text:style-name="T7">tokenPart</text:span><text:span text:style-name="T6">))</text:span></text:p>
      <text:p text:style-name="P33">    <text:span text:style-name="T6">}</text:span></text:p>
      <text:p text:style-name="P40"><text:soft-page-break/></text:p>
      <text:p text:style-name="P33">    <text:span text:style-name="T8">getHeader</text:span><text:span text:style-name="T6">(</text:span><text:span text:style-name="T7">headerName</text:span><text:span text:style-name="T6">){</text:span></text:p>
      <text:p text:style-name="P33">        <text:span text:style-name="T12">return</text:span><text:span text:style-name="T6"> </text:span><text:span text:style-name="T7">headerName</text:span><text:span text:style-name="T6">? </text:span><text:span text:style-name="T5">this</text:span><text:span text:style-name="T6">.</text:span><text:span text:style-name="T7">_header</text:span><text:span text:style-name="T6">[</text:span><text:span text:style-name="T7">headerName</text:span><text:span text:style-name="T6">] : </text:span><text:span text:style-name="T5">this</text:span><text:span text:style-name="T6">.</text:span><text:span text:style-name="T7">_header</text:span></text:p>
      <text:p text:style-name="P33">    <text:span text:style-name="T6">}</text:span></text:p>
      <text:p text:style-name="P40"/>
      <text:p text:style-name="P33">    <text:span text:style-name="T8">getClaim</text:span><text:span text:style-name="T6">(</text:span><text:span text:style-name="T7">claimName</text:span><text:span text:style-name="T6">){</text:span></text:p>
      <text:p text:style-name="P33">        <text:span text:style-name="T12">return</text:span><text:span text:style-name="T6"> </text:span><text:span text:style-name="T5">this</text:span><text:span text:style-name="T6">.</text:span><text:span text:style-name="T7">_payload</text:span><text:span text:style-name="T6">[</text:span><text:span text:style-name="T7">claimName</text:span><text:span text:style-name="T6">]</text:span></text:p>
      <text:p text:style-name="P33">    <text:span text:style-name="T6">}</text:span></text:p>
      <text:p text:style-name="P40"/>
      <text:p text:style-name="P33">    <text:span text:style-name="T8">getPayload</text:span><text:span text:style-name="T6">(){</text:span></text:p>
      <text:p text:style-name="P33">        <text:span text:style-name="T12">return</text:span><text:span text:style-name="T6"> </text:span><text:span text:style-name="T5">this</text:span><text:span text:style-name="T6">.</text:span><text:span text:style-name="T7">_payload</text:span></text:p>
      <text:p text:style-name="P33">    <text:span text:style-name="T6">}</text:span></text:p>
      <text:p text:style-name="P40"/>
      <text:p text:style-name="P33">    <text:span text:style-name="T8">getToken</text:span><text:span text:style-name="T6">(){</text:span></text:p>
      <text:p text:style-name="P33">        <text:span text:style-name="T12">return</text:span><text:span text:style-name="T6"> </text:span><text:span text:style-name="T5">this</text:span><text:span text:style-name="T6">.</text:span><text:span text:style-name="T7">_token</text:span></text:p>
      <text:p text:style-name="P33">    <text:span text:style-name="T6">}</text:span></text:p>
      <text:p text:style-name="P40"/>
      <text:p text:style-name="P33">    <text:span text:style-name="T8">isExpired</text:span><text:span text:style-name="T6">(){</text:span></text:p>
      <text:p text:style-name="P33">        <text:span text:style-name="T5">let</text:span><text:span text:style-name="T6"> </text:span><text:span text:style-name="T7">now</text:span><text:span text:style-name="T6"> = </text:span><text:span text:style-name="T5">new</text:span><text:span text:style-name="T6"> </text:span><text:span text:style-name="T16">Date</text:span><text:span text:style-name="T6">(),</text:span></text:p>
      <text:p text:style-name="P33">            <text:span text:style-name="T7">len</text:span><text:span text:style-name="T6"> = (</text:span><text:span text:style-name="T7">now</text:span><text:span text:style-name="T6">.</text:span><text:span text:style-name="T8">getTime</text:span><text:span text:style-name="T6">()+</text:span><text:span text:style-name="T9">''</text:span><text:span text:style-name="T6">).</text:span><text:span text:style-name="T11">length</text:span><text:span text:style-name="T6">,</text:span></text:p>
      <text:p text:style-name="P33">            <text:span text:style-name="T7">exp</text:span><text:span text:style-name="T6"> = +(</text:span><text:span text:style-name="T5">this</text:span><text:span text:style-name="T6">.</text:span><text:span text:style-name="T7">_payload</text:span><text:span text:style-name="T6">.</text:span><text:span text:style-name="T7">exp</text:span><text:span text:style-name="T6">+</text:span><text:span text:style-name="T9">''</text:span><text:span text:style-name="T6">).</text:span><text:span text:style-name="T8">replace</text:span><text:span text:style-name="T6">(</text:span><text:span text:style-name="T9">'.'</text:span><text:span text:style-name="T6">,</text:span><text:span text:style-name="T9">''</text:span><text:span text:style-name="T6">).</text:span><text:span text:style-name="T8">padEnd</text:span><text:span text:style-name="T6">(</text:span><text:span text:style-name="T7">len</text:span><text:span text:style-name="T6">, </text:span><text:span text:style-name="T9">'0'</text:span><text:span text:style-name="T6">).</text:span><text:span text:style-name="T8">substring</text:span><text:span text:style-name="T6">(</text:span><text:span text:style-name="T13">0</text:span><text:span text:style-name="T6">, </text:span><text:span text:style-name="T13">13</text:span><text:span text:style-name="T6">);</text:span></text:p>
      <text:p text:style-name="P33">        <text:span text:style-name="T12">if</text:span><text:span text:style-name="T6">(!</text:span><text:span text:style-name="T8">isNaN</text:span><text:span text:style-name="T6">(</text:span><text:span text:style-name="T7">exp</text:span><text:span text:style-name="T6">)) </text:span><text:span text:style-name="T12">return</text:span><text:span text:style-name="T6"> </text:span><text:span text:style-name="T5">new</text:span><text:span text:style-name="T6"> </text:span><text:span text:style-name="T16">Date</text:span><text:span text:style-name="T6">(</text:span><text:span text:style-name="T7">exp</text:span><text:span text:style-name="T6">) &lt; </text:span><text:span text:style-name="T7">now</text:span><text:span text:style-name="T6">;</text:span></text:p>
      <text:p text:style-name="P33">        <text:span text:style-name="T12">return</text:span><text:span text:style-name="T6"> </text:span><text:span text:style-name="T5">false</text:span></text:p>
      <text:p text:style-name="P33">    <text:span text:style-name="T6">}</text:span></text:p>
      <text:p text:style-name="P34">}</text:p>
      <text:p text:style-name="P101"/>
      <text:p text:style-name="P102">Explaining the constructor:</text:p>
      <text:p text:style-name="P103">constructor(token)</text:p>
      <text:p text:style-name="P103"><text:span text:style-name="T23">token</text:span>: the token to be parsed</text:p>
      <text:p text:style-name="P103"/>
      <text:p text:style-name="P104">Private methods can have their implementation studied separately.</text:p>
      <text:p text:style-name="P104">The remaining methods are expressive names and do what they were named for.</text:p>
      <text:p text:style-name="P105"/>
      <text:p text:style-name="P105"/>
      <text:p text:style-name="P45"/>
      <text:p text:style-name="P45"/>
      <text:p text:style-name="P98">=======================================================================</text:p>
      <text:p text:style-name="P99">CLASSE DE <text:span text:style-name="T36">SimpleSearch</text:span></text:p>
      <text:p text:style-name="P99">=======================================================================</text:p>
      <text:p text:style-name="P45"/>
      <text:p text:style-name="P30"/>
      <text:p text:style-name="P32"><text:span text:style-name="T3">class</text:span> <text:span text:style-name="T4">SimpleSearch</text:span>{</text:p>
      <text:p text:style-name="P33">    <text:span text:style-name="T5">constructor</text:span><text:span text:style-name="T6">(</text:span><text:span text:style-name="T7">subPath</text:span><text:span text:style-name="T6">, </text:span><text:span text:style-name="T7">value</text:span><text:span text:style-name="T6">, </text:span><text:span text:style-name="T7">page</text:span><text:span text:style-name="T6"> = </text:span><text:span text:style-name="T13">0</text:span><text:span text:style-name="T6">, </text:span><text:span text:style-name="T7">linesPerPage</text:span><text:span text:style-name="T6"> = </text:span><text:span text:style-name="T13">12</text:span><text:span text:style-name="T6">, </text:span><text:span text:style-name="T7">orderBy</text:span><text:span text:style-name="T6"> = </text:span><text:span text:style-name="T9">''</text:span><text:span text:style-name="T6">, </text:span><text:span text:style-name="T7">direction</text:span><text:span text:style-name="T6"> = </text:span><text:span text:style-name="T9">'ASC'</text:span><text:span text:style-name="T6">){</text:span></text:p>
      <text:p text:style-name="P33">        <text:span text:style-name="T8">overJson</text:span><text:span text:style-name="T6">({</text:span><text:span text:style-name="T7">subPath</text:span><text:span text:style-name="T6">, </text:span><text:span text:style-name="T7">value</text:span><text:span text:style-name="T6">, </text:span><text:span text:style-name="T7">page</text:span><text:span text:style-name="T6">, </text:span><text:span text:style-name="T7">linesPerPage</text:span><text:span text:style-name="T6">, </text:span><text:span text:style-name="T7">orderBy</text:span><text:span text:style-name="T6">, </text:span><text:span text:style-name="T7">direction</text:span><text:span text:style-name="T6">}, </text:span><text:span text:style-name="T5">this</text:span><text:span text:style-name="T6">)</text:span></text:p>
      <text:p text:style-name="P33">    <text:span text:style-name="T6">}</text:span></text:p>
      <text:p text:style-name="P34">}</text:p>
      <text:p text:style-name="P30"/>
      <text:p text:style-name="P106">Used for submitting research requests, it is a simple organizer.</text:p>
      <text:p text:style-name="P107">Explaining the constructor</text:p>
      <text:p text:style-name="P106"><text:soft-page-break/>constructor(subPath, value, page = 0, linesPerPage = 12, orderBy = “”, direction = ‘ASC’)</text:p>
      <text:p text:style-name="P107"><text:span text:style-name="T23">subPath</text:span>: resource where the search will be performed on the target API.</text:p>
      <text:p text:style-name="P107"><text:span text:style-name="T23">value</text:span>: the terms to be searched</text:p>
      <text:p text:style-name="P107"><text:span text:style-name="T23">page</text:span>: current page of pagination</text:p>
      <text:p text:style-name="P107"><text:span text:style-name="T23">linesPerPage</text:span>: lines per page of pagination</text:p>
      <text:p text:style-name="P107"><text:span text:style-name="T23">orderBy</text:span>: property for which you wish to perform the ordering</text:p>
      <text:p text:style-name="P107"><text:span text:style-name="T23">direction</text:span>: direction of the ordering</text:p>
      <text:p text:style-name="P108"/>
      <text:p text:style-name="P108"/>
      <text:p text:style-name="P109"/>
      <text:p text:style-name="P98">=======================================================================</text:p>
      <text:p text:style-name="P99">CLASSE DE <text:span text:style-name="T36">JTable</text:span></text:p>
      <text:p text:style-name="P99">=======================================================================</text:p>
      <text:p text:style-name="P110"/>
      <text:p text:style-name="P111"><text:span text:style-name="T3">class</text:span> <text:span text:style-name="T4">JTable</text:span> <text:span text:style-name="T3">extends</text:span> <text:span text:style-name="T4">JView</text:span>{</text:p>
      <text:p text:style-name="P40"/>
      <text:p text:style-name="P33">    <text:span text:style-name="T5">constructor</text:span><text:span text:style-name="T6">(...</text:span><text:span text:style-name="T7">columns</text:span><text:span text:style-name="T6">){</text:span></text:p>
      <text:p text:style-name="P33">        <text:span text:style-name="T5">super</text:span><text:span text:style-name="T6">().</text:span><text:span text:style-name="T8">mount_</text:span><text:span text:style-name="T6">()</text:span></text:p>
      <text:p text:style-name="P33">        <text:span text:style-name="T5">this</text:span><text:span text:style-name="T6">.</text:span><text:span text:style-name="T8">_loadData</text:span><text:span text:style-name="T6">(</text:span><text:span text:style-name="T7">columns</text:span><text:span text:style-name="T6">)</text:span></text:p>
      <text:p text:style-name="P33">    <text:span text:style-name="T6">}</text:span></text:p>
      <text:p text:style-name="P40"/>
      <text:p text:style-name="P33">    <text:span text:style-name="T8">_init</text:span><text:span text:style-name="T6">(){</text:span></text:p>
      <text:p text:style-name="P33">        <text:span text:style-name="T11">A</text:span><text:span text:style-name="T6">.</text:span><text:span text:style-name="T8">table</text:span><text:span text:style-name="T6">(</text:span><text:span text:style-name="T9">'table'</text:span><text:span text:style-name="T6">).</text:span><text:span text:style-name="T8">a</text:span><text:span text:style-name="T6">(</text:span></text:p>
      <text:p text:style-name="P33">            <text:span text:style-name="T11">A</text:span><text:span text:style-name="T6">.</text:span><text:span text:style-name="T8">thead</text:span><text:span text:style-name="T6">(</text:span><text:span text:style-name="T9">'head'</text:span><text:span text:style-name="T6">),</text:span></text:p>
      <text:p text:style-name="P33">            <text:span text:style-name="T11">A</text:span><text:span text:style-name="T6">.</text:span><text:span text:style-name="T8">tbody</text:span><text:span text:style-name="T6">(</text:span><text:span text:style-name="T9">'body'</text:span><text:span text:style-name="T6">),</text:span></text:p>
      <text:p text:style-name="P33">            <text:span text:style-name="T11">A</text:span><text:span text:style-name="T6">.</text:span><text:span text:style-name="T8">tfoot</text:span><text:span text:style-name="T6">(</text:span><text:span text:style-name="T9">'foot'</text:span><text:span text:style-name="T6">)</text:span></text:p>
      <text:p text:style-name="P33">        <text:span text:style-name="T6">)</text:span></text:p>
      <text:p text:style-name="P33">    <text:span text:style-name="T6">}</text:span></text:p>
      <text:p text:style-name="P40"/>
      <text:p text:style-name="P33">    <text:span text:style-name="T8">_loadData</text:span><text:span text:style-name="T6">(</text:span><text:span text:style-name="T7">columns</text:span><text:span text:style-name="T6">){</text:span></text:p>
      <text:p text:style-name="P33">        <text:span text:style-name="T7">columns</text:span><text:span text:style-name="T6">.</text:span><text:span text:style-name="T7">length</text:span><text:span text:style-name="T6"> &amp;&amp; </text:span><text:span text:style-name="T5">this</text:span><text:span text:style-name="T6">.</text:span><text:span text:style-name="T8">setHeadRowFromItems</text:span><text:span text:style-name="T6">(</text:span><text:span text:style-name="T8">asArray</text:span><text:span text:style-name="T6">(</text:span><text:span text:style-name="T7">columns</text:span><text:span text:style-name="T6">))</text:span></text:p>
      <text:p text:style-name="P33">    <text:span text:style-name="T6">}</text:span></text:p>
      <text:p text:style-name="P40"/>
      <text:p text:style-name="P33">    <text:span text:style-name="T8">clearBody</text:span><text:span text:style-name="T6">(){ </text:span><text:span text:style-name="T8">removeChildren</text:span><text:span text:style-name="T6">(</text:span><text:span text:style-name="T5">this</text:span><text:span text:style-name="T6">.</text:span><text:span text:style-name="T7">$body</text:span><text:span text:style-name="T6">)}</text:span></text:p>
      <text:p text:style-name="P40"/>
      <text:p text:style-name="P33">    <text:span text:style-name="T8">reloadBody</text:span><text:span text:style-name="T6">(</text:span><text:span text:style-name="T7">doOverRows</text:span><text:span text:style-name="T6">){</text:span></text:p>
      <text:p text:style-name="P33">        <text:span text:style-name="T5">let</text:span><text:span text:style-name="T6"> </text:span><text:span text:style-name="T7">rows</text:span><text:span text:style-name="T6"> = </text:span><text:span text:style-name="T5">this</text:span><text:span text:style-name="T6">.</text:span><text:span text:style-name="T8">getBodyRows</text:span><text:span text:style-name="T6">();</text:span></text:p>
      <text:p text:style-name="P33">        <text:span text:style-name="T8">doOverRows</text:span><text:span text:style-name="T6">?.(</text:span><text:span text:style-name="T7">rows</text:span><text:span text:style-name="T6">)</text:span></text:p>
      <text:p text:style-name="P33">        <text:span text:style-name="T5">this</text:span><text:span text:style-name="T6">.</text:span><text:span text:style-name="T8">clearBody</text:span><text:span text:style-name="T6">()</text:span></text:p>
      <text:p text:style-name="P33">        <text:span text:style-name="T7">rows</text:span><text:span text:style-name="T6">.</text:span><text:span text:style-name="T8">forEach</text:span><text:span text:style-name="T6">(</text:span><text:span text:style-name="T7">row</text:span><text:span text:style-name="T6"> </text:span><text:span text:style-name="T5">=&gt;</text:span><text:span text:style-name="T6"> </text:span><text:span text:style-name="T5">this</text:span><text:span text:style-name="T6">.</text:span><text:span text:style-name="T8">addBodyRow</text:span><text:span text:style-name="T6">(</text:span><text:span text:style-name="T7">row</text:span><text:span text:style-name="T6">))</text:span></text:p>
      <text:p text:style-name="P33">    <text:span text:style-name="T6">}</text:span></text:p>
      <text:p text:style-name="P40"/>
      <text:p text:style-name="P33">    <text:span text:style-name="T8">getHeadRow</text:span><text:span text:style-name="T6"> = () </text:span><text:span text:style-name="T5">=&gt;</text:span><text:span text:style-name="T6"> </text:span><text:span text:style-name="T5">this</text:span><text:span text:style-name="T6">.</text:span><text:span text:style-name="T7">$head</text:span><text:span text:style-name="T6">.</text:span><text:span text:style-name="T7">firstChild</text:span></text:p>
      <text:p text:style-name="P40"/>
      <text:p text:style-name="P33">    <text:span text:style-name="T8">getBodyRows</text:span><text:span text:style-name="T6"> = () </text:span><text:span text:style-name="T5">=&gt;</text:span><text:span text:style-name="T6"> [... </text:span><text:span text:style-name="T5">this</text:span><text:span text:style-name="T6">.</text:span><text:span text:style-name="T7">$body</text:span><text:span text:style-name="T6">.</text:span><text:span text:style-name="T7">children</text:span><text:span text:style-name="T6">]</text:span></text:p>
      <text:p text:style-name="P40"/>
      <text:p text:style-name="P33">    <text:span text:style-name="T8">getFootRow</text:span><text:span text:style-name="T6"> = () </text:span><text:span text:style-name="T5">=&gt;</text:span><text:span text:style-name="T6"> </text:span><text:span text:style-name="T5">this</text:span><text:span text:style-name="T6">.</text:span><text:span text:style-name="T7">$foot</text:span><text:span text:style-name="T6">.</text:span><text:span text:style-name="T7">firstChild</text:span></text:p>
      <text:p text:style-name="P40"/>
      <text:p text:style-name="P33">    <text:span text:style-name="T8">zebrar</text:span><text:span text:style-name="T6">(</text:span><text:span text:style-name="T7">startIndex</text:span><text:span text:style-name="T6"> = </text:span><text:span text:style-name="T13">1</text:span><text:span text:style-name="T6">, </text:span><text:span text:style-name="T7">step</text:span><text:span text:style-name="T6"> = </text:span><text:span text:style-name="T13">2</text:span><text:span text:style-name="T6">){</text:span></text:p>
      <text:p text:style-name="P33">        <text:span text:style-name="T5">this</text:span><text:span text:style-name="T6">.</text:span><text:span text:style-name="T8">getBodyRows</text:span><text:span text:style-name="T6">().</text:span><text:span text:style-name="T8">forEach</text:span><text:span text:style-name="T6">((</text:span><text:span text:style-name="T7">row</text:span><text:span text:style-name="T6">, </text:span><text:span text:style-name="T7">index</text:span><text:span text:style-name="T6">) </text:span><text:span text:style-name="T5">=&gt;</text:span><text:span text:style-name="T6"> {</text:span></text:p>
      <text:p text:style-name="P33">            <text:span text:style-name="T5">this</text:span><text:span text:style-name="T6">.</text:span><text:span text:style-name="T8">removeClasses_</text:span><text:span text:style-name="T6">(</text:span><text:span text:style-name="T7">row</text:span><text:span text:style-name="T6">, </text:span><text:span text:style-name="T9">'zebrar'</text:span><text:span text:style-name="T6">)</text:span></text:p>
      <text:p text:style-name="P33"><text:soft-page-break/>            <text:span text:style-name="T12">if</text:span><text:span text:style-name="T6">(</text:span><text:span text:style-name="T7">index</text:span><text:span text:style-name="T6"> == </text:span><text:span text:style-name="T7">startIndex</text:span><text:span text:style-name="T6">){</text:span></text:p>
      <text:p text:style-name="P33">                <text:span text:style-name="T5">this</text:span><text:span text:style-name="T6">.</text:span><text:span text:style-name="T8">insertClasses_</text:span><text:span text:style-name="T6">(</text:span><text:span text:style-name="T7">row</text:span><text:span text:style-name="T6">, </text:span><text:span text:style-name="T9">'zebrar'</text:span><text:span text:style-name="T6">)</text:span></text:p>
      <text:p text:style-name="P33">                <text:span text:style-name="T7">startIndex</text:span><text:span text:style-name="T6"> += </text:span><text:span text:style-name="T7">step</text:span></text:p>
      <text:p text:style-name="P33">            <text:span text:style-name="T6">} </text:span></text:p>
      <text:p text:style-name="P33">        <text:span text:style-name="T6">})</text:span></text:p>
      <text:p text:style-name="P33">        <text:span text:style-name="T12">return</text:span><text:span text:style-name="T6"> </text:span><text:span text:style-name="T5">this</text:span></text:p>
      <text:p text:style-name="P33">    <text:span text:style-name="T6">}</text:span></text:p>
      <text:p text:style-name="P40"/>
      <text:p text:style-name="P33">    <text:span text:style-name="T8">setHeadRowFromItems</text:span><text:span text:style-name="T6">(</text:span><text:span text:style-name="T7">elements</text:span><text:span text:style-name="T6">, </text:span><text:span text:style-name="T7">applyItemFunction</text:span><text:span text:style-name="T6">, </text:span><text:span text:style-name="T7">applyRowFunction</text:span><text:span text:style-name="T6">){</text:span></text:p>
      <text:p text:style-name="P33">        <text:span text:style-name="T12">return</text:span><text:span text:style-name="T6"> </text:span><text:span text:style-name="T5">this</text:span><text:span text:style-name="T6">.</text:span><text:span text:style-name="T8">_createRow</text:span><text:span text:style-name="T6">(</text:span><text:span text:style-name="T7">elements</text:span><text:span text:style-name="T6">, </text:span><text:span text:style-name="T7">applyRowFunction</text:span><text:span text:style-name="T6">, </text:span><text:span text:style-name="T7">applyItemFunction</text:span><text:span text:style-name="T6">, </text:span><text:span text:style-name="T5">this</text:span><text:span text:style-name="T6">.</text:span><text:span text:style-name="T8">setHeadRow</text:span><text:span text:style-name="T6">, [</text:span><text:span text:style-name="T9">'th'</text:span><text:span text:style-name="T6">])</text:span></text:p>
      <text:p text:style-name="P33">    <text:span text:style-name="T6">}</text:span></text:p>
      <text:p text:style-name="P40"/>
      <text:p text:style-name="P33">    <text:span text:style-name="T8">setHeadRow</text:span><text:span text:style-name="T6"> = (</text:span><text:span text:style-name="T7">rowElement</text:span><text:span text:style-name="T6">, </text:span><text:span text:style-name="T7">applyRowFunction</text:span><text:span text:style-name="T6">) </text:span><text:span text:style-name="T5">=&gt;</text:span><text:span text:style-name="T6">{</text:span></text:p>
      <text:p text:style-name="P33">        <text:span text:style-name="T8">removeChildren</text:span><text:span text:style-name="T6">(</text:span><text:span text:style-name="T5">this</text:span><text:span text:style-name="T6">.</text:span><text:span text:style-name="T7">$head</text:span><text:span text:style-name="T6">)</text:span></text:p>
      <text:p text:style-name="P33">        <text:span text:style-name="T12">return</text:span><text:span text:style-name="T6"> </text:span><text:span text:style-name="T5">this</text:span><text:span text:style-name="T6">.</text:span><text:span text:style-name="T8">_addRow</text:span><text:span text:style-name="T6">(</text:span><text:span text:style-name="T7">rowElement</text:span><text:span text:style-name="T6">, </text:span><text:span text:style-name="T5">this</text:span><text:span text:style-name="T6">.</text:span><text:span text:style-name="T7">$head</text:span><text:span text:style-name="T6">, </text:span><text:span text:style-name="T7">applyRowFunction</text:span><text:span text:style-name="T6">, [</text:span><text:span text:style-name="T9">'row'</text:span><text:span text:style-name="T6">, </text:span><text:span text:style-name="T9">'head_row'</text:span><text:span text:style-name="T6">])</text:span></text:p>
      <text:p text:style-name="P33">    <text:span text:style-name="T6">}</text:span></text:p>
      <text:p text:style-name="P40"/>
      <text:p text:style-name="P33">    <text:span text:style-name="T8">addBodyRowFromItems</text:span><text:span text:style-name="T6">(</text:span><text:span text:style-name="T7">elements</text:span><text:span text:style-name="T6">, </text:span><text:span text:style-name="T7">applyItemFunction</text:span><text:span text:style-name="T6">, </text:span><text:span text:style-name="T7">applyRowFunction</text:span><text:span text:style-name="T6">){</text:span></text:p>
      <text:p text:style-name="P33">        <text:span text:style-name="T12">return</text:span><text:span text:style-name="T6"> </text:span><text:span text:style-name="T5">this</text:span><text:span text:style-name="T6">.</text:span><text:span text:style-name="T8">_createRow</text:span><text:span text:style-name="T6">(</text:span><text:span text:style-name="T7">elements</text:span><text:span text:style-name="T6">, </text:span><text:span text:style-name="T7">applyRowFunction</text:span><text:span text:style-name="T6">, </text:span><text:span text:style-name="T7">applyItemFunction</text:span><text:span text:style-name="T6">, </text:span><text:span text:style-name="T5">this</text:span><text:span text:style-name="T6">.</text:span><text:span text:style-name="T8">addBodyRow</text:span><text:span text:style-name="T6">, [</text:span><text:span text:style-name="T9">'td'</text:span><text:span text:style-name="T6">, </text:span><text:span text:style-name="T9">'body_td'</text:span><text:span text:style-name="T6">])</text:span></text:p>
      <text:p text:style-name="P33">    <text:span text:style-name="T6">}</text:span></text:p>
      <text:p text:style-name="P40"/>
      <text:p text:style-name="P33">    <text:span text:style-name="T8">addBodyRow</text:span><text:span text:style-name="T6"> = (</text:span><text:span text:style-name="T7">rowElement</text:span><text:span text:style-name="T6">, </text:span><text:span text:style-name="T7">applyRowFunction</text:span><text:span text:style-name="T6">) </text:span><text:span text:style-name="T5">=&gt;</text:span><text:span text:style-name="T6"> {</text:span></text:p>
      <text:p text:style-name="P33">        <text:span text:style-name="T12">return</text:span><text:span text:style-name="T6"> </text:span><text:span text:style-name="T5">this</text:span><text:span text:style-name="T6">.</text:span><text:span text:style-name="T8">_addRow</text:span><text:span text:style-name="T6">(</text:span><text:span text:style-name="T7">rowElement</text:span><text:span text:style-name="T6">, </text:span><text:span text:style-name="T5">this</text:span><text:span text:style-name="T6">.</text:span><text:span text:style-name="T7">$body</text:span><text:span text:style-name="T6">, </text:span><text:span text:style-name="T7">applyRowFunction</text:span><text:span text:style-name="T6">, [</text:span><text:span text:style-name="T9">'row'</text:span><text:span text:style-name="T6">, </text:span><text:span text:style-name="T9">'body_row'</text:span><text:span text:style-name="T6">])</text:span></text:p>
      <text:p text:style-name="P33">    <text:span text:style-name="T6">}</text:span></text:p>
      <text:p text:style-name="P40"/>
      <text:p text:style-name="P33">    <text:span text:style-name="T8">setFootRowFromItems</text:span><text:span text:style-name="T6">(</text:span><text:span text:style-name="T7">elements</text:span><text:span text:style-name="T6">, </text:span><text:span text:style-name="T7">applyItemFunction</text:span><text:span text:style-name="T6">, </text:span><text:span text:style-name="T7">applyRowFunction</text:span><text:span text:style-name="T6">){</text:span></text:p>
      <text:p text:style-name="P33">        <text:span text:style-name="T12">return</text:span><text:span text:style-name="T6"> </text:span><text:span text:style-name="T5">this</text:span><text:span text:style-name="T6">.</text:span><text:span text:style-name="T8">_createRow</text:span><text:span text:style-name="T6">(</text:span><text:span text:style-name="T7">elements</text:span><text:span text:style-name="T6">, </text:span><text:span text:style-name="T7">applyRowFunction</text:span><text:span text:style-name="T6">, </text:span><text:span text:style-name="T7">applyItemFunction</text:span><text:span text:style-name="T6">, </text:span><text:span text:style-name="T5">this</text:span><text:span text:style-name="T6">.</text:span><text:span text:style-name="T8">setFootRow</text:span><text:span text:style-name="T6">, [</text:span><text:span text:style-name="T9">'td'</text:span><text:span text:style-name="T6">, </text:span><text:span text:style-name="T9">'foot_td'</text:span><text:span text:style-name="T6">])</text:span></text:p>
      <text:p text:style-name="P33">    <text:span text:style-name="T6">}  </text:span></text:p>
      <text:p text:style-name="P40"/>
      <text:p text:style-name="P33">    <text:span text:style-name="T8">setFootRow</text:span><text:span text:style-name="T6"> = (</text:span><text:span text:style-name="T7">rowElement</text:span><text:span text:style-name="T6">, </text:span><text:span text:style-name="T7">applyRowFunction</text:span><text:span text:style-name="T6">) </text:span><text:span text:style-name="T5">=&gt;</text:span><text:span text:style-name="T6"> {</text:span></text:p>
      <text:p text:style-name="P33">        <text:span text:style-name="T8">removeChildren</text:span><text:span text:style-name="T6">(</text:span><text:span text:style-name="T5">this</text:span><text:span text:style-name="T6">.</text:span><text:span text:style-name="T7">$foot</text:span><text:span text:style-name="T6">)</text:span></text:p>
      <text:p text:style-name="P33">        <text:span text:style-name="T12">return</text:span><text:span text:style-name="T6"> </text:span><text:span text:style-name="T5">this</text:span><text:span text:style-name="T6">.</text:span><text:span text:style-name="T8">_addRow</text:span><text:span text:style-name="T6">(</text:span><text:span text:style-name="T7">rowElement</text:span><text:span text:style-name="T6">, </text:span><text:span text:style-name="T5">this</text:span><text:span text:style-name="T6">.</text:span><text:span text:style-name="T7">$foot</text:span><text:span text:style-name="T6">, </text:span><text:span text:style-name="T7">applyRowFunction</text:span><text:span text:style-name="T6">, [</text:span><text:span text:style-name="T9">'row'</text:span><text:span text:style-name="T6">, </text:span><text:span text:style-name="T9">'foot_row'</text:span><text:span text:style-name="T6">])</text:span></text:p>
      <text:p text:style-name="P33">    <text:span text:style-name="T6">}</text:span></text:p>
      <text:p text:style-name="P40"/>
      <text:p text:style-name="P33">    <text:span text:style-name="T8">_createRow</text:span><text:span text:style-name="T6">(</text:span><text:span text:style-name="T7">elements</text:span><text:span text:style-name="T6">, </text:span><text:span text:style-name="T7">applyRowFunction</text:span><text:span text:style-name="T6">, </text:span><text:span text:style-name="T7">applyItemFunction</text:span><text:span text:style-name="T6">, </text:span><text:span text:style-name="T7">addMethod</text:span><text:span text:style-name="T6">, </text:span><text:span text:style-name="T7">clsItem</text:span><text:span text:style-name="T6">){</text:span></text:p>
      <text:p text:style-name="P33">        <text:span text:style-name="T5">let</text:span><text:span text:style-name="T6"> </text:span><text:span text:style-name="T7">tr</text:span><text:span text:style-name="T6"> = </text:span><text:span text:style-name="T11">E</text:span><text:span text:style-name="T6">.</text:span><text:span text:style-name="T8">tr</text:span><text:span text:style-name="T6">(),</text:span></text:p>
      <text:p text:style-name="P33">            <text:span text:style-name="T7">typeItem</text:span><text:span text:style-name="T6"> = </text:span><text:span text:style-name="T7">clsItem</text:span><text:span text:style-name="T6">[</text:span><text:span text:style-name="T13">0</text:span><text:span text:style-name="T6">];</text:span></text:p>
      <text:p text:style-name="P33">        <text:span text:style-name="T8">asArray</text:span><text:span text:style-name="T6">(</text:span><text:span text:style-name="T7">elements</text:span><text:span text:style-name="T6">).</text:span><text:span text:style-name="T8">forEach</text:span><text:span text:style-name="T6">(</text:span><text:span text:style-name="T7">e</text:span><text:span text:style-name="T6"> </text:span><text:span text:style-name="T5">=&gt;</text:span><text:span text:style-name="T6"> {</text:span></text:p>
      <text:p text:style-name="P33">            <text:span text:style-name="T5">let</text:span><text:span text:style-name="T6"> </text:span><text:span text:style-name="T7">action</text:span><text:span text:style-name="T6"> = </text:span><text:span text:style-name="T5">typeof</text:span><text:span text:style-name="T6"> </text:span><text:span text:style-name="T7">e</text:span><text:span text:style-name="T6"> == </text:span><text:span text:style-name="T9">'object'</text:span><text:span text:style-name="T6"> ? </text:span><text:span text:style-name="T9">'a'</text:span><text:span text:style-name="T6"> : </text:span><text:span text:style-name="T9">'t'</text:span><text:span text:style-name="T6">;</text:span></text:p>
      <text:p text:style-name="P33">            <text:span text:style-name="T12">if</text:span><text:span text:style-name="T6">(!(</text:span><text:span text:style-name="T7">e</text:span><text:span text:style-name="T6"> </text:span><text:span text:style-name="T5">instanceof</text:span><text:span text:style-name="T6"> </text:span><text:span text:style-name="T16">HTMLTableCellElement</text:span><text:span text:style-name="T6">)) </text:span><text:span text:style-name="T7">e</text:span><text:span text:style-name="T6"> = </text:span><text:span text:style-name="T11">E</text:span><text:span text:style-name="T6">[</text:span><text:span text:style-name="T7">typeItem</text:span><text:span text:style-name="T6">]()[</text:span><text:span text:style-name="T7">action</text:span><text:span text:style-name="T6">](</text:span><text:span text:style-name="T7">e</text:span><text:span text:style-name="T6">)</text:span></text:p>
      <text:p text:style-name="P33">            <text:span text:style-name="T8">applyItemFunction</text:span><text:span text:style-name="T6">?.(</text:span><text:span text:style-name="T7">e</text:span><text:span text:style-name="T6">, </text:span><text:span text:style-name="T5">this</text:span><text:span text:style-name="T6">)</text:span></text:p>
      <text:p text:style-name="P33">            <text:span text:style-name="T5">this</text:span><text:span text:style-name="T6">.</text:span><text:span text:style-name="T8">insertClasses_</text:span><text:span text:style-name="T6">(</text:span><text:span text:style-name="T7">e</text:span><text:span text:style-name="T6">, </text:span><text:span text:style-name="T7">clsItem</text:span><text:span text:style-name="T6">)</text:span></text:p>
      <text:p text:style-name="P33">            <text:span text:style-name="T7">tr</text:span><text:span text:style-name="T6">.</text:span><text:span text:style-name="T8">a</text:span><text:span text:style-name="T6">(</text:span><text:span text:style-name="T7">e</text:span><text:span text:style-name="T6">)</text:span></text:p>
      <text:p text:style-name="P33">        <text:span text:style-name="T6">})</text:span></text:p>
      <text:p text:style-name="P33"><text:soft-page-break/>        <text:span text:style-name="T12">return</text:span><text:span text:style-name="T6"> </text:span><text:span text:style-name="T8">addMethod</text:span><text:span text:style-name="T6">(</text:span><text:span text:style-name="T7">tr</text:span><text:span text:style-name="T6">, </text:span><text:span text:style-name="T7">applyRowFunction</text:span><text:span text:style-name="T6">)</text:span></text:p>
      <text:p text:style-name="P33">    <text:span text:style-name="T6">}</text:span></text:p>
      <text:p text:style-name="P40"/>
      <text:p text:style-name="P33">    <text:span text:style-name="T8">_addRow</text:span><text:span text:style-name="T6">(</text:span><text:span text:style-name="T7">elementRow</text:span><text:span text:style-name="T6">, </text:span><text:span text:style-name="T7">elementParent</text:span><text:span text:style-name="T6">, </text:span><text:span text:style-name="T7">applyRowFunction</text:span><text:span text:style-name="T6">, </text:span><text:span text:style-name="T7">cls</text:span><text:span text:style-name="T6">){</text:span></text:p>
      <text:p text:style-name="P33">        <text:span text:style-name="T8">applyRowFunction</text:span><text:span text:style-name="T6">?.(</text:span><text:span text:style-name="T7">elementRow</text:span><text:span text:style-name="T6">, </text:span><text:span text:style-name="T5">this</text:span><text:span text:style-name="T6">)</text:span></text:p>
      <text:p text:style-name="P33">        <text:span text:style-name="T5">this</text:span><text:span text:style-name="T6">.</text:span><text:span text:style-name="T8">insertClasses_</text:span><text:span text:style-name="T6">(</text:span><text:span text:style-name="T7">elementRow</text:span><text:span text:style-name="T6">, </text:span><text:span text:style-name="T7">cls</text:span><text:span text:style-name="T6">)</text:span></text:p>
      <text:p text:style-name="P33">        <text:span text:style-name="T7">elementParent</text:span><text:span text:style-name="T6">.</text:span><text:span text:style-name="T8">a</text:span><text:span text:style-name="T6">(</text:span><text:span text:style-name="T7">elementRow</text:span><text:span text:style-name="T6">)</text:span></text:p>
      <text:p text:style-name="P33">        <text:span text:style-name="T12">return</text:span><text:span text:style-name="T6"> </text:span><text:span text:style-name="T5">this</text:span></text:p>
      <text:p text:style-name="P33">    <text:span text:style-name="T6">}</text:span></text:p>
      <text:p text:style-name="P34">}</text:p>
      <text:p text:style-name="P111"/>
      <text:p text:style-name="P34"/>
      <text:p text:style-name="P108">Creates HTML elements that form a table.</text:p>
      <text:p text:style-name="P108"/>
      <text:p text:style-name="P106">Explaining the constructor:</text:p>
      <text:p text:style-name="P112">constructor(...columns)</text:p>
      <text:p text:style-name="P112"/>
      <text:p text:style-name="P113"><text:span text:style-name="T23">columns</text:span>: column names</text:p>
      <text:p text:style-name="P113"/>
      <text:p text:style-name="P113">Explaining the methods:</text:p>
      <text:p text:style-name="P113">Private methods can have their implementation studied separately.</text:p>
      <text:p text:style-name="P113"/>
      <text:p text:style-name="P113"><text:span text:style-name="T18">clearBody</text:span>() </text:p>
      <text:p text:style-name="P114">Remove the HTML elements from the $body element of the created table.</text:p>
      <text:p text:style-name="P114"/>
      <text:p text:style-name="P115"><text:span text:style-name="T18">ReloadBody</text:span>(doOverRows)</text:p>
      <text:p text:style-name="P115">Reloads the HTML elements in the $body element of the table.</text:p>
      <text:p text:style-name="P115">doOverRows: is a callback function to be applied to the tr elements of the table's body.</text:p>
      <text:p text:style-name="P115"/>
      <text:p text:style-name="P115"><text:span text:style-name="T18">getHeadRow</text:span>() </text:p>
      <text:p text:style-name="P115">retrieves the tr element corresponding to the $head of the created table.</text:p>
      <text:p text:style-name="P115"/>
      <text:p text:style-name="P115"><text:span text:style-name="T18">getBodyRows</text:span>()</text:p>
      <text:p text:style-name="P116">Retrieves the `tr` elements of the `$body` element from the created table.</text:p>
      <text:p text:style-name="P116"/>
      <text:p text:style-name="P116"><text:span text:style-name="T18">getFootRow</text:span>()</text:p>
      <text:p text:style-name="P116">Retrieves the `tr` element from the `$foot` element of the created table.</text:p>
      <text:p text:style-name="P116"/>
      <text:p text:style-name="P116"><text:span text:style-name="T18">zebrar</text:span>() </text:p>
      <text:p text:style-name="P116">Add the JTable zebrar class to the tr elements of the $body element in the created table.</text:p>
      <text:p text:style-name="P116"/>
      <text:p text:style-name="P116"><text:span text:style-name="T18">setHeadRowFromItems</text:span>(elements, applyItemFunction, applyRowFunction)</text:p>
      <text:p text:style-name="P117">Remove the `tr` element from the `$head` element of the created table, set a new `tr` element in `$head`, and return the table.</text:p>
      <text:p text:style-name="P118"><text:span text:style-name="T23">elements</text:span>: It can be an array of HTML elements or an array of primitive types.</text:p>
      <text:p text:style-name="P117"><text:span text:style-name="T23">applyItemFunction</text:span>: Applies a function to the element `th` to be created from an element of the `elements` argument.</text:p>
      <text:p text:style-name="P119"><text:span text:style-name="T23">applyRowFunction</text:span>: Applies a function to the element tr to be created.</text:p>
      <text:p text:style-name="P119"/>
      <text:p text:style-name="P120">setHeadRow(<text:span text:style-name="T22">rowElement, applyRowFunction</text:span>)</text:p>
      <text:p text:style-name="P121">Remove the `tr` element from the `$head` element of the created table, set a new `tr` element in `$head`, and return the table.</text:p>
      <text:p text:style-name="P122"><text:soft-page-break/><text:span text:style-name="T23">rowElement</text:span>: the element tr to be set.</text:p>
      <text:p text:style-name="P121"><text:span text:style-name="T23">applyRowFunction</text:span>: the function to be executed on the rowElement.</text:p>
      <text:p text:style-name="P121"/>
      <text:p text:style-name="P118"><text:span text:style-name="T18">addBodyRowFromItems</text:span>(elements, applyItemFunction, applyRowFunction)</text:p>
      <text:p text:style-name="P118">Adds a `tr` to `$body` based on the specified elements.</text:p>
      <text:p text:style-name="P118"><text:span text:style-name="T23">elements</text:span>: It can be an array of HTML elements or an array of primitive types.</text:p>
      <text:p text:style-name="P123"><text:span text:style-name="T23">applyItemFunction</text:span>: Applies a function to the td element to be created from an element in the elements argument.</text:p>
      <text:p text:style-name="P124"><text:span text:style-name="T23">applyRowFunction</text:span>: Applies a function to the tr element to be created.</text:p>
      <text:p text:style-name="P118"/>
      <text:p text:style-name="P125"><text:span text:style-name="T18">addBodyRow</text:span>(rowElement, applyRowFunction)</text:p>
      <text:p text:style-name="P125">Adds a `tr` element to the `$body` of the table.</text:p>
      <text:p text:style-name="P125"><text:span text:style-name="T23">rowElement</text:span>: tr to be added to the $body of the table.</text:p>
      <text:p text:style-name="P125"><text:span text:style-name="T23">applyRowFunction</text:span>: function to be applied to the rowElement.</text:p>
      <text:p text:style-name="P125"/>
      <text:p text:style-name="P125"><text:span text:style-name="T18">setFootRowFromItems</text:span>(elements, applyItemFunction, applyRowFunction)</text:p>
      <text:p text:style-name="P126">Remove the `tr` element from the `$foot` of the table and add a `tr` element based on the `elements` parameter.</text:p>
      <text:p text:style-name="P127"><text:span text:style-name="T23">elements</text:span>: It can be an array of HTML elements or an array of primitive types.</text:p>
      <text:p text:style-name="P128"><text:span text:style-name="T23">applyItemFunction</text:span>: Applies a function to the td element to be created from an element of the elements argument.</text:p>
      <text:p text:style-name="P129"><text:span text:style-name="T23">applyRowFunction</text:span>: Applies a function to the element tr to be created.</text:p>
      <text:p text:style-name="P128"/>
      <text:p text:style-name="P126"><text:span text:style-name="T18">setFootRow</text:span>(rowElement, applyRowFunction)</text:p>
      <text:p text:style-name="P126">Remove the `tr` element from the `$foot` of the table and add a `tr` element based on the `elements` argument.</text:p>
      <text:p text:style-name="P126"><text:span text:style-name="T23">RowElement</text:span>: element to be added</text:p>
      <text:p text:style-name="P126"><text:span text:style-name="T23">applyRowFunction</text:span>: function to be applied to the rowElement argument.</text:p>
      <text:p text:style-name="P126"/>
      <text:p text:style-name="P126">The other methods are private and their implementation can be studied separately.</text:p>
      <text:p text:style-name="P130"/>
      <text:p text:style-name="P130"/>
      <text:p text:style-name="P131"><text:span text:style-name="T3">function</text:span> <text:span text:style-name="T37">arrayInSpread</text:span>(<text:span text:style-name="T38">spreadItens</text:span>, <text:span text:style-name="T38">exaustive</text:span> = <text:span text:style-name="T3">true</text:span>) {</text:p>
      <text:p text:style-name="P33">    <text:span text:style-name="T12">while</text:span><text:span text:style-name="T6">(</text:span><text:span text:style-name="T7">spreadItens</text:span><text:span text:style-name="T6">.</text:span><text:span text:style-name="T7">length</text:span><text:span text:style-name="T6"> == </text:span><text:span text:style-name="T13">1</text:span><text:span text:style-name="T6"> &amp;&amp; </text:span><text:span text:style-name="T16">Array</text:span><text:span text:style-name="T6">.</text:span><text:span text:style-name="T8">isArray</text:span><text:span text:style-name="T6">(</text:span><text:span text:style-name="T7">spreadItens</text:span><text:span text:style-name="T6">[</text:span><text:span text:style-name="T13">0</text:span><text:span text:style-name="T6">])){</text:span></text:p>
      <text:p text:style-name="P33">        <text:span text:style-name="T12">if</text:span><text:span text:style-name="T6">(!</text:span><text:span text:style-name="T7">exaustive</text:span><text:span text:style-name="T6">) </text:span><text:span text:style-name="T12">return</text:span><text:span text:style-name="T6"> </text:span><text:span text:style-name="T7">spreadItens</text:span><text:span text:style-name="T6">[</text:span><text:span text:style-name="T13">0</text:span><text:span text:style-name="T6">]</text:span></text:p>
      <text:p text:style-name="P33">        <text:span text:style-name="T7">spreadItens</text:span><text:span text:style-name="T6"> = </text:span><text:span text:style-name="T7">spreadItens</text:span><text:span text:style-name="T6">[</text:span><text:span text:style-name="T13">0</text:span><text:span text:style-name="T6">]</text:span></text:p>
      <text:p text:style-name="P33">    <text:span text:style-name="T6">}</text:span></text:p>
      <text:p text:style-name="P33">    <text:span text:style-name="T12">return</text:span><text:span text:style-name="T6"> </text:span><text:span text:style-name="T7">spreadItens</text:span></text:p>
      <text:p text:style-name="P34">}</text:p>
      <text:p text:style-name="P130"/>
      <text:p text:style-name="P132">"Unpacks" arrays in the format [[[[[item]]]]], that is, it always retrieves index 0 within an array.</text:p>
      <text:p text:style-name="P133">If, for example, an array in the format [[[A, b]]] is passed, only element A will be captured.</text:p>
      <text:p text:style-name="P133">If, for example, an array in the format [c, d, e] is passed, only element c will be computed.</text:p>
      <text:p text:style-name="P134">Parameters:</text:p>
      <text:p text:style-name="P134"><text:span text:style-name="T23">spreadItens</text:span>: array to be “unpacked”</text:p>
      <text:p text:style-name="P134"><text:span text:style-name="T23">exaustive</text:span>: If true, unpack the array recursively, always retrieving index 0 until it finds an element that is not an array;</text:p>
      <text:p text:style-name="P134">If false, retrieve the array element at index 0.</text:p>
      <text:p text:style-name="P135"/>
      <text:p text:style-name="P136"><text:span text:style-name="T3">function</text:span> <text:span text:style-name="T37">asArray</text:span>(... <text:span text:style-name="T38">objects</text:span>){ <text:span text:style-name="T39">return</text:span> <text:span text:style-name="T37">arrayInSpread</text:span>(<text:span text:style-name="T38">objects</text:span>, <text:span text:style-name="T3">false</text:span>)}</text:p>
      <text:p text:style-name="P137"/>
      <text:p text:style-name="P138">Creates an array from a set of objects.</text:p>
      <text:p text:style-name="P138"><text:soft-page-break/>If the first element is an array, the other elements will be ignored.</text:p>
      <text:p text:style-name="P139">If the first element is not an array, the objects will be combined into an array.</text:p>
      <text:p text:style-name="P139"/>
      <text:p text:style-name="P139"><text:span text:style-name="T23">objects</text:span>: objects from which a new array will be created</text:p>
      <text:p text:style-name="P140"/>
      <text:p text:style-name="P140"/>
      <text:p text:style-name="P141"><text:span text:style-name="T3">function</text:span> <text:span text:style-name="T37">overJson</text:span>(<text:span text:style-name="T38">jsonSource</text:span>, <text:span text:style-name="T38">jsonDest</text:span>, ... <text:span text:style-name="T38">keys</text:span>){</text:p>
      <text:p text:style-name="P33">    <text:span text:style-name="T7">keys</text:span><text:span text:style-name="T6"> = </text:span><text:span text:style-name="T8">arrayInSpread</text:span><text:span text:style-name="T6">(</text:span><text:span text:style-name="T7">keys</text:span><text:span text:style-name="T6">)</text:span></text:p>
      <text:p text:style-name="P33">    <text:span text:style-name="T7">keys</text:span><text:span text:style-name="T6"> = </text:span><text:span text:style-name="T7">keys</text:span><text:span text:style-name="T6">.</text:span><text:span text:style-name="T7">length</text:span><text:span text:style-name="T6"> ? </text:span><text:span text:style-name="T7">keys</text:span><text:span text:style-name="T6"> : </text:span><text:span text:style-name="T8">keysOf</text:span><text:span text:style-name="T6">(</text:span><text:span text:style-name="T7">jsonSource</text:span><text:span text:style-name="T6">)</text:span></text:p>
      <text:p text:style-name="P33">    <text:span text:style-name="T7">keys</text:span><text:span text:style-name="T6">.</text:span><text:span text:style-name="T8">forEach</text:span><text:span text:style-name="T6">(</text:span><text:span text:style-name="T7">key</text:span><text:span text:style-name="T6"> </text:span><text:span text:style-name="T5">=&gt;</text:span><text:span text:style-name="T6"> </text:span><text:span text:style-name="T7">jsonDest</text:span><text:span text:style-name="T6">[</text:span><text:span text:style-name="T7">key</text:span><text:span text:style-name="T6">] = </text:span><text:span text:style-name="T7">jsonSource</text:span><text:span text:style-name="T6">[</text:span><text:span text:style-name="T7">key</text:span><text:span text:style-name="T6">])</text:span></text:p>
      <text:p text:style-name="P33">    <text:span text:style-name="T12">return</text:span><text:span text:style-name="T6"> </text:span><text:span text:style-name="T7">jsonDest</text:span></text:p>
      <text:p text:style-name="P34">}</text:p>
      <text:p text:style-name="P140"/>
      <text:p text:style-name="P142">Copies the jsonSource to the jsonDest.</text:p>
      <text:p text:style-name="P143"><text:span text:style-name="T23">jsonSource</text:span>: The JSON file that will serve as the source for the copy will be used.</text:p>
      <text:p text:style-name="P143"><text:span text:style-name="T23">jsonDest</text:span>: destination jjson file that will receive the copied data</text:p>
      <text:p text:style-name="P143"><text:span text:style-name="T23">keys</text:span>: Optional; if provided, only the specified keys should be copied. If not provided, the entire jsonSource will be copied.</text:p>
      <text:p text:style-name="P140"/>
      <text:p text:style-name="P140"/>
      <text:p text:style-name="P141"><text:span text:style-name="T3">function</text:span> <text:span text:style-name="T37">disapend</text:span>(<text:span text:style-name="T38">element</text:span>){ </text:p>
      <text:p text:style-name="P33">    <text:span text:style-name="T7">element</text:span><text:span text:style-name="T6"> = </text:span><text:span text:style-name="T8">viewOrNode</text:span><text:span text:style-name="T6">(</text:span><text:span text:style-name="T7">element</text:span><text:span text:style-name="T6">);</text:span></text:p>
      <text:p text:style-name="P33">    <text:span text:style-name="T8">removeElements</text:span><text:span text:style-name="T6">(</text:span><text:span text:style-name="T7">element</text:span><text:span text:style-name="T6">.</text:span><text:span text:style-name="T7">parentNode</text:span><text:span text:style-name="T6">, </text:span><text:span text:style-name="T7">element</text:span><text:span text:style-name="T6">)</text:span></text:p>
      <text:p text:style-name="P34">}</text:p>
      <text:p text:style-name="P144"/>
      <text:p text:style-name="P145">Remove an HTML element or a view.</text:p>
      <text:p text:style-name="P146"><text:span text:style-name="T23">element</text:span>: HTML element or view.</text:p>
      <text:p text:style-name="P147"/>
      <text:p text:style-name="P148"><text:span text:style-name="T3">function</text:span> <text:span text:style-name="T37">consume</text:span>(<text:span text:style-name="T38">evt</text:span>){ <text:span text:style-name="T38">evt</text:span>.<text:span text:style-name="T37">preventDefault</text:span>()}</text:p>
      <text:p text:style-name="P147"/>
      <text:p text:style-name="P145">Interrupts the default behavior of an event.</text:p>
      <text:p text:style-name="P147"/>
      <text:p text:style-name="P147"/>
      <text:p text:style-name="P147"><text:span text:style-name="T40">const</text:span><text:span text:style-name="T41"> </text:span><text:span text:style-name="T42">toBase64</text:span><text:span text:style-name="T41"> = </text:span><text:span text:style-name="T42">btoa</text:span></text:p>
      <text:p text:style-name="P145">Converts a string to base64.</text:p>
      <text:p text:style-name="P147"/>
      <text:p text:style-name="P148"><text:span text:style-name="T3">const</text:span> <text:span text:style-name="T37">fromBase64</text:span> = <text:span text:style-name="T37">atob</text:span></text:p>
      <text:p text:style-name="P145">Convert a base64 to a string.</text:p>
      <text:p text:style-name="P147"/>
      <text:p text:style-name="P148"><text:span text:style-name="T3">const</text:span> <text:span text:style-name="T37">idGenerator</text:span> = <text:span text:style-name="T3">function*</text:span>(<text:span text:style-name="T38">n</text:span> = <text:span text:style-name="T43">1</text:span>){<text:span text:style-name="T39">while</text:span>(<text:span text:style-name="T38">n</text:span>){<text:span text:style-name="T39">yield</text:span> <text:span text:style-name="T38">n</text:span>++}}</text:p>
      <text:p text:style-name="P145">Creates an object for generating temporary unique identifiers.</text:p>
      <text:p text:style-name="P147"/>
      <text:p text:style-name="P148"><text:span text:style-name="T3">function</text:span> <text:span text:style-name="T37">body</text:span>() {<text:span text:style-name="T39">return</text:span> <text:span text:style-name="T38">document</text:span>.<text:span text:style-name="T38">body</text:span>}</text:p>
      <text:p text:style-name="P145">Returns the document.body</text:p>
      <text:p text:style-name="P147"/>
      <text:p text:style-name="P148"><text:span text:style-name="T3">function</text:span> <text:span text:style-name="T37">_create</text:span>(<text:span text:style-name="T38">tagName</text:span>) {</text:p>
      <text:p text:style-name="P33">    <text:span text:style-name="T5">let</text:span><text:span text:style-name="T6"> </text:span><text:span text:style-name="T7">e</text:span><text:span text:style-name="T6"> = </text:span><text:span text:style-name="T7">document</text:span><text:span text:style-name="T6">.</text:span><text:span text:style-name="T8">createElement</text:span><text:span text:style-name="T6">(</text:span><text:span text:style-name="T7">tagName</text:span><text:span text:style-name="T6">);</text:span></text:p>
      <text:p text:style-name="P33">    <text:span text:style-name="T7">e</text:span><text:span text:style-name="T6">.</text:span><text:span text:style-name="T7">isTagChild</text:span><text:span text:style-name="T6"> = </text:span><text:span text:style-name="T5">true</text:span></text:p>
      <text:p text:style-name="P33">    <text:span text:style-name="T7">e</text:span><text:span text:style-name="T6">.</text:span><text:span text:style-name="T8">a</text:span><text:span text:style-name="T6"> = (... </text:span><text:span text:style-name="T7">elements</text:span><text:span text:style-name="T6">) </text:span><text:span text:style-name="T5">=&gt;</text:span><text:span text:style-name="T6"> </text:span><text:span text:style-name="T8">appendTo</text:span><text:span text:style-name="T6">(</text:span><text:span text:style-name="T7">e</text:span><text:span text:style-name="T6">, </text:span><text:span text:style-name="T7">elements</text:span><text:span text:style-name="T6">)</text:span></text:p>
      <text:p text:style-name="P33">    <text:span text:style-name="T7">e</text:span><text:span text:style-name="T6">.</text:span><text:span text:style-name="T8">c</text:span><text:span text:style-name="T6"> = (... </text:span><text:span text:style-name="T7">classes</text:span><text:span text:style-name="T6">) </text:span><text:span text:style-name="T5">=&gt;</text:span><text:span text:style-name="T6"> </text:span><text:span text:style-name="T8">addClasses</text:span><text:span text:style-name="T6">(</text:span><text:span text:style-name="T7">e</text:span><text:span text:style-name="T6">, </text:span><text:span text:style-name="T7">classes</text:span><text:span text:style-name="T6">)</text:span></text:p>
      <text:p text:style-name="P33">    <text:span text:style-name="T7">e</text:span><text:span text:style-name="T6">.</text:span><text:span text:style-name="T8">rmc</text:span><text:span text:style-name="T6"> = (... </text:span><text:span text:style-name="T7">classes</text:span><text:span text:style-name="T6">) </text:span><text:span text:style-name="T5">=&gt;</text:span><text:span text:style-name="T6"> </text:span><text:span text:style-name="T8">removeClasses</text:span><text:span text:style-name="T6">(</text:span><text:span text:style-name="T7">e</text:span><text:span text:style-name="T6">, </text:span><text:span text:style-name="T7">classes</text:span><text:span text:style-name="T6">)</text:span></text:p>
      <text:p text:style-name="P33"><text:soft-page-break/>    <text:span text:style-name="T7">e</text:span><text:span text:style-name="T6">.</text:span><text:span text:style-name="T8">d</text:span><text:span text:style-name="T6"> = </text:span><text:span text:style-name="T7">disabled</text:span><text:span text:style-name="T6"> </text:span><text:span text:style-name="T5">=&gt;</text:span><text:span text:style-name="T6"> {</text:span><text:span text:style-name="T7">e</text:span><text:span text:style-name="T6">.</text:span><text:span text:style-name="T7">disabled</text:span><text:span text:style-name="T6"> = </text:span><text:span text:style-name="T7">disabled</text:span><text:span text:style-name="T6">; </text:span><text:span text:style-name="T12">return</text:span><text:span text:style-name="T6"> </text:span><text:span text:style-name="T7">e</text:span><text:span text:style-name="T6">}</text:span></text:p>
      <text:p text:style-name="P33">    <text:span text:style-name="T7">e</text:span><text:span text:style-name="T6">.</text:span><text:span text:style-name="T8">h</text:span><text:span text:style-name="T6"> = </text:span><text:span text:style-name="T7">href</text:span><text:span text:style-name="T6"> </text:span><text:span text:style-name="T5">=&gt;</text:span><text:span text:style-name="T6"> { </text:span><text:span text:style-name="T8">setAttribute</text:span><text:span text:style-name="T6">(</text:span><text:span text:style-name="T7">e</text:span><text:span text:style-name="T6">, [</text:span><text:span text:style-name="T9">'href'</text:span><text:span text:style-name="T6">, </text:span><text:span text:style-name="T7">href</text:span><text:span text:style-name="T6">]); </text:span><text:span text:style-name="T12">return</text:span><text:span text:style-name="T6"> </text:span><text:span text:style-name="T7">e</text:span><text:span text:style-name="T6">}</text:span></text:p>
      <text:p text:style-name="P33">    <text:span text:style-name="T7">e</text:span><text:span text:style-name="T6">.</text:span><text:span text:style-name="T8">p</text:span><text:span text:style-name="T6"> = (</text:span><text:span text:style-name="T7">placeHolder</text:span><text:span text:style-name="T6">, </text:span><text:span text:style-name="T7">value</text:span><text:span text:style-name="T6"> = </text:span><text:span text:style-name="T5">null</text:span><text:span text:style-name="T6">) </text:span><text:span text:style-name="T5">=&gt;</text:span><text:span text:style-name="T6"> { </text:span><text:span text:style-name="T8">setValueAndPlaceHolder</text:span><text:span text:style-name="T6">(</text:span><text:span text:style-name="T7">e</text:span><text:span text:style-name="T6">, </text:span><text:span text:style-name="T7">value</text:span><text:span text:style-name="T6">, </text:span><text:span text:style-name="T7">placeHolder</text:span><text:span text:style-name="T6">); </text:span><text:span text:style-name="T12">return</text:span><text:span text:style-name="T6"> </text:span><text:span text:style-name="T7">e</text:span><text:span text:style-name="T6">}</text:span></text:p>
      <text:p text:style-name="P33">    <text:span text:style-name="T7">e</text:span><text:span text:style-name="T6">.</text:span><text:span text:style-name="T8">r</text:span><text:span text:style-name="T6"> = () </text:span><text:span text:style-name="T5">=&gt;</text:span><text:span text:style-name="T6"> {</text:span><text:span text:style-name="T7">e</text:span><text:span text:style-name="T6">.</text:span><text:span text:style-name="T7">required</text:span><text:span text:style-name="T6"> = </text:span><text:span text:style-name="T5">true</text:span><text:span text:style-name="T6">; </text:span><text:span text:style-name="T12">return</text:span><text:span text:style-name="T6"> </text:span><text:span text:style-name="T7">e</text:span><text:span text:style-name="T6">}</text:span></text:p>
      <text:p text:style-name="P33">    <text:span text:style-name="T7">e</text:span><text:span text:style-name="T6">.</text:span><text:span text:style-name="T8">t</text:span><text:span text:style-name="T6"> = (</text:span><text:span text:style-name="T7">text</text:span><text:span text:style-name="T6">, </text:span><text:span text:style-name="T7">isLastNode</text:span><text:span text:style-name="T6">) </text:span><text:span text:style-name="T5">=&gt;</text:span><text:span text:style-name="T6"> {</text:span><text:span text:style-name="T8">setTextNode</text:span><text:span text:style-name="T6">(</text:span><text:span text:style-name="T7">e</text:span><text:span text:style-name="T6">, </text:span><text:span text:style-name="T7">text</text:span><text:span text:style-name="T6">, </text:span><text:span text:style-name="T7">isLastNode</text:span><text:span text:style-name="T6">); </text:span><text:span text:style-name="T12">return</text:span><text:span text:style-name="T6"> </text:span><text:span text:style-name="T7">e</text:span><text:span text:style-name="T6">}</text:span></text:p>
      <text:p text:style-name="P33">    <text:span text:style-name="T7">e</text:span><text:span text:style-name="T6">.</text:span><text:span text:style-name="T8">v</text:span><text:span text:style-name="T6"> = </text:span><text:span text:style-name="T7">value</text:span><text:span text:style-name="T6"> </text:span><text:span text:style-name="T5">=&gt;</text:span><text:span text:style-name="T6"> {</text:span><text:span text:style-name="T8">setValue</text:span><text:span text:style-name="T6">(</text:span><text:span text:style-name="T7">e</text:span><text:span text:style-name="T6">, </text:span><text:span text:style-name="T7">value</text:span><text:span text:style-name="T6">); </text:span><text:span text:style-name="T12">return</text:span><text:span text:style-name="T6"> </text:span><text:span text:style-name="T7">e</text:span><text:span text:style-name="T6">}</text:span></text:p>
      <text:p text:style-name="P33">    <text:span text:style-name="T7">e</text:span><text:span text:style-name="T6">.</text:span><text:span text:style-name="T8">ck</text:span><text:span text:style-name="T6"> = (</text:span><text:span text:style-name="T7">ck</text:span><text:span text:style-name="T6"> = </text:span><text:span text:style-name="T5">true</text:span><text:span text:style-name="T6">) </text:span><text:span text:style-name="T5">=&gt;</text:span><text:span text:style-name="T6"> {</text:span><text:span text:style-name="T7">e</text:span><text:span text:style-name="T6">.</text:span><text:span text:style-name="T7">checked</text:span><text:span text:style-name="T6"> = </text:span><text:span text:style-name="T7">ck</text:span><text:span text:style-name="T6">; </text:span><text:span text:style-name="T12">return</text:span><text:span text:style-name="T6"> </text:span><text:span text:style-name="T7">e</text:span><text:span text:style-name="T6">}</text:span></text:p>
      <text:p text:style-name="P33">    <text:span text:style-name="T7">e</text:span><text:span text:style-name="T6">.</text:span><text:span text:style-name="T8">otv</text:span><text:span text:style-name="T6"> = (</text:span><text:span text:style-name="T7">text</text:span><text:span text:style-name="T6">, </text:span><text:span text:style-name="T7">value</text:span><text:span text:style-name="T6">) </text:span><text:span text:style-name="T5">=&gt;</text:span><text:span text:style-name="T6"> {</text:span><text:span text:style-name="T8">setTextAndValueToOption</text:span><text:span text:style-name="T6">(</text:span><text:span text:style-name="T7">e</text:span><text:span text:style-name="T6">, </text:span><text:span text:style-name="T7">text</text:span><text:span text:style-name="T6">, </text:span><text:span text:style-name="T7">value</text:span><text:span text:style-name="T6">); </text:span><text:span text:style-name="T12">return</text:span><text:span text:style-name="T6"> </text:span><text:span text:style-name="T7">e</text:span><text:span text:style-name="T6">}</text:span></text:p>
      <text:p text:style-name="P33">    <text:span text:style-name="T7">e</text:span><text:span text:style-name="T6">.</text:span><text:span text:style-name="T8">cls</text:span><text:span text:style-name="T6"> = (</text:span><text:span text:style-name="T7">err</text:span><text:span text:style-name="T6"> = </text:span><text:span text:style-name="T9">'cls'</text:span><text:span text:style-name="T6">) </text:span><text:span text:style-name="T5">=&gt;</text:span><text:span text:style-name="T6"> { </text:span><text:span text:style-name="T12">throw</text:span><text:span text:style-name="T6"> (</text:span><text:span text:style-name="T9">`[the element was not upgraded by function aMode: [e.</text:span><text:span text:style-name="T5">${</text:span><text:span text:style-name="T7">err</text:span><text:span text:style-name="T5">}</text:span><text:span text:style-name="T9"> not avaliable]`</text:span><text:span text:style-name="T6">)}</text:span></text:p>
      <text:p text:style-name="P33">    <text:span text:style-name="T7">e</text:span><text:span text:style-name="T6">.</text:span><text:span text:style-name="T8">rmcls</text:span><text:span text:style-name="T6"> = () </text:span><text:span text:style-name="T5">=&gt;</text:span><text:span text:style-name="T6"> </text:span><text:span text:style-name="T7">e</text:span><text:span text:style-name="T6">.</text:span><text:span text:style-name="T8">cls</text:span><text:span text:style-name="T6">(</text:span><text:span text:style-name="T9">'rmcls'</text:span><text:span text:style-name="T6">)</text:span></text:p>
      <text:p text:style-name="P33">    <text:span text:style-name="T12">return</text:span><text:span text:style-name="T6"> </text:span><text:span text:style-name="T7">e</text:span></text:p>
      <text:p text:style-name="P34">}</text:p>
      <text:p text:style-name="P148"/>
      <text:p text:style-name="P149">Creates an HTML element and adds a series of settings:</text:p>
      <text:p text:style-name="P150">a) isTagChild: is a marker that tells us that the HTML element has been configured as tagChild.</text:p>
      <text:p text:style-name="P150">b) a(...elements): the created element is just another view or HTML element;</text:p>
      <text:p text:style-name="P150">c) c(...classes): we add a set of classes to the created element;</text:p>
      <text:p text:style-name="P150">d) rmc(...classes): we remove a set of classes from the created element;</text:p>
      <text:p text:style-name="P150">e) d(disabled): the element is disabled or enabled;</text:p>
      <text:p text:style-name="P150">f) h(href): sets the href for an HTML element of type a;</text:p>
      <text:p text:style-name="P150">g) p(placeHolder, value=null): sets the placeholder and value for an element of type input;</text:p>
      <text:p text:style-name="P150">h) r(): HTML element is of type required;</text:p>
      <text:p text:style-name="P150">i) t(text, isLastNode): sets text for the HTML element. If isLastNode = false, the text is in the first child position of the created element. If isLastNode = true, the text is in the last child position of the created element;</text:p>
      <text:p text:style-name="P150">j) v(value): assigns a value to an HTML element, generally an element of type input;</text:p>
      <text:p text:style-name="P150">k) ck(ck = true): a checkbox input element has status checked = to the ck argument;</text:p>
      <text:p text:style-name="P150">l) otv(text, value): assigns text and a value to an option input element;</text:p>
      <text:p text:style-name="P150">m) cls(err): will cause an error if invoked outside of aMode or A_SAVED;</text:p>
      <text:p text:style-name="P150">n) rmcls(): will cause an error if invoked outside of aMode or A_SAVED.</text:p>
      <text:p text:style-name="P150">Note: all allowed functions return the created HTML element.</text:p>
      <text:p text:style-name="P151"/>
      <text:p text:style-name="P151"/>
      <text:p text:style-name="P148"><text:span text:style-name="T3">function</text:span> <text:span text:style-name="T37">_input</text:span>(<text:span text:style-name="T38">type</text:span>) {</text:p>
      <text:p text:style-name="P33">    <text:span text:style-name="T5">let</text:span><text:span text:style-name="T6"> </text:span><text:span text:style-name="T7">e</text:span><text:span text:style-name="T6"> = </text:span><text:span text:style-name="T8">_c</text:span><text:span text:style-name="T6">(</text:span><text:span text:style-name="T9">'input'</text:span><text:span text:style-name="T6">);</text:span></text:p>
      <text:p text:style-name="P33">    <text:span text:style-name="T8">setAttribute</text:span><text:span text:style-name="T6">(</text:span><text:span text:style-name="T7">e</text:span><text:span text:style-name="T6">, [</text:span><text:span text:style-name="T9">'type'</text:span><text:span text:style-name="T6">, </text:span><text:span text:style-name="T7">type</text:span><text:span text:style-name="T6">])</text:span></text:p>
      <text:p text:style-name="P33">    <text:span text:style-name="T12">return</text:span><text:span text:style-name="T6"> </text:span><text:span text:style-name="T7">e</text:span></text:p>
      <text:p text:style-name="P34">}</text:p>
      <text:p text:style-name="P147"/>
      <text:p text:style-name="P152">Creates an element of type input.</text:p>
      <text:p text:style-name="P151"/>
      <text:p text:style-name="P153">CONSTANT E (ELEMENT)</text:p>
      <text:p text:style-name="P153"/>
      <text:p text:style-name="P154">Responsible for creating HTML elements.</text:p>
      <text:p text:style-name="P155">Contains the list of HTML elements that can be created using mode E.</text:p>
      <text:p text:style-name="P147"/>
      <text:p text:style-name="P156"><text:span text:style-name="T3">const</text:span> <text:span text:style-name="T44">E</text:span> = {</text:p>
      <text:p text:style-name="P33">    <text:span text:style-name="T8">createElement</text:span><text:span text:style-name="T7">:</text:span><text:span text:style-name="T6"> </text:span><text:span text:style-name="T8">_c</text:span><text:span text:style-name="T6">,</text:span></text:p>
      <text:p text:style-name="P33">    <text:span text:style-name="T8">createInput</text:span><text:span text:style-name="T7">:</text:span><text:span text:style-name="T6"> </text:span><text:span text:style-name="T8">_i</text:span><text:span text:style-name="T6">,</text:span></text:p>
      <text:p text:style-name="P33"><text:soft-page-break/>    <text:span text:style-name="T8">a</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a'</text:span><text:span text:style-name="T6">),</text:span></text:p>
      <text:p text:style-name="P33">    <text:span text:style-name="T8">area</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area'</text:span><text:span text:style-name="T6">),</text:span></text:p>
      <text:p text:style-name="P33">    <text:span text:style-name="T8">article</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article'</text:span><text:span text:style-name="T6">),</text:span></text:p>
      <text:p text:style-name="P33">    <text:span text:style-name="T8">aside</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aside'</text:span><text:span text:style-name="T6">),</text:span></text:p>
      <text:p text:style-name="P33">    <text:span text:style-name="T8">audio</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audio'</text:span><text:span text:style-name="T6">),</text:span></text:p>
      <text:p text:style-name="P33">    <text:span text:style-name="T8">br</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br'</text:span><text:span text:style-name="T6">),</text:span></text:p>
      <text:p text:style-name="P33">    <text:span text:style-name="T8">canvas</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canvas'</text:span><text:span text:style-name="T6">),</text:span></text:p>
      <text:p text:style-name="P33">    <text:span text:style-name="T8">col</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col'</text:span><text:span text:style-name="T6">),</text:span></text:p>
      <text:p text:style-name="P33">    <text:span text:style-name="T8">colgroup</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colgroup'</text:span><text:span text:style-name="T6">),</text:span></text:p>
      <text:p text:style-name="P33">    <text:span text:style-name="T8">color</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color'</text:span><text:span text:style-name="T6">),</text:span></text:p>
      <text:p text:style-name="P33">    <text:span text:style-name="T8">datagrid</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datagrid'</text:span><text:span text:style-name="T6">),</text:span></text:p>
      <text:p text:style-name="P33">    <text:span text:style-name="T8">datalist</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datalist'</text:span><text:span text:style-name="T6">),</text:span></text:p>
      <text:p text:style-name="P33">    <text:span text:style-name="T8">dd</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dd'</text:span><text:span text:style-name="T6">),</text:span></text:p>
      <text:p text:style-name="P33">    <text:span text:style-name="T8">dialog</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dialog'</text:span><text:span text:style-name="T6">),</text:span></text:p>
      <text:p text:style-name="P33">    <text:span text:style-name="T8">div</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div'</text:span><text:span text:style-name="T6">),</text:span></text:p>
      <text:p text:style-name="P33">    <text:span text:style-name="T8">dl</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dl'</text:span><text:span text:style-name="T6">),</text:span></text:p>
      <text:p text:style-name="P33">    <text:span text:style-name="T8">dt</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dt'</text:span><text:span text:style-name="T6">),</text:span></text:p>
      <text:p text:style-name="P33">    <text:span text:style-name="T8">embed</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embed'</text:span><text:span text:style-name="T6">),</text:span></text:p>
      <text:p text:style-name="P33">    <text:span text:style-name="T8">fieldset</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fieldset'</text:span><text:span text:style-name="T6">),</text:span></text:p>
      <text:p text:style-name="P33">    <text:span text:style-name="T8">figcaption</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figcaption'</text:span><text:span text:style-name="T6">),</text:span></text:p>
      <text:p text:style-name="P33">    <text:span text:style-name="T8">figure</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figure'</text:span><text:span text:style-name="T6">),</text:span></text:p>
      <text:p text:style-name="P33">    <text:span text:style-name="T8">footer</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footer'</text:span><text:span text:style-name="T6">),</text:span></text:p>
      <text:p text:style-name="P33">    <text:span text:style-name="T8">form</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form'</text:span><text:span text:style-name="T6">),</text:span></text:p>
      <text:p text:style-name="P33">    <text:span text:style-name="T8">frame</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frame'</text:span><text:span text:style-name="T6">),</text:span></text:p>
      <text:p text:style-name="P33">    <text:span text:style-name="T8">frameset</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frameset'</text:span><text:span text:style-name="T6">),</text:span></text:p>
      <text:p text:style-name="P33">    <text:span text:style-name="T8">h1</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h1'</text:span><text:span text:style-name="T6">),</text:span></text:p>
      <text:p text:style-name="P33">    <text:span text:style-name="T8">h2</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h2'</text:span><text:span text:style-name="T6">),</text:span></text:p>
      <text:p text:style-name="P33">    <text:span text:style-name="T8">h3</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h3'</text:span><text:span text:style-name="T6">),</text:span></text:p>
      <text:p text:style-name="P33">    <text:span text:style-name="T8">h4</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h4'</text:span><text:span text:style-name="T6">),</text:span></text:p>
      <text:p text:style-name="P33">    <text:span text:style-name="T8">h5</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h5'</text:span><text:span text:style-name="T6">),</text:span></text:p>
      <text:p text:style-name="P33">    <text:span text:style-name="T8">h6</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h6'</text:span><text:span text:style-name="T6">),</text:span></text:p>
      <text:p text:style-name="P33">    <text:span text:style-name="T8">hgroup</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hgroup'</text:span><text:span text:style-name="T6">),</text:span></text:p>
      <text:p text:style-name="P33">    <text:span text:style-name="T8">hr</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hr'</text:span><text:span text:style-name="T6">),</text:span></text:p>
      <text:p text:style-name="P33">    <text:span text:style-name="T8">iframe</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iframe'</text:span><text:span text:style-name="T6">),</text:span></text:p>
      <text:p text:style-name="P33">    <text:span text:style-name="T8">img</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img'</text:span><text:span text:style-name="T6">),</text:span></text:p>
      <text:p text:style-name="P33">    <text:span text:style-name="T8">inputButton</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button'</text:span><text:span text:style-name="T6">),</text:span></text:p>
      <text:p text:style-name="P33">    <text:span text:style-name="T8">inputCheckBox</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checkbox'</text:span><text:span text:style-name="T6">),</text:span></text:p>
      <text:p text:style-name="P33">    <text:span text:style-name="T8">inputColor</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color'</text:span><text:span text:style-name="T6">),</text:span></text:p>
      <text:p text:style-name="P33">    <text:span text:style-name="T8">inputDate</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date'</text:span><text:span text:style-name="T6">),</text:span></text:p>
      <text:p text:style-name="P33">    <text:span text:style-name="T8">inputDatetimeLocal</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datetime-local'</text:span><text:span text:style-name="T6">),</text:span></text:p>
      <text:p text:style-name="P33">    <text:span text:style-name="T8">inputEmail</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email'</text:span><text:span text:style-name="T6">),</text:span></text:p>
      <text:p text:style-name="P33">    <text:span text:style-name="T8">inputFile</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file'</text:span><text:span text:style-name="T6">),</text:span></text:p>
      <text:p text:style-name="P33">    <text:span text:style-name="T8">inputHidden</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hidden'</text:span><text:span text:style-name="T6">),</text:span></text:p>
      <text:p text:style-name="P33">    <text:span text:style-name="T8">inputImage</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image'</text:span><text:span text:style-name="T6">),</text:span></text:p>
      <text:p text:style-name="P33">    <text:span text:style-name="T8">inputMeter</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meter'</text:span><text:span text:style-name="T6">),</text:span></text:p>
      <text:p text:style-name="P33">    <text:span text:style-name="T8">inputMonth</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month'</text:span><text:span text:style-name="T6">),</text:span></text:p>
      <text:p text:style-name="P33">    <text:span text:style-name="T8">inputNumber</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number'</text:span><text:span text:style-name="T6">),</text:span></text:p>
      <text:p text:style-name="P33">    <text:span text:style-name="T8">inputOption</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option'</text:span><text:span text:style-name="T6">),</text:span></text:p>
      <text:p text:style-name="P33">    <text:span text:style-name="T8">inputPassword</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password'</text:span><text:span text:style-name="T6">),</text:span></text:p>
      <text:p text:style-name="P33">    <text:span text:style-name="T8">inputProgress</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progress'</text:span><text:span text:style-name="T6">),</text:span></text:p>
      <text:p text:style-name="P33"><text:soft-page-break/>    <text:span text:style-name="T8">inputRadio</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radio'</text:span><text:span text:style-name="T6">),</text:span></text:p>
      <text:p text:style-name="P33">    <text:span text:style-name="T8">inputRange</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range'</text:span><text:span text:style-name="T6">),</text:span></text:p>
      <text:p text:style-name="P33">    <text:span text:style-name="T8">inputReset</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reset'</text:span><text:span text:style-name="T6">),</text:span></text:p>
      <text:p text:style-name="P33">    <text:span text:style-name="T8">inputSearch</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search'</text:span><text:span text:style-name="T6">),</text:span></text:p>
      <text:p text:style-name="P33">    <text:span text:style-name="T8">inputSelect</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select'</text:span><text:span text:style-name="T6">),</text:span></text:p>
      <text:p text:style-name="P33">    <text:span text:style-name="T8">inputSubmit</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submit'</text:span><text:span text:style-name="T6">),</text:span></text:p>
      <text:p text:style-name="P33">    <text:span text:style-name="T8">inputTel</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tel'</text:span><text:span text:style-name="T6">),</text:span></text:p>
      <text:p text:style-name="P33">    <text:span text:style-name="T8">inputText</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text'</text:span><text:span text:style-name="T6">),</text:span></text:p>
      <text:p text:style-name="P33">    <text:span text:style-name="T8">inputTextarea</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textarea'</text:span><text:span text:style-name="T6">),</text:span></text:p>
      <text:p text:style-name="P33">    <text:span text:style-name="T8">inputTime</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time'</text:span><text:span text:style-name="T6">),</text:span></text:p>
      <text:p text:style-name="P33">    <text:span text:style-name="T8">inputWeek</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week'</text:span><text:span text:style-name="T6">),</text:span></text:p>
      <text:p text:style-name="P33">    <text:span text:style-name="T8">inputUrl</text:span><text:span text:style-name="T7">:</text:span><text:span text:style-name="T6"> </text:span><text:span text:style-name="T7">_</text:span><text:span text:style-name="T6"> </text:span><text:span text:style-name="T5">=&gt;</text:span><text:span text:style-name="T6"> </text:span><text:span text:style-name="T8">_i</text:span><text:span text:style-name="T6">(</text:span><text:span text:style-name="T9">'url'</text:span><text:span text:style-name="T6">),</text:span></text:p>
      <text:p text:style-name="P33">    <text:span text:style-name="T8">keygen</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keygen'</text:span><text:span text:style-name="T6">),</text:span></text:p>
      <text:p text:style-name="P33">    <text:span text:style-name="T8">label</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label'</text:span><text:span text:style-name="T6">),</text:span></text:p>
      <text:p text:style-name="P33">    <text:span text:style-name="T8">legend</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legend'</text:span><text:span text:style-name="T6">),</text:span></text:p>
      <text:p text:style-name="P33">    <text:span text:style-name="T8">li</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li'</text:span><text:span text:style-name="T6">),</text:span></text:p>
      <text:p text:style-name="P33">    <text:span text:style-name="T8">map</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map'</text:span><text:span text:style-name="T6">),</text:span></text:p>
      <text:p text:style-name="P33">    <text:span text:style-name="T8">nav</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nav'</text:span><text:span text:style-name="T6">),</text:span></text:p>
      <text:p text:style-name="P33">    <text:span text:style-name="T8">object</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object'</text:span><text:span text:style-name="T6">),</text:span></text:p>
      <text:p text:style-name="P33">    <text:span text:style-name="T8">ol</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ol'</text:span><text:span text:style-name="T6">),</text:span></text:p>
      <text:p text:style-name="P33">    <text:span text:style-name="T8">optgroup</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optgroup'</text:span><text:span text:style-name="T6">),</text:span></text:p>
      <text:p text:style-name="P33">    <text:span text:style-name="T8">option</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option'</text:span><text:span text:style-name="T6">),</text:span></text:p>
      <text:p text:style-name="P33">    <text:span text:style-name="T8">p</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p'</text:span><text:span text:style-name="T6">),</text:span></text:p>
      <text:p text:style-name="P33">    <text:span text:style-name="T8">param</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param'</text:span><text:span text:style-name="T6">),</text:span></text:p>
      <text:p text:style-name="P33">    <text:span text:style-name="T8">progress</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progress'</text:span><text:span text:style-name="T6">),</text:span></text:p>
      <text:p text:style-name="P33">    <text:span text:style-name="T8">q</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q'</text:span><text:span text:style-name="T6">),</text:span></text:p>
      <text:p text:style-name="P33">    <text:span text:style-name="T8">script</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script'</text:span><text:span text:style-name="T6">),</text:span></text:p>
      <text:p text:style-name="P33">    <text:span text:style-name="T8">section</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section'</text:span><text:span text:style-name="T6">),</text:span></text:p>
      <text:p text:style-name="P33">    <text:span text:style-name="T8">select</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select'</text:span><text:span text:style-name="T6">),</text:span></text:p>
      <text:p text:style-name="P33">    <text:span text:style-name="T8">span</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span'</text:span><text:span text:style-name="T6">),</text:span></text:p>
      <text:p text:style-name="P33">    <text:span text:style-name="T8">sub</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sub'</text:span><text:span text:style-name="T6">),</text:span></text:p>
      <text:p text:style-name="P33">    <text:span text:style-name="T8">sup</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sup'</text:span><text:span text:style-name="T6">),</text:span></text:p>
      <text:p text:style-name="P33">    <text:span text:style-name="T8">table</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table'</text:span><text:span text:style-name="T6">),</text:span></text:p>
      <text:p text:style-name="P33">    <text:span text:style-name="T8">tbody</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tbody'</text:span><text:span text:style-name="T6">),</text:span></text:p>
      <text:p text:style-name="P33">    <text:span text:style-name="T8">td</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td'</text:span><text:span text:style-name="T6">),</text:span></text:p>
      <text:p text:style-name="P33">    <text:span text:style-name="T8">textarea</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textarea'</text:span><text:span text:style-name="T6">),</text:span></text:p>
      <text:p text:style-name="P33">    <text:span text:style-name="T8">tfoot</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tfoot'</text:span><text:span text:style-name="T6">),</text:span></text:p>
      <text:p text:style-name="P33">    <text:span text:style-name="T8">th</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th'</text:span><text:span text:style-name="T6">),</text:span></text:p>
      <text:p text:style-name="P33">    <text:span text:style-name="T8">thead</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thead'</text:span><text:span text:style-name="T6">),</text:span></text:p>
      <text:p text:style-name="P33">    <text:span text:style-name="T8">tr</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tr'</text:span><text:span text:style-name="T6">),</text:span></text:p>
      <text:p text:style-name="P33">    <text:span text:style-name="T8">track</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track'</text:span><text:span text:style-name="T6">),</text:span></text:p>
      <text:p text:style-name="P33">    <text:span text:style-name="T8">u</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u'</text:span><text:span text:style-name="T6">),</text:span></text:p>
      <text:p text:style-name="P33">    <text:span text:style-name="T8">ul</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ul'</text:span><text:span text:style-name="T6">),</text:span></text:p>
      <text:p text:style-name="P33">    <text:span text:style-name="T8">video</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video'</text:span><text:span text:style-name="T6">),</text:span></text:p>
      <text:p text:style-name="P33">    <text:span text:style-name="T8">wbr</text:span><text:span text:style-name="T7">:</text:span><text:span text:style-name="T6"> </text:span><text:span text:style-name="T7">_</text:span><text:span text:style-name="T6"> </text:span><text:span text:style-name="T5">=&gt;</text:span><text:span text:style-name="T6"> </text:span><text:span text:style-name="T8">_c</text:span><text:span text:style-name="T6">(</text:span><text:span text:style-name="T9">'wbr'</text:span><text:span text:style-name="T6">)</text:span></text:p>
      <text:p text:style-name="P40"><text:span text:style-name="T41">}</text:span></text:p>
      <text:p text:style-name="P151"/>
      <text:p text:style-name="P153">OTHERS</text:p>
      <text:p text:style-name="P151"/>
      <text:p text:style-name="P157"><text:span text:style-name="T3">const</text:span> <text:span text:style-name="T37">aMode</text:span> = (<text:span text:style-name="T38">tag</text:span>, <text:span text:style-name="T38">varName</text:span>, <text:span text:style-name="T38">tagView</text:span>) <text:span text:style-name="T3">=&gt;</text:span> {</text:p>
      <text:p text:style-name="P33">    <text:span text:style-name="T12">if</text:span><text:span text:style-name="T6">(!</text:span><text:span text:style-name="T14">/</text:span><text:span text:style-name="T8">^</text:span><text:span text:style-name="T15">\$</text:span><text:span text:style-name="T14">/</text:span><text:span text:style-name="T6">.</text:span><text:span text:style-name="T8">test</text:span><text:span text:style-name="T6">(</text:span><text:span text:style-name="T7">varName</text:span><text:span text:style-name="T6">)) </text:span><text:span text:style-name="T7">varName</text:span><text:span text:style-name="T6"> = </text:span><text:span text:style-name="T9">'$'</text:span><text:span text:style-name="T6">+</text:span><text:span text:style-name="T7">varName</text:span><text:span text:style-name="T6">;</text:span></text:p>
      <text:p text:style-name="P33"><text:soft-page-break/>    <text:span text:style-name="T7">tagView</text:span><text:span text:style-name="T6"> = </text:span><text:span text:style-name="T7">tagView</text:span><text:span text:style-name="T6"> || </text:span><text:span text:style-name="T7">A_MODE_SOURCE</text:span></text:p>
      <text:p text:style-name="P40"/>
      <text:p text:style-name="P33">    <text:span text:style-name="T5">let</text:span><text:span text:style-name="T6"> </text:span><text:span text:style-name="T7">e</text:span><text:span text:style-name="T6"> = </text:span><text:span text:style-name="T11">E</text:span><text:span text:style-name="T6">[</text:span><text:span text:style-name="T7">tag</text:span><text:span text:style-name="T6">]();</text:span></text:p>
      <text:p text:style-name="P33">    <text:span text:style-name="T7">e</text:span><text:span text:style-name="T6">.</text:span><text:span text:style-name="T8">cls</text:span><text:span text:style-name="T6"> = (... </text:span><text:span text:style-name="T7">clsName</text:span><text:span text:style-name="T6">) </text:span><text:span text:style-name="T5">=&gt;</text:span><text:span text:style-name="T6"> </text:span><text:span text:style-name="T8">addClasses</text:span><text:span text:style-name="T6">(</text:span><text:span text:style-name="T7">e</text:span><text:span text:style-name="T6">, </text:span><text:span text:style-name="T7">tagView</text:span><text:span text:style-name="T6">.</text:span><text:span text:style-name="T8">defClasses_</text:span><text:span text:style-name="T6">(</text:span><text:span text:style-name="T7">clsName</text:span><text:span text:style-name="T6">))</text:span></text:p>
      <text:p text:style-name="P33">    <text:span text:style-name="T7">e</text:span><text:span text:style-name="T6">.</text:span><text:span text:style-name="T8">rmcls</text:span><text:span text:style-name="T6"> = (... </text:span><text:span text:style-name="T7">clsName</text:span><text:span text:style-name="T6">) </text:span><text:span text:style-name="T5">=&gt;</text:span><text:span text:style-name="T6"> </text:span><text:span text:style-name="T8">removeClasses</text:span><text:span text:style-name="T6">(</text:span><text:span text:style-name="T7">e</text:span><text:span text:style-name="T6">, </text:span><text:span text:style-name="T7">tagView</text:span><text:span text:style-name="T6">.</text:span><text:span text:style-name="T8">defClasses_</text:span><text:span text:style-name="T6">(</text:span><text:span text:style-name="T7">clsName</text:span><text:span text:style-name="T6">))</text:span></text:p>
      <text:p text:style-name="P33">    <text:span text:style-name="T7">e</text:span><text:span text:style-name="T6">.</text:span><text:span text:style-name="T8">for</text:span><text:span text:style-name="T6"> = (</text:span><text:span text:style-name="T7">varName_</text:span><text:span text:style-name="T6">) </text:span><text:span text:style-name="T5">=&gt;</text:span><text:span text:style-name="T6"> {</text:span></text:p>
      <text:p text:style-name="P33">        <text:span text:style-name="T7">e</text:span><text:span text:style-name="T6">.</text:span><text:span text:style-name="T8">addEventListener</text:span><text:span text:style-name="T6">(</text:span><text:span text:style-name="T9">'click'</text:span><text:span text:style-name="T6">, () </text:span><text:span text:style-name="T5">=&gt;</text:span><text:span text:style-name="T6"> {</text:span></text:p>
      <text:p text:style-name="P33">            <text:span text:style-name="T5">let</text:span><text:span text:style-name="T6"> </text:span><text:span text:style-name="T7">target</text:span><text:span text:style-name="T6"> = </text:span><text:span text:style-name="T7">varName_</text:span><text:span text:style-name="T6">? </text:span><text:span text:style-name="T7">varName_</text:span><text:span text:style-name="T6"> : </text:span><text:span text:style-name="T9">'input'</text:span><text:span text:style-name="T6">+(</text:span><text:span text:style-name="T7">varName</text:span><text:span text:style-name="T6">.</text:span><text:span text:style-name="T8">split</text:span><text:span text:style-name="T6">(</text:span><text:span text:style-name="T9">'lbl'</text:span><text:span text:style-name="T6">)[</text:span><text:span text:style-name="T13">1</text:span><text:span text:style-name="T6">]);</text:span></text:p>
      <text:p text:style-name="P33">            <text:span text:style-name="T7">tagView</text:span><text:span text:style-name="T6">[</text:span><text:span text:style-name="T7">target</text:span><text:span text:style-name="T6">].</text:span><text:span text:style-name="T8">focus</text:span><text:span text:style-name="T6">()</text:span></text:p>
      <text:p text:style-name="P33">        <text:span text:style-name="T6">})</text:span></text:p>
      <text:p text:style-name="P33">        <text:span text:style-name="T12">return</text:span><text:span text:style-name="T6"> </text:span><text:span text:style-name="T7">e</text:span></text:p>
      <text:p text:style-name="P33">    <text:span text:style-name="T6">}</text:span></text:p>
      <text:p text:style-name="P33">    <text:span text:style-name="T7">tagView</text:span><text:span text:style-name="T6">[</text:span><text:span text:style-name="T7">varName</text:span><text:span text:style-name="T6">] = </text:span><text:span text:style-name="T7">e</text:span></text:p>
      <text:p text:style-name="P33">    <text:span text:style-name="T12">if</text:span><text:span text:style-name="T6">(!</text:span><text:span text:style-name="T7">tagView</text:span><text:span text:style-name="T6">.</text:span><text:span text:style-name="T7">$view</text:span><text:span text:style-name="T6">) {</text:span></text:p>
      <text:p text:style-name="P33">        <text:span text:style-name="T7">tagView</text:span><text:span text:style-name="T6">.</text:span><text:span text:style-name="T7">$view</text:span><text:span text:style-name="T6"> = </text:span><text:span text:style-name="T7">e</text:span></text:p>
      <text:p text:style-name="P33">        <text:span text:style-name="T7">e</text:span><text:span text:style-name="T6">.</text:span><text:span text:style-name="T8">cls</text:span><text:span text:style-name="T6">(</text:span><text:span text:style-name="T9">'view'</text:span><text:span text:style-name="T6">)</text:span></text:p>
      <text:p text:style-name="P33">    <text:span text:style-name="T6">}</text:span></text:p>
      <text:p text:style-name="P33">    <text:span text:style-name="T7">e</text:span><text:span text:style-name="T6">.</text:span><text:span text:style-name="T8">cls</text:span><text:span text:style-name="T6">(</text:span><text:span text:style-name="T7">varName</text:span><text:span text:style-name="T6">)</text:span></text:p>
      <text:p text:style-name="P33">    <text:span text:style-name="T12">return</text:span><text:span text:style-name="T6"> </text:span><text:span text:style-name="T7">e</text:span></text:p>
      <text:p text:style-name="P34">}</text:p>
      <text:p text:style-name="P158"/>
      <text:p text:style-name="P159">Mode A (advanced). </text:p>
      <text:p text:style-name="P160">tag: HTML element to be created. </text:p>
      <text:p text:style-name="P160">varName: Name of the variable to be created, accessible as $varName. The varName also represents the name of the "inspectable" class to be created, accessible in CSS as className_varName. </text:p>
      <text:p text:style-name="P160">tagView: View associated with mode A or A_SAVED. </text:p>
      <text:p text:style-name="P160">After creating an HTML element in mode E, it adds and enables other settings: </text:p>
      <text:p text:style-name="P160">a) cls(...clsName): adds "inspectable" classes to the HTML element; </text:p>
      <text:p text:style-name="P160">b) rmcls(...clsName): removes "inspectable" classes from the HTML element; </text:p>
      <text:p text:style-name="P160">c) for(varName): applies a for loop to a label. If varName is not provided, it assumes the default is lblVarName, applies a split, and varName corresponds to the desired ID of the HTML element related by the for loop.</text:p>
      <text:p text:style-name="P160">Note: If the View invoking mode A or mode A_SAVED does not have an element named $view, the first element created in mode A or mode A_SAVED will also be called $view. </text:p>
      <text:p text:style-name="P160">Note: Before returning the element, the class is added according to the varName provided.</text:p>
      <text:p text:style-name="Text_20_body"/>
      <text:p text:style-name="P161"/>
      <text:p text:style-name="P162"><text:span text:style-name="T3">const</text:span> <text:span text:style-name="T37">xMode</text:span> = <text:span text:style-name="T38">tagView</text:span> <text:span text:style-name="T3">=&gt;</text:span> {</text:p>
      <text:p text:style-name="P33">    <text:span text:style-name="T5">let</text:span><text:span text:style-name="T6"> </text:span><text:span text:style-name="T7">xMode_</text:span><text:span text:style-name="T6"> = {};</text:span></text:p>
      <text:p text:style-name="P33">    <text:span text:style-name="T8">keysOf</text:span><text:span text:style-name="T6">(</text:span><text:span text:style-name="T11">E</text:span><text:span text:style-name="T6">).</text:span><text:span text:style-name="T8">forEach</text:span><text:span text:style-name="T6">(</text:span><text:span text:style-name="T7">tag</text:span><text:span text:style-name="T6"> </text:span><text:span text:style-name="T5">=&gt;</text:span><text:span text:style-name="T6"> </text:span><text:span text:style-name="T7">xMode_</text:span><text:span text:style-name="T6">[</text:span><text:span text:style-name="T7">tag</text:span><text:span text:style-name="T6">] = </text:span><text:span text:style-name="T7">varName</text:span><text:span text:style-name="T6"> </text:span><text:span text:style-name="T5">=&gt;</text:span><text:span text:style-name="T6"> </text:span><text:span text:style-name="T8">aMode</text:span><text:span text:style-name="T6">(</text:span><text:span text:style-name="T7">tag</text:span><text:span text:style-name="T6">, </text:span><text:span text:style-name="T7">varName</text:span><text:span text:style-name="T6">, </text:span><text:span text:style-name="T7">tagView</text:span><text:span text:style-name="T6">))</text:span></text:p>
      <text:p text:style-name="P40"/>
      <text:p text:style-name="P33">    <text:span text:style-name="T7">xMode_</text:span><text:span text:style-name="T6">.</text:span><text:span text:style-name="T8">jView</text:span><text:span text:style-name="T6"> = (</text:span><text:span text:style-name="T7">viewChild</text:span><text:span text:style-name="T6">, </text:span><text:span text:style-name="T7">viewParent</text:span><text:span text:style-name="T6">, </text:span><text:span text:style-name="T7">varName</text:span><text:span text:style-name="T6">) </text:span><text:span text:style-name="T5">=&gt;</text:span><text:span text:style-name="T6"> {</text:span></text:p>
      <text:p text:style-name="P33"><text:soft-page-break/>        <text:span text:style-name="T12">if</text:span><text:span text:style-name="T6">(!</text:span><text:span text:style-name="T7">varName</text:span><text:span text:style-name="T6">){</text:span></text:p>
      <text:p text:style-name="P33">            <text:span text:style-name="T7">varName</text:span><text:span text:style-name="T6"> = </text:span><text:span text:style-name="T7">viewChild</text:span><text:span text:style-name="T6">.</text:span><text:span text:style-name="T7">constructor</text:span><text:span text:style-name="T6">.</text:span><text:span text:style-name="T7">name</text:span></text:p>
      <text:p text:style-name="P33">            <text:span text:style-name="T7">varName</text:span><text:span text:style-name="T6"> = </text:span><text:span text:style-name="T7">varName</text:span><text:span text:style-name="T6">[</text:span><text:span text:style-name="T13">0</text:span><text:span text:style-name="T6">].</text:span><text:span text:style-name="T8">toLowerCase</text:span><text:span text:style-name="T6">() + </text:span><text:span text:style-name="T7">varName</text:span><text:span text:style-name="T6">.</text:span><text:span text:style-name="T8">substring</text:span><text:span text:style-name="T6">(</text:span><text:span text:style-name="T13">1</text:span><text:span text:style-name="T6">)</text:span></text:p>
      <text:p text:style-name="P33">        <text:span text:style-name="T6">}</text:span></text:p>
      <text:p text:style-name="P33">        <text:span text:style-name="T7">viewParent</text:span><text:span text:style-name="T6">[</text:span><text:span text:style-name="T9">"$"</text:span><text:span text:style-name="T6">+</text:span><text:span text:style-name="T7">varName</text:span><text:span text:style-name="T6">] = </text:span><text:span text:style-name="T7">viewChild</text:span></text:p>
      <text:p text:style-name="P33">        <text:span text:style-name="T7">A_MODE_SOURCE</text:span><text:span text:style-name="T6"> = </text:span><text:span text:style-name="T7">viewParent</text:span></text:p>
      <text:p text:style-name="P33">        <text:span text:style-name="T12">return</text:span><text:span text:style-name="T6"> </text:span><text:span text:style-name="T7">viewChild</text:span></text:p>
      <text:p text:style-name="P33">    <text:span text:style-name="T6">}</text:span></text:p>
      <text:p text:style-name="P33">    <text:span text:style-name="T12">return</text:span><text:span text:style-name="T6"> </text:span><text:span text:style-name="T7">xMode_</text:span></text:p>
      <text:p text:style-name="P34">}</text:p>
      <text:p text:style-name="P161"/>
      <text:p text:style-name="P163">xMode(tagView)</text:p>
      <text:p text:style-name="P164">Enables A (advanced) and A_SAVED modes.</text:p>
      <text:p text:style-name="P165"><text:span text:style-name="T45">t</text:span><text:span text:style-name="T23">agView</text:span>: If not specified, it works with variable write permissions (Advanced). If specified, it works with fixed write permissions (A_SAVED).</text:p>
      <text:p text:style-name="P165">Note: This should not be invoked, as it is an internal configuration of the TAG library.</text:p>
      <text:p text:style-name="P166"/>
      <text:p text:style-name="P167"/>
      <text:p text:style-name="P168"><text:span text:style-name="T3">const</text:span> <text:span text:style-name="T44">A</text:span> = <text:span text:style-name="T37">xMode</text:span>()</text:p>
      <text:p text:style-name="P169">Advanced mode assigned to constant A.</text:p>
      <text:p text:style-name="P166"/>
      <text:p text:style-name="P170"><text:span text:style-name="T3">const</text:span> <text:span text:style-name="T37">A_SAVED</text:span> = <text:span text:style-name="T38">tagView</text:span> <text:span text:style-name="T3">=&gt;</text:span> <text:span text:style-name="T37">xMode</text:span>(<text:span text:style-name="T38">tagView</text:span>)</text:p>
      <text:p text:style-name="P169">In A_SAVED mode, write permissions are maintained according to the views passed in tagView.</text:p>
      <text:p text:style-name="P165"><text:span text:style-name="T23">tagView</text:span>: a view that will retain the right to write.</text:p>
      <text:p text:style-name="P151"/>
      <text:p text:style-name="P151"/>
      <text:p text:style-name="P157"><text:span text:style-name="T3">function</text:span> <text:span text:style-name="T37">removeElements</text:span>(<text:span text:style-name="T38">parent</text:span>, ... <text:span text:style-name="T38">elements</text:span>) { </text:p>
      <text:p text:style-name="P33">    <text:span text:style-name="T8">arrayInSpread</text:span><text:span text:style-name="T6">(</text:span><text:span text:style-name="T7">elements</text:span><text:span text:style-name="T6">).</text:span><text:span text:style-name="T8">forEach</text:span><text:span text:style-name="T6">(</text:span><text:span text:style-name="T7">e</text:span><text:span text:style-name="T6"> </text:span><text:span text:style-name="T5">=&gt;</text:span><text:span text:style-name="T6"> </text:span><text:span text:style-name="T8">viewOrNode</text:span><text:span text:style-name="T6">(</text:span><text:span text:style-name="T7">parent</text:span><text:span text:style-name="T6">).</text:span><text:span text:style-name="T8">removeChild</text:span><text:span text:style-name="T6">(</text:span><text:span text:style-name="T8">viewOrNode</text:span><text:span text:style-name="T6">(</text:span><text:span text:style-name="T7">e</text:span><text:span text:style-name="T6">))) </text:span></text:p>
      <text:p text:style-name="P34">}</text:p>
      <text:p text:style-name="P151"/>
      <text:p text:style-name="P169">Remove the elements from an HTML element or view.</text:p>
      <text:p text:style-name="P165"><text:span text:style-name="T23">parent</text:span>: parent element;</text:p>
      <text:p text:style-name="P165"><text:span text:style-name="T23">elements</text:span>: Elements that will be removed from the parent element.</text:p>
      <text:p text:style-name="P166"/>
      <text:p text:style-name="P170"><text:span text:style-name="T3">function</text:span> <text:span text:style-name="T37">setAttributes</text:span>(<text:span text:style-name="T38">node</text:span>, <text:span text:style-name="T38">matrix</text:span>) {<text:span text:style-name="T38">matrix</text:span>.<text:span text:style-name="T37">forEach</text:span>(<text:span text:style-name="T38">linha</text:span> <text:span text:style-name="T3">=&gt;</text:span> <text:span text:style-name="T38">node</text:span>.<text:span text:style-name="T37">setAttribute</text:span>(<text:span text:style-name="T38">linha</text:span>[<text:span text:style-name="T43">0</text:span>], <text:span text:style-name="T38">linha</text:span>[<text:span text:style-name="T43">1</text:span>]))}</text:p>
      <text:p text:style-name="P166"/>
      <text:p text:style-name="P169">Adds attributes to an HTML element.</text:p>
      <text:p text:style-name="P165"><text:span text:style-name="T23">node</text:span>: HTML element.</text:p>
      <text:p text:style-name="P165"><text:span text:style-name="T23">matrix</text:span>: matrix containing the attributes to be added to the node.</text:p>
      <text:p text:style-name="P165"/>
      <text:p text:style-name="P170"><text:span text:style-name="T3">function</text:span> <text:span text:style-name="T37">setAttributesImg</text:span>(<text:span text:style-name="T38">img</text:span>, <text:span text:style-name="T38">alt</text:span>, <text:span text:style-name="T38">src</text:span>) {<text:span text:style-name="T37">setAttributes</text:span>(<text:span text:style-name="T38">img</text:span>, [[<text:span text:style-name="T46">'alt'</text:span>, <text:span text:style-name="T38">alt</text:span>], [<text:span text:style-name="T46">'src'</text:span>, <text:span text:style-name="T38">src</text:span>]])}</text:p>
      <text:p text:style-name="P166"/>
      <text:p text:style-name="P169">Assigns attributes to an object of type img;</text:p>
      <text:p text:style-name="P165"><text:span text:style-name="T23">img</text:span>: HTML element of type img.</text:p>
      <text:p text:style-name="P165"><text:span text:style-name="T23">alt</text:span>: alt attribute of the image.</text:p>
      <text:p text:style-name="P165"><text:span text:style-name="T23">src</text:span>: src attribute of the img.</text:p>
      <text:p text:style-name="P166"/>
      <text:p text:style-name="P170"><text:span text:style-name="T3">function</text:span> <text:span text:style-name="T37">setAttribute</text:span>(<text:span text:style-name="T38">node</text:span>, <text:span text:style-name="T38">array</text:span>) {<text:span text:style-name="T38">node</text:span>.<text:span text:style-name="T37">setAttribute</text:span>(<text:span text:style-name="T38">a</text:span><text:span text:style-name="T47">rray</text:span>[<text:span text:style-name="T43">0</text:span>], <text:span text:style-name="T47">array</text:span>[<text:span text:style-name="T43">1</text:span>])}</text:p>
      <text:p text:style-name="P166"/>
      <text:p text:style-name="P169"><text:soft-page-break/>Adds an attribute to an HTML element.</text:p>
      <text:p text:style-name="P165"><text:span text:style-name="T23">node</text:span>: HTML element.</text:p>
      <text:p text:style-name="P171"><text:span text:style-name="T23">array</text:span>: Position 0 = attribute, position 1 = value.</text:p>
      <text:p text:style-name="P171"/>
      <text:p text:style-name="P172"/>
      <text:p text:style-name="P172"/>
      <text:p text:style-name="P173"><text:span text:style-name="T3">function</text:span> <text:span text:style-name="T37">insertAfter</text:span>(<text:span text:style-name="T38">referenceNode</text:span>, ... <text:span text:style-name="T38">nodes</text:span>) {</text:p>
      <text:p text:style-name="P33">    <text:span text:style-name="T5">let</text:span><text:span text:style-name="T6"> </text:span><text:span text:style-name="T7">parentNode</text:span><text:span text:style-name="T6"> = </text:span><text:span text:style-name="T7">referenceNode</text:span><text:span text:style-name="T6">.</text:span><text:span text:style-name="T7">parentNode</text:span><text:span text:style-name="T6">;</text:span></text:p>
      <text:p text:style-name="P33">    <text:span text:style-name="T8">arrayInSpread</text:span><text:span text:style-name="T6">(</text:span><text:span text:style-name="T7">nodes</text:span><text:span text:style-name="T6">).</text:span><text:span text:style-name="T8">forEach</text:span><text:span text:style-name="T6">(</text:span><text:span text:style-name="T7">node</text:span><text:span text:style-name="T6"> </text:span><text:span text:style-name="T5">=&gt;</text:span><text:span text:style-name="T6"> </text:span><text:span text:style-name="T7">parentNode</text:span><text:span text:style-name="T6">.</text:span><text:span text:style-name="T8">insertBefore</text:span><text:span text:style-name="T6">(</text:span><text:span text:style-name="T8">viewOrNode</text:span><text:span text:style-name="T6">(</text:span><text:span text:style-name="T7">node</text:span><text:span text:style-name="T6">), </text:span><text:span text:style-name="T7">referenceNode</text:span><text:span text:style-name="T6">.</text:span><text:span text:style-name="T7">nextSibling</text:span><text:span text:style-name="T6">))</text:span></text:p>
      <text:p text:style-name="P34">}</text:p>
      <text:p text:style-name="P172"/>
      <text:p text:style-name="P174">Inserts HTML elements after the referenced HTML element (referenceNode).</text:p>
      <text:p text:style-name="P171"><text:span text:style-name="T23">referenceNode</text:span>: the reference node.</text:p>
      <text:p text:style-name="P171"><text:span text:style-name="T23">nodes</text:span>: The HTML elements to be added.</text:p>
      <text:p text:style-name="P172"/>
      <text:p text:style-name="P173"><text:span text:style-name="T3">function</text:span> <text:span text:style-name="T37">insertBefore</text:span>(<text:span text:style-name="T38">referenceNode</text:span>, ... <text:span text:style-name="T38">nodes</text:span>) {</text:p>
      <text:p text:style-name="P33">    <text:span text:style-name="T5">let</text:span><text:span text:style-name="T6"> </text:span><text:span text:style-name="T7">parentNode</text:span><text:span text:style-name="T6"> = </text:span><text:span text:style-name="T8">viewOrNode</text:span><text:span text:style-name="T6">(</text:span><text:span text:style-name="T7">referenceNode</text:span><text:span text:style-name="T6">).</text:span><text:span text:style-name="T7">parentNode</text:span><text:span text:style-name="T6">;</text:span></text:p>
      <text:p text:style-name="P33">    <text:span text:style-name="T8">arrayInSpread</text:span><text:span text:style-name="T6">(</text:span><text:span text:style-name="T7">nodes</text:span><text:span text:style-name="T6">).</text:span><text:span text:style-name="T8">forEach</text:span><text:span text:style-name="T6">(</text:span><text:span text:style-name="T7">node</text:span><text:span text:style-name="T6"> </text:span><text:span text:style-name="T5">=&gt;</text:span><text:span text:style-name="T6"> </text:span><text:span text:style-name="T7">parentNode</text:span><text:span text:style-name="T6">.</text:span><text:span text:style-name="T8">insertBefore</text:span><text:span text:style-name="T6">(</text:span><text:span text:style-name="T8">viewOrNode</text:span><text:span text:style-name="T6">(</text:span><text:span text:style-name="T7">node</text:span><text:span text:style-name="T6">), </text:span><text:span text:style-name="T7">referenceNode</text:span><text:span text:style-name="T6">))</text:span></text:p>
      <text:p text:style-name="P34">}</text:p>
      <text:p text:style-name="P172"/>
      <text:p text:style-name="P174">Inserts HTML elements before the referenced HTML element (referenceNode).</text:p>
      <text:p text:style-name="P171"><text:span text:style-name="T23">referenceNode</text:span>: the reference node.</text:p>
      <text:p text:style-name="P171"><text:span text:style-name="T23">nodes</text:span>: The HTML elements to be added.</text:p>
      <text:p text:style-name="P175"/>
      <text:p text:style-name="P176"><text:span text:style-name="T3">function</text:span> <text:span text:style-name="T37">textNode</text:span>() {<text:span text:style-name="T39">return</text:span> <text:span text:style-name="T38">document</text:span>.<text:span text:style-name="T37">createTextNode</text:span>(<text:span text:style-name="T46">""</text:span>)}</text:p>
      <text:p text:style-name="P174">Creates a textNode element.</text:p>
      <text:p text:style-name="P172"/>
      <text:p text:style-name="P173"><text:span text:style-name="T3">function</text:span> <text:span text:style-name="T37">setTextNode</text:span>(<text:span text:style-name="T38">element</text:span>, <text:span text:style-name="T38">txt</text:span>, <text:span text:style-name="T38">isLastNode</text:span>) {</text:p>
      <text:p text:style-name="P33">    <text:span text:style-name="T12">if</text:span><text:span text:style-name="T6"> (!</text:span><text:span text:style-name="T7">element</text:span><text:span text:style-name="T6">.</text:span><text:span text:style-name="T7">textNode</text:span><text:span text:style-name="T6">) {</text:span></text:p>
      <text:p text:style-name="P33">        <text:span text:style-name="T7">element</text:span><text:span text:style-name="T6">.</text:span><text:span text:style-name="T7">textNode</text:span><text:span text:style-name="T6"> = </text:span><text:span text:style-name="T8">textNode</text:span><text:span text:style-name="T6">()</text:span></text:p>
      <text:p text:style-name="P33">        <text:span text:style-name="T12">if</text:span><text:span text:style-name="T6"> (!</text:span><text:span text:style-name="T7">isLastNode</text:span><text:span text:style-name="T6"> &amp;&amp; </text:span><text:span text:style-name="T7">element</text:span><text:span text:style-name="T6">.</text:span><text:span text:style-name="T7">firstChild</text:span><text:span text:style-name="T6">) {</text:span></text:p>
      <text:p text:style-name="P33">            <text:span text:style-name="T8">insertBefore</text:span><text:span text:style-name="T6">(</text:span><text:span text:style-name="T7">element</text:span><text:span text:style-name="T6">.</text:span><text:span text:style-name="T7">firstChild</text:span><text:span text:style-name="T6">, </text:span><text:span text:style-name="T7">element</text:span><text:span text:style-name="T6">.</text:span><text:span text:style-name="T7">textNode</text:span><text:span text:style-name="T6">)</text:span></text:p>
      <text:p text:style-name="P33">        <text:span text:style-name="T6">} </text:span><text:span text:style-name="T12">else</text:span><text:span text:style-name="T6"> {</text:span></text:p>
      <text:p text:style-name="P33">            <text:span text:style-name="T8">appendTo</text:span><text:span text:style-name="T6">(</text:span><text:span text:style-name="T7">element</text:span><text:span text:style-name="T6">, </text:span><text:span text:style-name="T7">element</text:span><text:span text:style-name="T6">.</text:span><text:span text:style-name="T7">textNode</text:span><text:span text:style-name="T6">)</text:span></text:p>
      <text:p text:style-name="P33">        <text:span text:style-name="T6">}</text:span></text:p>
      <text:p text:style-name="P33">    <text:span text:style-name="T6">}</text:span></text:p>
      <text:p text:style-name="P33">    <text:span text:style-name="T8">changeTextNode</text:span><text:span text:style-name="T6">(</text:span><text:span text:style-name="T7">element</text:span><text:span text:style-name="T6">.</text:span><text:span text:style-name="T7">textNode</text:span><text:span text:style-name="T6">, </text:span><text:span text:style-name="T7">txt</text:span><text:span text:style-name="T6">)</text:span></text:p>
      <text:p text:style-name="P34">}</text:p>
      <text:p text:style-name="P172"/>
      <text:p text:style-name="P174">Assigns a textNode to an HTML element such as p, span, etc.</text:p>
      <text:p text:style-name="P171"><text:span text:style-name="T23">element</text:span>: element to have inserted a textNode.</text:p>
      <text:p text:style-name="P171"><text:span text:style-name="T23">txt</text:span>: the text to be inserted.</text:p>
      <text:p text:style-name="P171"><text:span text:style-name="T48">i</text:span><text:span text:style-name="T23">sLastNode</text:span>: If true, it will be inserted as the last child of the node. If false, it will be inserted in the first child position of the node.</text:p>
      <text:p text:style-name="P172"/>
      <text:p text:style-name="P173"><text:span text:style-name="T3">function</text:span> <text:span text:style-name="T37">changeTextNode</text:span>(<text:span text:style-name="T38">txtNode</text:span>, <text:span text:style-name="T38">txt</text:span>) {<text:span text:style-name="T38">txtNode</text:span>.<text:span text:style-name="T38">nodeValue</text:span> = <text:span text:style-name="T38">txt</text:span>}</text:p>
      <text:p text:style-name="P174">Changes the text of a textNode.</text:p>
      <text:p text:style-name="P177"><text:span text:style-name="T23">txtNode</text:span>: the textNode element to be modified.</text:p>
      <text:p text:style-name="P177"><text:span text:style-name="T23">txt</text:span>: the text to be assigned.</text:p>
      <text:p text:style-name="P178"><text:soft-page-break/></text:p>
      <text:p text:style-name="P179"><text:span text:style-name="T49">function</text:span><text:span text:style-name="T50"> </text:span><text:span text:style-name="T51">appendTo</text:span><text:span text:style-name="T50">(</text:span><text:span text:style-name="T52">parent</text:span><text:span text:style-name="T50">, ... </text:span><text:span text:style-name="T52">elements</text:span><text:span text:style-name="T50">) { </text:span><text:span text:style-name="T8">arrayInSpread</text:span><text:span text:style-name="T6">(</text:span><text:span text:style-name="T7">elements</text:span><text:span text:style-name="T6">).</text:span><text:span text:style-name="T8">forEach</text:span><text:span text:style-name="T6">(</text:span><text:span text:style-name="T7">e</text:span><text:span text:style-name="T6"> </text:span><text:span text:style-name="T5">=&gt;</text:span><text:span text:style-name="T6"> </text:span><text:span text:style-name="T8">viewOrNode</text:span><text:span text:style-name="T6">(</text:span><text:span text:style-name="T7">parent</text:span><text:span text:style-name="T6">).</text:span><text:span text:style-name="T8">appendChild</text:span><text:span text:style-name="T6">(</text:span><text:span text:style-name="T8">viewOrNode</text:span><text:span text:style-name="T6">(</text:span><text:span text:style-name="T7">e</text:span><text:span text:style-name="T6">)))</text:span></text:p>
      <text:p text:style-name="P33">    <text:span text:style-name="T12">return</text:span><text:span text:style-name="T6"> </text:span><text:span text:style-name="T7">parent</text:span></text:p>
      <text:p text:style-name="P34">}</text:p>
      <text:p text:style-name="P178"/>
      <text:p text:style-name="P180">Attach one element or view to another element or view.</text:p>
      <text:p text:style-name="P177"><text:span text:style-name="T23">parent</text:span>: The parent node that will append the element or view.</text:p>
      <text:p text:style-name="P177"><text:span text:style-name="T23">Elements</text:span>: the elements that will be appended.</text:p>
      <text:p text:style-name="P178"/>
      <text:p text:style-name="P181"><text:span text:style-name="T3">function</text:span> <text:span text:style-name="T37">jsonInMatrix</text:span>(<text:span text:style-name="T38">jsonMatrix</text:span>) {</text:p>
      <text:p text:style-name="P33">    <text:span text:style-name="T5">let</text:span><text:span text:style-name="T6"> {</text:span><text:span text:style-name="T7">columns</text:span><text:span text:style-name="T6">, </text:span><text:span text:style-name="T7">rows</text:span><text:span text:style-name="T6">} = </text:span><text:span text:style-name="T7">jsonMatrix</text:span><text:span text:style-name="T6">;</text:span></text:p>
      <text:p text:style-name="P33">    </text:p>
      <text:p text:style-name="P33">    <text:span text:style-name="T12">return</text:span><text:span text:style-name="T6"> </text:span><text:span text:style-name="T7">rows</text:span><text:span text:style-name="T6">.</text:span><text:span text:style-name="T8">reduce</text:span><text:span text:style-name="T6">((</text:span><text:span text:style-name="T7">list</text:span><text:span text:style-name="T6">, </text:span><text:span text:style-name="T7">row</text:span><text:span text:style-name="T6">) </text:span><text:span text:style-name="T5">=&gt;</text:span><text:span text:style-name="T6"> {</text:span></text:p>
      <text:p text:style-name="P33">        <text:span text:style-name="T5">let</text:span><text:span text:style-name="T6"> </text:span><text:span text:style-name="T7">obj</text:span><text:span text:style-name="T6"> = {};</text:span></text:p>
      <text:p text:style-name="P33">        <text:span text:style-name="T7">columns</text:span><text:span text:style-name="T6">.</text:span><text:span text:style-name="T8">forEach</text:span><text:span text:style-name="T6">((</text:span><text:span text:style-name="T7">colName</text:span><text:span text:style-name="T6">, </text:span><text:span text:style-name="T7">colNum</text:span><text:span text:style-name="T6">) </text:span><text:span text:style-name="T5">=&gt;</text:span><text:span text:style-name="T6"> {</text:span></text:p>
      <text:p text:style-name="P33">            <text:span text:style-name="T5">let</text:span><text:span text:style-name="T6"> </text:span><text:span text:style-name="T7">value</text:span><text:span text:style-name="T6"> = </text:span><text:span text:style-name="T7">row</text:span><text:span text:style-name="T6">[</text:span><text:span text:style-name="T7">colNum</text:span><text:span text:style-name="T6">];</text:span></text:p>
      <text:p text:style-name="P33">            <text:span text:style-name="T7">obj</text:span><text:span text:style-name="T6">[</text:span><text:span text:style-name="T7">colName</text:span><text:span text:style-name="T6">] = </text:span><text:span text:style-name="T7">value</text:span><text:span text:style-name="T6">?.</text:span><text:span text:style-name="T7">columns</text:span><text:span text:style-name="T6">? </text:span><text:span text:style-name="T8">jsonInMatrix</text:span><text:span text:style-name="T6">(</text:span><text:span text:style-name="T7">value</text:span><text:span text:style-name="T6">) : </text:span><text:span text:style-name="T7">value</text:span><text:span text:style-name="T6">;</text:span></text:p>
      <text:p text:style-name="P33">        <text:span text:style-name="T6">})</text:span></text:p>
      <text:p text:style-name="P33">        <text:span text:style-name="T12">return</text:span><text:span text:style-name="T6"> </text:span><text:span text:style-name="T7">list</text:span><text:span text:style-name="T6">.</text:span><text:span text:style-name="T8">concat</text:span><text:span text:style-name="T6">(</text:span><text:span text:style-name="T7">obj</text:span><text:span text:style-name="T6">)</text:span></text:p>
      <text:p text:style-name="P33">    <text:span text:style-name="T6">}, []);</text:span></text:p>
      <text:p text:style-name="P34">}</text:p>
      <text:p text:style-name="P178"/>
      <text:p text:style-name="P178">It works with a response in the following format:</text:p>
      <text:p text:style-name="P178"><text:s text:c="4"/>data = {</text:p>
      <text:p text:style-name="P178"><text:tab/>columns:[col1, col2, …, colN],</text:p>
      <text:p text:style-name="P178"><text:tab/>rows:[</text:p>
      <text:p text:style-name="P178"><text:tab/><text:tab/>row1,</text:p>
      <text:p text:style-name="P178"><text:tab/><text:tab/>row2,</text:p>
      <text:p text:style-name="P178"><text:tab/><text:tab/>…,</text:p>
      <text:p text:style-name="P178"><text:tab/><text:tab/>rowN</text:p>
      <text:p text:style-name="P178"><text:tab/>]</text:p>
      <text:p text:style-name="P178">}</text:p>
      <text:p text:style-name="P182"/>
      <text:p text:style-name="P183">It significantly reduces very large JSON responses when there are responses involving collections, however it is more laborious on the backend side.</text:p>
      <text:p text:style-name="P184">This probably won't be useful to you, so you can remove this function: <text:s/><text:span text:style-name="T42">jsonInMatrix</text:span></text:p>
      <text:p text:style-name="P177">Basically, it converts a table into a JSON where the keys are represented by the column names and the values ​​are distributed across each row.</text:p>
      <text:p text:style-name="P177"/>
      <text:p text:style-name="P181"><text:span text:style-name="T3">function</text:span> <text:span text:style-name="T37">jsonAsMatrix</text:span>(<text:span text:style-name="T38">json</text:span>) {</text:p>
      <text:p text:style-name="P33">    <text:span text:style-name="T7">json</text:span><text:span text:style-name="T6"> = </text:span><text:span text:style-name="T7">JSON</text:span><text:span text:style-name="T6">.</text:span><text:span text:style-name="T8">parse</text:span><text:span text:style-name="T6">(</text:span><text:span text:style-name="T7">JSON</text:span><text:span text:style-name="T6">.</text:span><text:span text:style-name="T8">stringify</text:span><text:span text:style-name="T6">(</text:span><text:span text:style-name="T7">json</text:span><text:span text:style-name="T6">));</text:span></text:p>
      <text:p text:style-name="P33">    <text:span text:style-name="T5">let</text:span><text:span text:style-name="T6"> </text:span><text:span text:style-name="T7">columns</text:span><text:span text:style-name="T6"> = [], </text:span></text:p>
      <text:p text:style-name="P33">        <text:span text:style-name="T7">rows</text:span><text:span text:style-name="T6"> = [];</text:span></text:p>
      <text:p text:style-name="P33">    <text:span text:style-name="T12">if</text:span><text:span text:style-name="T6">(</text:span><text:span text:style-name="T16">Array</text:span><text:span text:style-name="T6">.</text:span><text:span text:style-name="T8">isArray</text:span><text:span text:style-name="T6">(</text:span><text:span text:style-name="T7">json</text:span><text:span text:style-name="T6">) &amp;&amp; </text:span><text:span text:style-name="T7">json</text:span><text:span text:style-name="T6">.</text:span><text:span text:style-name="T7">length</text:span><text:span text:style-name="T6">){</text:span></text:p>
      <text:p text:style-name="P33">        <text:span text:style-name="T5">let</text:span><text:span text:style-name="T6"> </text:span><text:span text:style-name="T7">isObject</text:span><text:span text:style-name="T6"> = </text:span><text:span text:style-name="T5">false</text:span><text:span text:style-name="T6">;</text:span></text:p>
      <text:p text:style-name="P33">        <text:span text:style-name="T12">for</text:span><text:span text:style-name="T6">(</text:span><text:span text:style-name="T5">let</text:span><text:span text:style-name="T6"> </text:span><text:span text:style-name="T7">value</text:span><text:span text:style-name="T6"> </text:span><text:span text:style-name="T5">of</text:span><text:span text:style-name="T6"> </text:span><text:span text:style-name="T7">json</text:span><text:span text:style-name="T6">){</text:span></text:p>
      <text:p text:style-name="P33">            <text:span text:style-name="T12">if</text:span><text:span text:style-name="T6">(</text:span><text:span text:style-name="T7">value</text:span><text:span text:style-name="T6"> != </text:span><text:span text:style-name="T5">null</text:span><text:span text:style-name="T6"> &amp;&amp; </text:span><text:span text:style-name="T7">value</text:span><text:span text:style-name="T6"> != </text:span><text:span text:style-name="T5">undefined</text:span><text:span text:style-name="T6">){</text:span></text:p>
      <text:p text:style-name="P33">                <text:span text:style-name="T7">isObject</text:span><text:span text:style-name="T6"> = </text:span><text:span text:style-name="T5">typeof</text:span><text:span text:style-name="T6"> </text:span><text:span text:style-name="T7">value</text:span><text:span text:style-name="T6"> == </text:span><text:span text:style-name="T9">'object'</text:span></text:p>
      <text:p text:style-name="P33">                <text:span text:style-name="T12">break</text:span></text:p>
      <text:p text:style-name="P33">            <text:span text:style-name="T6">}</text:span></text:p>
      <text:p text:style-name="P33"><text:soft-page-break/>        <text:span text:style-name="T6">}</text:span></text:p>
      <text:p text:style-name="P33">        <text:span text:style-name="T12">if</text:span><text:span text:style-name="T6">(</text:span><text:span text:style-name="T7">isObject</text:span><text:span text:style-name="T6">){</text:span></text:p>
      <text:p text:style-name="P33">            <text:span text:style-name="T7">json</text:span><text:span text:style-name="T6">.</text:span><text:span text:style-name="T8">forEach</text:span><text:span text:style-name="T6">(</text:span><text:span text:style-name="T7">obj</text:span><text:span text:style-name="T6"> </text:span><text:span text:style-name="T5">=&gt;</text:span><text:span text:style-name="T6"> {</text:span></text:p>
      <text:p text:style-name="P33">                <text:span text:style-name="T5">let</text:span><text:span text:style-name="T6"> </text:span><text:span text:style-name="T7">row</text:span><text:span text:style-name="T6"> = [];</text:span></text:p>
      <text:p text:style-name="P33">                <text:span text:style-name="T16">Object</text:span><text:span text:style-name="T6">.</text:span><text:span text:style-name="T8">keys</text:span><text:span text:style-name="T6">(</text:span><text:span text:style-name="T7">obj</text:span><text:span text:style-name="T6">).</text:span><text:span text:style-name="T8">forEach</text:span><text:span text:style-name="T6">(</text:span><text:span text:style-name="T7">colName</text:span><text:span text:style-name="T6"> </text:span><text:span text:style-name="T5">=&gt;</text:span><text:span text:style-name="T6"> {</text:span></text:p>
      <text:p text:style-name="P33">                    <text:span text:style-name="T5">let</text:span><text:span text:style-name="T6"> </text:span><text:span text:style-name="T7">val</text:span><text:span text:style-name="T6"> = </text:span><text:span text:style-name="T7">obj</text:span><text:span text:style-name="T6">[</text:span><text:span text:style-name="T7">colName</text:span><text:span text:style-name="T6">];</text:span></text:p>
      <text:p text:style-name="P33">                    <text:span text:style-name="T6">!</text:span><text:span text:style-name="T7">columns</text:span><text:span text:style-name="T6">.</text:span><text:span text:style-name="T8">includes</text:span><text:span text:style-name="T6">(</text:span><text:span text:style-name="T7">colName</text:span><text:span text:style-name="T6">) &amp;&amp; </text:span><text:span text:style-name="T7">columns</text:span><text:span text:style-name="T6">.</text:span><text:span text:style-name="T8">push</text:span><text:span text:style-name="T6">(</text:span><text:span text:style-name="T7">colName</text:span><text:span text:style-name="T6">)</text:span></text:p>
      <text:p text:style-name="P33">                    <text:span text:style-name="T7">row</text:span><text:span text:style-name="T6">[</text:span><text:span text:style-name="T7">columns</text:span><text:span text:style-name="T6">.</text:span><text:span text:style-name="T8">indexOf</text:span><text:span text:style-name="T6">(</text:span><text:span text:style-name="T7">colName</text:span><text:span text:style-name="T6">)] = </text:span><text:span text:style-name="T5">typeof</text:span><text:span text:style-name="T6"> </text:span><text:span text:style-name="T7">val</text:span><text:span text:style-name="T6"> != </text:span><text:span text:style-name="T9">'object'</text:span><text:span text:style-name="T6"> || !</text:span><text:span text:style-name="T7">val</text:span><text:span text:style-name="T6"> ? </text:span><text:span text:style-name="T7">val</text:span><text:span text:style-name="T6"> : </text:span><text:span text:style-name="T8">jsonAsMatrix</text:span><text:span text:style-name="T6">(</text:span><text:span text:style-name="T7">val</text:span><text:span text:style-name="T6">);</text:span></text:p>
      <text:p text:style-name="P33">                <text:span text:style-name="T6">})</text:span></text:p>
      <text:p text:style-name="P33">                <text:span text:style-name="T7">rows</text:span><text:span text:style-name="T6">.</text:span><text:span text:style-name="T8">push</text:span><text:span text:style-name="T6">(</text:span><text:span text:style-name="T7">row</text:span><text:span text:style-name="T6">)</text:span></text:p>
      <text:p text:style-name="P33">            <text:span text:style-name="T6">})</text:span></text:p>
      <text:p text:style-name="P33">        <text:span text:style-name="T6">}</text:span><text:span text:style-name="T12">else</text:span><text:span text:style-name="T6">{</text:span></text:p>
      <text:p text:style-name="P33">            <text:span text:style-name="T7">rows</text:span><text:span text:style-name="T6"> = </text:span><text:span text:style-name="T16">Array</text:span><text:span text:style-name="T6">.</text:span><text:span text:style-name="T8">from</text:span><text:span text:style-name="T6">(</text:span><text:span text:style-name="T7">json</text:span><text:span text:style-name="T6">);</text:span></text:p>
      <text:p text:style-name="P33">        <text:span text:style-name="T6">}</text:span></text:p>
      <text:p text:style-name="P33">    <text:span text:style-name="T6">}</text:span><text:span text:style-name="T12">else</text:span><text:span text:style-name="T6">{</text:span></text:p>
      <text:p text:style-name="P33">        <text:span text:style-name="T7">columns</text:span><text:span text:style-name="T6"> = </text:span><text:span text:style-name="T16">Object</text:span><text:span text:style-name="T6">.</text:span><text:span text:style-name="T8">keys</text:span><text:span text:style-name="T6">(</text:span><text:span text:style-name="T7">json</text:span><text:span text:style-name="T6">);</text:span></text:p>
      <text:p text:style-name="P33">        <text:span text:style-name="T7">columns</text:span><text:span text:style-name="T6">.</text:span><text:span text:style-name="T8">forEach</text:span><text:span text:style-name="T6">(</text:span><text:span text:style-name="T7">colName</text:span><text:span text:style-name="T6"> </text:span><text:span text:style-name="T5">=&gt;</text:span><text:span text:style-name="T6"> {</text:span></text:p>
      <text:p text:style-name="P33">            <text:span text:style-name="T5">let</text:span><text:span text:style-name="T6"> </text:span><text:span text:style-name="T7">value</text:span><text:span text:style-name="T6"> = </text:span><text:span text:style-name="T7">json</text:span><text:span text:style-name="T6">[</text:span><text:span text:style-name="T7">colName</text:span><text:span text:style-name="T6">];</text:span></text:p>
      <text:p text:style-name="P33">            <text:span text:style-name="T7">rows</text:span><text:span text:style-name="T6">.</text:span><text:span text:style-name="T8">push</text:span><text:span text:style-name="T6">(!</text:span><text:span text:style-name="T7">value</text:span><text:span text:style-name="T6"> || </text:span><text:span text:style-name="T5">typeof</text:span><text:span text:style-name="T6"> </text:span><text:span text:style-name="T7">value</text:span><text:span text:style-name="T6"> != </text:span><text:span text:style-name="T9">'object'</text:span><text:span text:style-name="T6"> ? </text:span><text:span text:style-name="T7">value</text:span><text:span text:style-name="T6"> : </text:span><text:span text:style-name="T8">jsonAsMatrix</text:span><text:span text:style-name="T6">(</text:span><text:span text:style-name="T7">value</text:span><text:span text:style-name="T6">))</text:span></text:p>
      <text:p text:style-name="P33">        <text:span text:style-name="T6">})</text:span></text:p>
      <text:p text:style-name="P33">    <text:span text:style-name="T6">}</text:span></text:p>
      <text:p text:style-name="P33">    <text:span text:style-name="T12">return</text:span><text:span text:style-name="T6"> {</text:span><text:span text:style-name="T7">columns</text:span><text:span text:style-name="T6">, </text:span><text:span text:style-name="T7">rows</text:span><text:span text:style-name="T6">};</text:span></text:p>
      <text:p text:style-name="P34">}</text:p>
      <text:p text:style-name="P178"/>
      <text:p text:style-name="P180">Transforms a JSON object into a table (matrix) where the columns represent the keys and the rows the values.</text:p>
      <text:p text:style-name="P177"/>
      <text:p text:style-name="P185">This probably won't be useful to you, so you can remove this function: <text:s/><text:span text:style-name="T42">jsonAsMatrix</text:span></text:p>
      <text:p text:style-name="P186"><text:span text:style-name="T53"/></text:p>
      <text:p text:style-name="P178"/>
      <text:p text:style-name="P181"><text:span text:style-name="T3">function</text:span> <text:span text:style-name="T37">ajaxSendFile</text:span>(<text:span text:style-name="T38">url</text:span>, <text:span text:style-name="T38">file</text:span>) {</text:p>
      <text:p text:style-name="P33">    <text:span text:style-name="T5">let</text:span><text:span text:style-name="T6"> </text:span><text:span text:style-name="T7">ajax</text:span><text:span text:style-name="T6"> = </text:span><text:span text:style-name="T5">new</text:span><text:span text:style-name="T6"> </text:span><text:span text:style-name="T16">XMLHttpRequest</text:span><text:span text:style-name="T6">();</text:span></text:p>
      <text:p text:style-name="P33">    <text:span text:style-name="T7">ajax</text:span><text:span text:style-name="T6">.</text:span><text:span text:style-name="T8">open</text:span><text:span text:style-name="T6">(</text:span><text:span text:style-name="T9">'POST'</text:span><text:span text:style-name="T6">, </text:span><text:span text:style-name="T7">url</text:span><text:span text:style-name="T6">, </text:span><text:span text:style-name="T5">true</text:span><text:span text:style-name="T6">)</text:span></text:p>
      <text:p text:style-name="P33">    <text:span text:style-name="T7">ajax</text:span><text:span text:style-name="T6">.</text:span><text:span text:style-name="T8">setRequestHeader</text:span><text:span text:style-name="T6">(</text:span><text:span text:style-name="T9">'Content-type'</text:span><text:span text:style-name="T6">, </text:span><text:span text:style-name="T9">'multipart/form-data'</text:span><text:span text:style-name="T6">)</text:span></text:p>
      <text:p text:style-name="P33">    <text:span text:style-name="T7">ajax</text:span><text:span text:style-name="T6">.</text:span><text:span text:style-name="T8">send</text:span><text:span text:style-name="T6">(</text:span><text:span text:style-name="T7">file</text:span><text:span text:style-name="T6">)</text:span></text:p>
      <text:p text:style-name="P33">    <text:span text:style-name="T12">return</text:span><text:span text:style-name="T6"> </text:span><text:span text:style-name="T7">ajax</text:span></text:p>
      <text:p text:style-name="P40"><text:span text:style-name="T41">}</text:span></text:p>
      <text:p text:style-name="P178"/>
      <text:p text:style-name="P187"><text:span text:style-name="T3">function</text:span> <text:span text:style-name="T37">ajaxSendFiles</text:span>(<text:span text:style-name="T38">url</text:span>, <text:span text:style-name="T38">keys</text:span>, <text:span text:style-name="T38">files</text:span>) {</text:p>
      <text:p text:style-name="P33">    <text:span text:style-name="T5">let</text:span><text:span text:style-name="T6"> </text:span><text:span text:style-name="T7">formData</text:span><text:span text:style-name="T6"> = </text:span><text:span text:style-name="T5">new</text:span><text:span text:style-name="T6"> </text:span><text:span text:style-name="T16">FormData</text:span><text:span text:style-name="T6">();</text:span></text:p>
      <text:p text:style-name="P33">    </text:p>
      <text:p text:style-name="P33">    <text:span text:style-name="T12">if</text:span><text:span text:style-name="T6"> (!</text:span><text:span text:style-name="T7">files</text:span><text:span text:style-name="T6">.</text:span><text:span text:style-name="T7">length</text:span><text:span text:style-name="T6">) </text:span><text:span text:style-name="T12">return</text:span></text:p>
      <text:p text:style-name="P33">    </text:p>
      <text:p text:style-name="P33">    <text:span text:style-name="T7">files</text:span><text:span text:style-name="T6">.</text:span><text:span text:style-name="T8">forEach</text:span><text:span text:style-name="T6">((</text:span><text:span text:style-name="T7">file</text:span><text:span text:style-name="T6">, </text:span><text:span text:style-name="T7">index</text:span><text:span text:style-name="T6">) </text:span><text:span text:style-name="T5">=&gt;</text:span><text:span text:style-name="T6"> {</text:span></text:p>
      <text:p text:style-name="P33">        <text:span text:style-name="T12">if</text:span><text:span text:style-name="T6">(!</text:span><text:span text:style-name="T7">file</text:span><text:span text:style-name="T6">.</text:span><text:span text:style-name="T7">name</text:span><text:span text:style-name="T6">){</text:span></text:p>
      <text:p text:style-name="P33">            <text:span text:style-name="T8">alert</text:span><text:span text:style-name="T6">(</text:span><text:span text:style-name="T9">`Some document is not file at index [</text:span><text:span text:style-name="T5">${</text:span><text:span text:style-name="T7">index</text:span><text:span text:style-name="T5">}</text:span><text:span text:style-name="T9">]`</text:span><text:span text:style-name="T6">)</text:span></text:p>
      <text:p text:style-name="P33">            <text:span text:style-name="T12">return</text:span></text:p>
      <text:p text:style-name="P33">        <text:span text:style-name="T6">}</text:span></text:p>
      <text:p text:style-name="P33">        <text:span text:style-name="T12">if</text:span><text:span text:style-name="T6">(!</text:span><text:span text:style-name="T7">keys</text:span><text:span text:style-name="T6">[</text:span><text:span text:style-name="T7">index</text:span><text:span text:style-name="T6">]){</text:span></text:p>
      <text:p text:style-name="P33">            <text:span text:style-name="T8">alert</text:span><text:span text:style-name="T6">(</text:span><text:span text:style-name="T9">`File reference key not found for </text:span><text:span text:style-name="T5">${</text:span><text:span text:style-name="T7">file</text:span><text:span text:style-name="T6">.</text:span><text:span text:style-name="T7">name</text:span><text:span text:style-name="T5">}</text:span><text:span text:style-name="T9">`</text:span><text:span text:style-name="T6">)</text:span></text:p>
      <text:p text:style-name="P33"><text:soft-page-break/>            <text:span text:style-name="T12">return</text:span></text:p>
      <text:p text:style-name="P33">        <text:span text:style-name="T6">}</text:span></text:p>
      <text:p text:style-name="P33">        <text:span text:style-name="T7">formData</text:span><text:span text:style-name="T6">.</text:span><text:span text:style-name="T8">append</text:span><text:span text:style-name="T6">(</text:span><text:span text:style-name="T7">keys</text:span><text:span text:style-name="T6">[</text:span><text:span text:style-name="T7">index</text:span><text:span text:style-name="T6">], </text:span><text:span text:style-name="T7">file</text:span><text:span text:style-name="T6">)</text:span></text:p>
      <text:p text:style-name="P33">    <text:span text:style-name="T6">})</text:span></text:p>
      <text:p text:style-name="P40"/>
      <text:p text:style-name="P33">    <text:span text:style-name="T5">let</text:span><text:span text:style-name="T6"> </text:span><text:span text:style-name="T7">ajax</text:span><text:span text:style-name="T6"> = </text:span><text:span text:style-name="T5">new</text:span><text:span text:style-name="T6"> </text:span><text:span text:style-name="T16">XMLHttpRequest</text:span><text:span text:style-name="T6">();</text:span></text:p>
      <text:p text:style-name="P33">    <text:span text:style-name="T7">ajax</text:span><text:span text:style-name="T6">.</text:span><text:span text:style-name="T8">open</text:span><text:span text:style-name="T6">(</text:span><text:span text:style-name="T9">'POST'</text:span><text:span text:style-name="T6">, </text:span><text:span text:style-name="T7">url</text:span><text:span text:style-name="T6">)</text:span></text:p>
      <text:p text:style-name="P33">    <text:span text:style-name="T7">ajax</text:span><text:span text:style-name="T6">.</text:span><text:span text:style-name="T8">send</text:span><text:span text:style-name="T6">(</text:span><text:span text:style-name="T7">formData</text:span><text:span text:style-name="T6">)</text:span></text:p>
      <text:p text:style-name="P33">    <text:span text:style-name="T12">return</text:span><text:span text:style-name="T6"> </text:span><text:span text:style-name="T7">ajax</text:span></text:p>
      <text:p text:style-name="P34">}</text:p>
      <text:p text:style-name="P178"/>
      <text:p text:style-name="P178"/>
      <text:p text:style-name="P181"><text:span text:style-name="T3">function</text:span> <text:span text:style-name="T37">hide</text:span>(<text:span text:style-name="T38">element</text:span>) {<text:span text:style-name="T37">viewOrNode</text:span>(<text:span text:style-name="T38">element</text:span>).<text:span text:style-name="T38">style</text:span>.<text:span text:style-name="T38">display</text:span> = <text:span text:style-name="T46">'none'</text:span>}</text:p>
      <text:p text:style-name="P178"/>
      <text:p text:style-name="P188">Changes the display attribute of an HTML element to none, thus "hiding" the HTML element.</text:p>
      <text:p text:style-name="P189"/>
      <text:p text:style-name="P190"><text:span text:style-name="T3">function</text:span> <text:span text:style-name="T37">show</text:span>(<text:span text:style-name="T38">element</text:span>, <text:span text:style-name="T38">typeDisplay</text:span>) {</text:p>
      <text:p text:style-name="P190"><text:span text:style-name="T37"><text:s text:c="4"/>viewOrNode</text:span>(<text:span text:style-name="T38">element</text:span>).<text:span text:style-name="T38">style</text:span>.<text:span text:style-name="T38">display</text:span> = <text:span text:style-name="T38">typeDisplay</text:span> || <text:span text:style-name="T46">''</text:span></text:p>
      <text:p text:style-name="P190">}</text:p>
      <text:p text:style-name="P189"/>
      <text:p text:style-name="P188">Change the display of an HTML element to the specified Display type, or '' if the Display type is not specified.</text:p>
      <text:p text:style-name="P189"/>
      <text:p text:style-name="P190"><text:span text:style-name="T3">function</text:span> <text:span text:style-name="T37">redirect</text:span>(<text:span text:style-name="T38">namePage</text:span>, <text:span text:style-name="T38">extension</text:span> = <text:span text:style-name="T46">'html'</text:span>) {</text:p>
      <text:p text:style-name="P33">    <text:span text:style-name="T5">let</text:span><text:span text:style-name="T6"> </text:span><text:span text:style-name="T7">parts</text:span><text:span text:style-name="T6"> = </text:span><text:span text:style-name="T7">namePage</text:span><text:span text:style-name="T6">.</text:span><text:span text:style-name="T8">split</text:span><text:span text:style-name="T6">(</text:span><text:span text:style-name="T9">'.'</text:span><text:span text:style-name="T6">).</text:span><text:span text:style-name="T7">length</text:span><text:span text:style-name="T6">;</text:span></text:p>
      <text:p text:style-name="P33">    <text:span text:style-name="T12">if</text:span><text:span text:style-name="T6">(</text:span><text:span text:style-name="T7">parts</text:span><text:span text:style-name="T6"> == </text:span><text:span text:style-name="T13">1</text:span><text:span text:style-name="T6">) </text:span><text:span text:style-name="T7">namePage</text:span><text:span text:style-name="T6"> = </text:span><text:span text:style-name="T9">`</text:span><text:span text:style-name="T5">${</text:span><text:span text:style-name="T7">namePage</text:span><text:span text:style-name="T5">}</text:span><text:span text:style-name="T9">.</text:span><text:span text:style-name="T5">${</text:span><text:span text:style-name="T7">extension</text:span><text:span text:style-name="T5">}</text:span><text:span text:style-name="T9">`</text:span></text:p>
      <text:p text:style-name="P33">    <text:span text:style-name="T7">window</text:span><text:span text:style-name="T6">.</text:span><text:span text:style-name="T7">location</text:span><text:span text:style-name="T6"> = </text:span><text:span text:style-name="T7">namePage</text:span></text:p>
      <text:p text:style-name="P34">}</text:p>
      <text:p text:style-name="P189"/>
      <text:p text:style-name="P188">It redirects to a page with the specified extension.</text:p>
      <text:p text:style-name="P191"><text:span text:style-name="T23">namePage</text:span>: The page to which the redirection will be made.</text:p>
      <text:p text:style-name="P191"><text:span text:style-name="T23">extension</text:span>: The page extension, by default, is html.</text:p>
      <text:p text:style-name="P189"/>
      <text:p text:style-name="P190"><text:span text:style-name="T3">function</text:span> <text:span text:style-name="T37">removeChildren</text:span>(<text:span text:style-name="T38">node</text:span>){</text:p>
      <text:p text:style-name="P33">    <text:span text:style-name="T7">node</text:span><text:span text:style-name="T6"> = </text:span><text:span text:style-name="T8">viewOrNode</text:span><text:span text:style-name="T6">(</text:span><text:span text:style-name="T7">node</text:span><text:span text:style-name="T6">);</text:span></text:p>
      <text:p text:style-name="P33">    <text:span text:style-name="T6">[... </text:span><text:span text:style-name="T7">node</text:span><text:span text:style-name="T6">.</text:span><text:span text:style-name="T7">children</text:span><text:span text:style-name="T6">].</text:span><text:span text:style-name="T8">forEach</text:span><text:span text:style-name="T6">(</text:span><text:span text:style-name="T7">e</text:span><text:span text:style-name="T6"> </text:span><text:span text:style-name="T5">=&gt;</text:span><text:span text:style-name="T6"> </text:span><text:span text:style-name="T7">node</text:span><text:span text:style-name="T6">.</text:span><text:span text:style-name="T8">removeChild</text:span><text:span text:style-name="T6">(</text:span><text:span text:style-name="T7">e</text:span><text:span text:style-name="T6">))</text:span></text:p>
      <text:p text:style-name="P34">}</text:p>
      <text:p text:style-name="P189"/>
      <text:p text:style-name="P192">Remove the child elements of an HTML element.</text:p>
      <text:p text:style-name="P193"><text:span text:style-name="T23">node</text:span>: The HTML element that will have its child nodes removed.</text:p>
      <text:p text:style-name="P194"/>
      <text:p text:style-name="P195"><text:span text:style-name="T3">function</text:span> <text:span text:style-name="T37">viewOrNode</text:span>(<text:span text:style-name="T38">node</text:span>){<text:span text:style-name="T39">return</text:span> <text:span text:style-name="T38">node?<text:tab/></text:span>.<text:span text:style-name="T38">$view</text:span> || <text:span text:style-name="T38">node</text:span>}</text:p>
      <text:p text:style-name="P194"/>
      <text:p text:style-name="P192">Returns the HTML element corresponding to $view, or the node itself must be an HTML element.</text:p>
      <text:p text:style-name="P194"/>
      <text:p text:style-name="P195"><text:span text:style-name="T3">function</text:span> <text:span text:style-name="T37">setPlaceHolder</text:span>(<text:span text:style-name="T38">element</text:span>, <text:span text:style-name="T38">text</text:span>) {<text:span text:style-name="T38">element</text:span>.<text:span text:style-name="T38">placeholder</text:span> = <text:span text:style-name="T38">text</text:span>}</text:p>
      <text:p text:style-name="P196">Assigns a placeholder to an element of type input.</text:p>
      <text:p text:style-name="P197"><text:span text:style-name="T23">element</text:span>: The HTML element of type input.</text:p>
      <text:p text:style-name="P197"><text:span text:style-name="T23">text</text:span>: the text of the placeholder.</text:p>
      <text:p text:style-name="P198"/>
      <text:p text:style-name="P199"><text:span text:style-name="T3">function</text:span> <text:span text:style-name="T37">setValue</text:span>(<text:span text:style-name="T38">element</text:span>, <text:span text:style-name="T38">eValue</text:span>) {<text:span text:style-name="T38">element</text:span>.<text:span text:style-name="T38">value</text:span> = <text:span text:style-name="T38">eValue</text:span>}</text:p>
      <text:p text:style-name="P196"><text:soft-page-break/>Assigns a value to an HTML element of type input.</text:p>
      <text:p text:style-name="P197"><text:span text:style-name="T23">element</text:span>: The HTML element of type input.</text:p>
      <text:p text:style-name="P197"><text:span text:style-name="T23">eValue</text:span>: the value to be assigned.</text:p>
      <text:p text:style-name="P198"/>
      <text:p text:style-name="P199"><text:span text:style-name="T3">function</text:span> <text:span text:style-name="T37">clickShow</text:span>(<text:span text:style-name="T38">elementClick</text:span>, <text:span text:style-name="T38">elementTarget</text:span>, <text:span text:style-name="T38">typeDisplay</text:span>, <text:span text:style-name="T38">doFocus</text:span>) {</text:p>
      <text:p text:style-name="P33">    <text:span text:style-name="T5">let</text:span><text:span text:style-name="T6"> </text:span><text:span text:style-name="T7">e</text:span><text:span text:style-name="T6"> = </text:span><text:span text:style-name="T8">viewOrNode</text:span><text:span text:style-name="T6">(</text:span><text:span text:style-name="T7">elementTarget</text:span><text:span text:style-name="T6">);</text:span></text:p>
      <text:p text:style-name="P33">    <text:span text:style-name="T8">hide</text:span><text:span text:style-name="T6">(</text:span><text:span text:style-name="T7">e</text:span><text:span text:style-name="T6">)</text:span></text:p>
      <text:p text:style-name="P33">    <text:span text:style-name="T7">e</text:span><text:span text:style-name="T6">.</text:span><text:span text:style-name="T8">tagIsVisible</text:span><text:span text:style-name="T6"> = () </text:span><text:span text:style-name="T5">=&gt;</text:span><text:span text:style-name="T6"> !</text:span><text:span text:style-name="T7">e</text:span><text:span text:style-name="T6">.</text:span><text:span text:style-name="T7">tagVisible</text:span></text:p>
      <text:p text:style-name="P40"/>
      <text:p text:style-name="P33">    <text:span text:style-name="T7">e</text:span><text:span text:style-name="T6">.</text:span><text:span text:style-name="T8">tagToogle</text:span><text:span text:style-name="T6"> = () </text:span><text:span text:style-name="T5">=&gt;</text:span><text:span text:style-name="T6"> {</text:span></text:p>
      <text:p text:style-name="P33">        <text:span text:style-name="T7">e</text:span><text:span text:style-name="T6">.</text:span><text:span text:style-name="T7">tagVisible</text:span><text:span text:style-name="T6"> ? </text:span><text:span text:style-name="T8">hide</text:span><text:span text:style-name="T6">(</text:span><text:span text:style-name="T7">e</text:span><text:span text:style-name="T6">) : </text:span><text:span text:style-name="T8">show</text:span><text:span text:style-name="T6">(</text:span><text:span text:style-name="T7">e</text:span><text:span text:style-name="T6">, </text:span><text:span text:style-name="T7">typeDisplay</text:span><text:span text:style-name="T6">)</text:span></text:p>
      <text:p text:style-name="P33">        <text:span text:style-name="T7">e</text:span><text:span text:style-name="T6">.</text:span><text:span text:style-name="T7">tagVisible</text:span><text:span text:style-name="T6"> = !</text:span><text:span text:style-name="T7">e</text:span><text:span text:style-name="T6">.</text:span><text:span text:style-name="T7">tagVisible</text:span></text:p>
      <text:p text:style-name="P33">        <text:span text:style-name="T7">doFocus</text:span><text:span text:style-name="T6"> &amp;&amp; </text:span><text:span text:style-name="T7">e</text:span><text:span text:style-name="T6">.</text:span><text:span text:style-name="T7">tagVisible</text:span><text:span text:style-name="T6"> &amp;&amp; </text:span><text:span text:style-name="T7">e</text:span><text:span text:style-name="T6">.</text:span><text:span text:style-name="T8">focus</text:span><text:span text:style-name="T6">()</text:span></text:p>
      <text:p text:style-name="P33">    <text:span text:style-name="T6">}</text:span></text:p>
      <text:p text:style-name="P33">    <text:span text:style-name="T8">viewOrNode</text:span><text:span text:style-name="T6">(</text:span><text:span text:style-name="T7">elementClick</text:span><text:span text:style-name="T6">).</text:span><text:span text:style-name="T8">addEventListener</text:span><text:span text:style-name="T6">(</text:span><text:span text:style-name="T9">'click'</text:span><text:span text:style-name="T6">, </text:span><text:span text:style-name="T7">e</text:span><text:span text:style-name="T6">.</text:span><text:span text:style-name="T7">tagToogle</text:span><text:span text:style-name="T6">)</text:span></text:p>
      <text:p text:style-name="P34">}</text:p>
      <text:p text:style-name="P198"/>
      <text:p text:style-name="P196">Clicking on one element displays or hides another element.</text:p>
      <text:p text:style-name="P197"><text:span text:style-name="T23">elementClick</text:span>: The element to be clicked.</text:p>
      <text:p text:style-name="P197"><text:span text:style-name="T23">elementTarget</text:span>: The element to be displayed or not.</text:p>
      <text:p text:style-name="P197"><text:span text:style-name="T23">typeDisplay</text:span>: The type of display to be applied to the Target element.</text:p>
      <text:p text:style-name="P197"><text:span text:style-name="T23">doFocus</text:span>: Optional. If true, elementTarget requests focus(); by default it is false.</text:p>
      <text:p text:style-name="P198"/>
      <text:p text:style-name="P199"><text:span text:style-name="T3">function</text:span> <text:span text:style-name="T37">closeConcurrentElement</text:span>(<text:span text:style-name="T38">controller</text:span>, <text:span text:style-name="T38">nodeNameToStore</text:span>, <text:span text:style-name="T38">currentElement</text:span>) {</text:p>
      <text:p text:style-name="P33">    </text:p>
      <text:p text:style-name="P33">    <text:span text:style-name="T5">let</text:span><text:span text:style-name="T6"> </text:span><text:span text:style-name="T7">eTarget</text:span><text:span text:style-name="T6"> = </text:span><text:span text:style-name="T7">controller</text:span><text:span text:style-name="T6">[</text:span><text:span text:style-name="T7">nodeNameToStore</text:span><text:span text:style-name="T6">];</text:span></text:p>
      <text:p text:style-name="P33">    <text:span text:style-name="T12">if</text:span><text:span text:style-name="T6">(</text:span><text:span text:style-name="T7">eTarget</text:span><text:span text:style-name="T6">) </text:span><text:span text:style-name="T7">eTarget</text:span><text:span text:style-name="T6"> = </text:span><text:span text:style-name="T8">viewOrNode</text:span><text:span text:style-name="T6">(</text:span><text:span text:style-name="T7">eTarget</text:span><text:span text:style-name="T6">);</text:span></text:p>
      <text:p text:style-name="P33">    <text:span text:style-name="T7">currentElement</text:span><text:span text:style-name="T6"> = </text:span><text:span text:style-name="T8">viewOrNode</text:span><text:span text:style-name="T6">(</text:span><text:span text:style-name="T7">currentElement</text:span><text:span text:style-name="T6">)</text:span></text:p>
      <text:p text:style-name="P33">    <text:span text:style-name="T12">if</text:span><text:span text:style-name="T6"> (</text:span><text:span text:style-name="T7">eTarget</text:span><text:span text:style-name="T6"> &amp;&amp; </text:span><text:span text:style-name="T7">eTarget</text:span><text:span text:style-name="T6"> !== </text:span><text:span text:style-name="T7">currentElement</text:span><text:span text:style-name="T6"> &amp;&amp; !</text:span><text:span text:style-name="T7">eTarget</text:span><text:span text:style-name="T6">.</text:span><text:span text:style-name="T8">tagIsVisible</text:span><text:span text:style-name="T6">()) </text:span><text:span text:style-name="T7">eTarget</text:span><text:span text:style-name="T6">.</text:span><text:span text:style-name="T8">tagToogle</text:span><text:span text:style-name="T6">()</text:span></text:p>
      <text:p text:style-name="P33">    <text:span text:style-name="T7">controller</text:span><text:span text:style-name="T6">[</text:span><text:span text:style-name="T7">nodeNameToStore</text:span><text:span text:style-name="T6">] = </text:span><text:span text:style-name="T7">currentElement</text:span></text:p>
      <text:p text:style-name="P34">}</text:p>
      <text:p text:style-name="P198"/>
      <text:p text:style-name="P196">This method is used in conjunction with clickShow. Basically, it closes all competing display elements that are open; that is, when one element is displayed, the other open element must be closed.</text:p>
      <text:p text:style-name="P198"/>
      <text:p text:style-name="P200"><text:span text:style-name="T3">function</text:span> <text:span text:style-name="T37">manageEClasses</text:span>(<text:span text:style-name="T38">element</text:span>, <text:span text:style-name="T38">action</text:span>, ... <text:span text:style-name="T38">classes</text:span>) {</text:p>
      <text:p text:style-name="P33">    <text:span text:style-name="T7">element</text:span><text:span text:style-name="T6"> = </text:span><text:span text:style-name="T8">viewOrNode</text:span><text:span text:style-name="T6">(</text:span><text:span text:style-name="T7">element</text:span><text:span text:style-name="T6">)</text:span></text:p>
      <text:p text:style-name="P33">    <text:span text:style-name="T7">element</text:span><text:span text:style-name="T6"> &amp;&amp; </text:span><text:span text:style-name="T7">element</text:span><text:span text:style-name="T6">.</text:span><text:span text:style-name="T7">classList</text:span><text:span text:style-name="T6">[</text:span><text:span text:style-name="T7">action</text:span><text:span text:style-name="T6">](... </text:span><text:span text:style-name="T8">arrayInSpread</text:span><text:span text:style-name="T6">(</text:span><text:span text:style-name="T7">classes</text:span><text:span text:style-name="T6">))</text:span></text:p>
      <text:p text:style-name="P33">    <text:span text:style-name="T12">return</text:span><text:span text:style-name="T6"> </text:span><text:span text:style-name="T7">element</text:span></text:p>
      <text:p text:style-name="P34">}</text:p>
      <text:p text:style-name="P201"/>
      <text:p text:style-name="P202">Manage element classes.</text:p>
      <text:p text:style-name="P203">This is a "configuration" method of the TAG library and should not be used.</text:p>
      <text:p text:style-name="P204"/>
      <text:p text:style-name="P205"><text:span text:style-name="T3">function</text:span> <text:span text:style-name="T37">addClasses</text:span>(<text:span text:style-name="T38">element</text:span>, <text:span text:style-name="T38">classes</text:span>) {</text:p>
      <text:p text:style-name="P205"><text:span text:style-name="T39"><text:s text:c="4"/>return</text:span> <text:span text:style-name="T37">manageEClasses</text:span>(<text:span text:style-name="T38">element</text:span>, <text:span text:style-name="T46">'add'</text:span>, <text:span text:style-name="T38">classes</text:span>)</text:p>
      <text:p text:style-name="P205">}</text:p>
      <text:p text:style-name="P204"/>
      <text:p text:style-name="P206">Adds classes to an HTML element.</text:p>
      <text:p text:style-name="P207"><text:span text:style-name="T23">element</text:span>: The element to which the classes will be added.</text:p>
      <text:p text:style-name="P206"><text:soft-page-break/><text:span text:style-name="T23">classes</text:span>: the classes you want to add.</text:p>
      <text:p text:style-name="P204"/>
      <text:p text:style-name="P205"><text:span text:style-name="T3">function</text:span> <text:span text:style-name="T37">removeClasses</text:span>(<text:span text:style-name="T38">element</text:span>, <text:span text:style-name="T38">classes</text:span>) {</text:p>
      <text:p text:style-name="P205"><text:span text:style-name="T39"><text:s text:c="4"/>return</text:span> <text:span text:style-name="T37">manageEClasses</text:span>(<text:span text:style-name="T38">element</text:span>, <text:span text:style-name="T46">'remove'</text:span>, <text:span text:style-name="T38">classes</text:span>)</text:p>
      <text:p text:style-name="P205">}</text:p>
      <text:p text:style-name="P204"/>
      <text:p text:style-name="P206">Remove classes from an HTML element.</text:p>
      <text:p text:style-name="P207"><text:span text:style-name="T23">element</text:span>: The element from which the classes will be removed.</text:p>
      <text:p text:style-name="P207"><text:span text:style-name="T23">classes</text:span>: the classes to be removed.</text:p>
      <text:p text:style-name="P204"/>
      <text:p text:style-name="P205"><text:span text:style-name="T3">function</text:span> <text:span text:style-name="T37">labelFor</text:span>(<text:span text:style-name="T38">label</text:span>, <text:span text:style-name="T38">elementTarget</text:span>) {</text:p>
      <text:p text:style-name="P205"><text:span text:style-name="T38"><text:s text:c="4"/>label</text:span>.<text:span text:style-name="T37">addEventListener</text:span>(<text:span text:style-name="T46">'click'</text:span>, <text:span text:style-name="T38">_</text:span> <text:span text:style-name="T3">=&gt;</text:span> <text:span text:style-name="T38">elementTarget</text:span>.<text:span text:style-name="T37">focus</text:span>())</text:p>
      <text:p text:style-name="P205">}</text:p>
      <text:p text:style-name="P204"/>
      <text:p text:style-name="P206">When one HTML element is clicked, another element receives focus.</text:p>
      <text:p text:style-name="P207"><text:span text:style-name="T23">label</text:span>: The HTML element to be clicked.</text:p>
      <text:p text:style-name="P207"><text:span text:style-name="T23">elementTarget</text:span>: the element to be focused on.</text:p>
      <text:p text:style-name="P204"/>
      <text:p text:style-name="P205"><text:span text:style-name="T3">function</text:span> <text:span text:style-name="T37">keysOf</text:span>(<text:span text:style-name="T38">obj</text:span>) {<text:span text:style-name="T39">return</text:span> <text:span text:style-name="T4">Object</text:span>.<text:span text:style-name="T37">keys</text:span>(<text:span text:style-name="T38">obj</text:span>)}</text:p>
      <text:p text:style-name="P208">Returns the keys of an object.</text:p>
      <text:p text:style-name="P209"><text:span text:style-name="T23">obj</text:span>: the object from which we will return the keys.</text:p>
      <text:p text:style-name="P210"/>
      <text:p text:style-name="P211"><text:span text:style-name="T3">function</text:span> <text:span text:style-name="T37">valuesOf</text:span>(<text:span text:style-name="T38">obj</text:span>) {<text:span text:style-name="T39">return</text:span> <text:span text:style-name="T4">Object</text:span>.<text:span text:style-name="T37">values</text:span>(<text:span text:style-name="T38">obj</text:span>)}</text:p>
      <text:p text:style-name="P208">Returns the values ​​of an object.</text:p>
      <text:p text:style-name="P209"><text:span text:style-name="T23">obj</text:span>: the object from which we will return the values.</text:p>
      <text:p text:style-name="P210"/>
      <text:p text:style-name="P211"><text:span text:style-name="T3">function</text:span> <text:span text:style-name="T37">docSelect</text:span>(){<text:span text:style-name="T39">return</text:span> <text:span text:style-name="T38">document</text:span>.<text:span text:style-name="T37">getSelection</text:span>()}</text:p>
      <text:p text:style-name="P208">Returns the selected document.</text:p>
      <text:p text:style-name="P198"/>
      <text:p text:style-name="P212"><text:span text:style-name="T3">function</text:span> <text:span text:style-name="T37">selector</text:span>(<text:span text:style-name="T38">query</text:span>, <text:span text:style-name="T38">element</text:span>) {</text:p>
      <text:p text:style-name="P212"><text:span text:style-name="T39"><text:s text:c="4"/>return</text:span> (<text:span text:style-name="T37">viewOrNode</text:span>(<text:span text:style-name="T38">element</text:span>) || <text:span text:style-name="T38">document</text:span>).<text:span text:style-name="T37">querySelector</text:span>(<text:span text:style-name="T38">query</text:span>)</text:p>
      <text:p text:style-name="P212">}</text:p>
      <text:p text:style-name="P198"/>
      <text:p text:style-name="P213">Select the first HTML element that satisfies the given query.</text:p>
      <text:p text:style-name="P214"><text:span text:style-name="T23">query</text:span>: Input containing the desired options.</text:p>
      <text:p text:style-name="P214"><text:span text:style-name="T23">element</text:span>: Optional. If specified, the query will be performed on the specified HTML element, or on the HTML element corresponding to $view. If not specified, the search will be performed on the document.</text:p>
      <text:p text:style-name="P215"/>
      <text:p text:style-name="P216"><text:span text:style-name="T3">function</text:span> <text:span text:style-name="T37">selectorAll</text:span>(<text:span text:style-name="T38">query</text:span>, <text:span text:style-name="T38">element</text:span>) {</text:p>
      <text:p text:style-name="P216"><text:span text:style-name="T39"><text:s text:c="4"/>return</text:span> (<text:span text:style-name="T37">viewOrNode</text:span>(<text:span text:style-name="T38">element</text:span>) || <text:span text:style-name="T38">document</text:span>).<text:span text:style-name="T37">querySelectorAll</text:span>(<text:span text:style-name="T38">query</text:span>)</text:p>
      <text:p text:style-name="P216">}</text:p>
      <text:p text:style-name="P215"/>
      <text:p text:style-name="P213">Select all HTML elements that satisfy the given query.</text:p>
      <text:p text:style-name="P214"><text:span text:style-name="T23">query</text:span>: Input containing the desired options.</text:p>
      <text:p text:style-name="P214"><text:span text:style-name="T23">element</text:span>: Optional. If specified, the query will be performed on the specified HTML element, or on the HTML element corresponding to $view. If not specified, the search will be performed on the document.</text:p>
      <text:p text:style-name="P215"/>
      <text:p text:style-name="P216"><text:span text:style-name="T3">function</text:span> <text:span text:style-name="T37">readImgAsDataURL</text:span>(<text:span text:style-name="T38">imgFile</text:span>, <text:span text:style-name="T38">onload</text:span>) {</text:p>
      <text:p text:style-name="P33">    <text:span text:style-name="T5">let</text:span><text:span text:style-name="T6"> </text:span><text:span text:style-name="T7">reader</text:span><text:span text:style-name="T6"> = </text:span><text:span text:style-name="T5">new</text:span><text:span text:style-name="T6"> </text:span><text:span text:style-name="T16">FileReader</text:span><text:span text:style-name="T6">();</text:span></text:p>
      <text:p text:style-name="P33">    <text:span text:style-name="T7">reader</text:span><text:span text:style-name="T6">.</text:span><text:span text:style-name="T8">onload</text:span><text:span text:style-name="T6"> = </text:span><text:span text:style-name="T7">onload</text:span></text:p>
      <text:p text:style-name="P33"><text:soft-page-break/>    <text:span text:style-name="T7">reader</text:span><text:span text:style-name="T6">.</text:span><text:span text:style-name="T8">readAsDataURL</text:span><text:span text:style-name="T6">(</text:span><text:span text:style-name="T7">imgFile</text:span><text:span text:style-name="T6">)</text:span></text:p>
      <text:p text:style-name="P34">}</text:p>
      <text:p text:style-name="P213"/>
      <text:p text:style-name="P214">Reads an image as a data URL.</text:p>
      <text:p text:style-name="P214"><text:span text:style-name="T23">imgFile</text:span>: image file to be read.</text:p>
      <text:p text:style-name="P214"><text:span text:style-name="T23">onLoad</text:span>: The function to be applied when the image is loaded.</text:p>
      <text:p text:style-name="P215"/>
      <text:p text:style-name="P216"><text:span text:style-name="T3">function</text:span> <text:span text:style-name="T37">imgPreview</text:span>(<text:span text:style-name="T38">inputFileImage</text:span>, <text:span text:style-name="T38">imgPrev</text:span>, <text:span text:style-name="T38">hideImgPreview</text:span>, <text:span text:style-name="T38">typeDisplay</text:span> = <text:span text:style-name="T46">''</text:span>) {</text:p>
      <text:p text:style-name="P33">    <text:span text:style-name="T7">inputFileImage</text:span><text:span text:style-name="T6">.</text:span><text:span text:style-name="T8">onchange</text:span><text:span text:style-name="T6"> = () </text:span><text:span text:style-name="T5">=&gt;</text:span><text:span text:style-name="T6"> {</text:span></text:p>
      <text:p text:style-name="P33">        <text:span text:style-name="T5">let</text:span><text:span text:style-name="T6"> </text:span><text:span text:style-name="T7">img</text:span><text:span text:style-name="T6"> = </text:span><text:span text:style-name="T7">inputFileImage</text:span><text:span text:style-name="T6">.</text:span><text:span text:style-name="T7">files</text:span><text:span text:style-name="T6">[</text:span><text:span text:style-name="T13">0</text:span><text:span text:style-name="T6">];</text:span></text:p>
      <text:p text:style-name="P33">        <text:span text:style-name="T7">hideImgPreview</text:span><text:span text:style-name="T6"> &amp;&amp; </text:span><text:span text:style-name="T8">hide</text:span><text:span text:style-name="T6">(</text:span><text:span text:style-name="T7">imgPrev</text:span><text:span text:style-name="T6">)</text:span></text:p>
      <text:p text:style-name="P33">        <text:span text:style-name="T7">img</text:span><text:span text:style-name="T6"> &amp;&amp; </text:span><text:span text:style-name="T8">readImgAsDataURL</text:span><text:span text:style-name="T6">(</text:span><text:span text:style-name="T7">img</text:span><text:span text:style-name="T6">, </text:span><text:span text:style-name="T7">e</text:span><text:span text:style-name="T6"> </text:span><text:span text:style-name="T5">=&gt;</text:span><text:span text:style-name="T6"> {</text:span></text:p>
      <text:p text:style-name="P33">            <text:span text:style-name="T7">imgPrev</text:span><text:span text:style-name="T6">.</text:span><text:span text:style-name="T7">src</text:span><text:span text:style-name="T6"> = </text:span><text:span text:style-name="T7">e</text:span><text:span text:style-name="T6">.</text:span><text:span text:style-name="T7">target</text:span><text:span text:style-name="T6">.</text:span><text:span text:style-name="T7">result</text:span></text:p>
      <text:p text:style-name="P33">            <text:span text:style-name="T8">show</text:span><text:span text:style-name="T6">(</text:span><text:span text:style-name="T7">imgPrev</text:span><text:span text:style-name="T6">, </text:span><text:span text:style-name="T7">typeDisplay</text:span><text:span text:style-name="T6">)</text:span></text:p>
      <text:p text:style-name="P33">        <text:span text:style-name="T6">})</text:span></text:p>
      <text:p text:style-name="P33">    <text:span text:style-name="T6">}</text:span></text:p>
      <text:p text:style-name="P34">}</text:p>
      <text:p text:style-name="P217"/>
      <text:p text:style-name="P218">Generates a preview of the image to be loaded.</text:p>
      <text:p text:style-name="P219"><text:span text:style-name="T23">inputFileImage</text:span>: Input of type file image.</text:p>
      <text:p text:style-name="P219"><text:span text:style-name="T23">imgPreview</text:span>: HTML element of type img.</text:p>
      <text:p text:style-name="P219"><text:span text:style-name="T23">hideImgPreview</text:span>: If true, hides the imgPreview HTML element before loading.</text:p>
      <text:p text:style-name="P219"><text:span text:style-name="T23">typeDisplay</text:span>: The type of display to be applied to the imgPreview element.</text:p>
      <text:p text:style-name="P220"/>
      <text:p text:style-name="P221"><text:span text:style-name="T3">function</text:span> <text:span text:style-name="T37">adjustTextAreas</text:span>(...<text:span text:style-name="T38">textareas</text:span>){</text:p>
      <text:p text:style-name="P33">    <text:span text:style-name="T8">arrayInSpread</text:span><text:span text:style-name="T6">(</text:span><text:span text:style-name="T7">textareas</text:span><text:span text:style-name="T6">).</text:span><text:span text:style-name="T8">forEach</text:span><text:span text:style-name="T6">(</text:span><text:span text:style-name="T7">$input</text:span><text:span text:style-name="T6"> </text:span><text:span text:style-name="T5">=&gt;</text:span><text:span text:style-name="T6"> {</text:span></text:p>
      <text:p text:style-name="P33">        <text:span text:style-name="T7">$input</text:span><text:span text:style-name="T6">.</text:span><text:span text:style-name="T7">rows</text:span><text:span text:style-name="T6"> = </text:span><text:span text:style-name="T13">2</text:span><text:span text:style-name="T6">;</text:span></text:p>
      <text:p text:style-name="P33">        <text:span text:style-name="T12">while</text:span><text:span text:style-name="T6">(</text:span><text:span text:style-name="T7">$input</text:span><text:span text:style-name="T6">.</text:span><text:span text:style-name="T7">scrollHeight</text:span><text:span text:style-name="T6"> &gt; </text:span><text:span text:style-name="T7">$input</text:span><text:span text:style-name="T6">.</text:span><text:span text:style-name="T7">offsetHeight</text:span><text:span text:style-name="T6">) {</text:span></text:p>
      <text:p text:style-name="P33">            <text:span text:style-name="T7">$input</text:span><text:span text:style-name="T6">.</text:span><text:span text:style-name="T7">rows</text:span><text:span text:style-name="T6"> += </text:span><text:span text:style-name="T13">1</text:span><text:span text:style-name="T6">;</text:span></text:p>
      <text:p text:style-name="P33">        <text:span text:style-name="T6">}</text:span></text:p>
      <text:p text:style-name="P33">    <text:span text:style-name="T6">})</text:span></text:p>
      <text:p text:style-name="P34">}</text:p>
      <text:p text:style-name="P220"/>
      <text:p text:style-name="P220"/>
      <text:p text:style-name="P220"/>
      <text:p text:style-name="P221"><text:span text:style-name="T3">function</text:span> <text:span text:style-name="T37">nextBoolean</text:span>() {<text:span text:style-name="T39">return</text:span> <text:span text:style-name="T38">Math</text:span>.<text:span text:style-name="T37">random</text:span>() &lt; <text:span text:style-name="T43">.5</text:span>}</text:p>
      <text:p text:style-name="P218">Returns a random boolean.</text:p>
      <text:p text:style-name="P220"/>
      <text:p text:style-name="P221"><text:span text:style-name="T3">function</text:span> <text:span text:style-name="T37">setTextAndValueToOption</text:span>(<text:span text:style-name="T38">option</text:span>, <text:span text:style-name="T38">text</text:span>, <text:span text:style-name="T38">value</text:span>) {</text:p>
      <text:p text:style-name="P33">    <text:span text:style-name="T7">option</text:span><text:span text:style-name="T6">.</text:span><text:span text:style-name="T7">textContent</text:span><text:span text:style-name="T6"> = </text:span><text:span text:style-name="T7">text</text:span></text:p>
      <text:p text:style-name="P33">    <text:span text:style-name="T7">option</text:span><text:span text:style-name="T6">.</text:span><text:span text:style-name="T7">value</text:span><text:span text:style-name="T6"> = </text:span><text:span text:style-name="T7">value</text:span><text:span text:style-name="T6"> ?? </text:span><text:span text:style-name="T5">null</text:span></text:p>
      <text:p text:style-name="P34">}</text:p>
      <text:p text:style-name="P220"/>
      <text:p text:style-name="P218">Adds text and a value to an option input field.</text:p>
      <text:p text:style-name="P219"><text:span text:style-name="T23">option</text:span>: The input is of type option.</text:p>
      <text:p text:style-name="P219"><text:span text:style-name="T23">text</text:span>: the text to be displayed.</text:p>
      <text:p text:style-name="P219"><text:span text:style-name="T23">value</text:span>: the amount to be loaded.</text:p>
      <text:p text:style-name="P220"/>
      <text:p text:style-name="P221"><text:span text:style-name="T3">function</text:span> <text:span text:style-name="T37">reload</text:span>(<text:span text:style-name="T38">consultServer</text:span>) {<text:span text:style-name="T38">window</text:span>.<text:span text:style-name="T38">location</text:span>.<text:span text:style-name="T37">reload</text:span>(<text:span text:style-name="T38">consultServer</text:span>)}</text:p>
      <text:p text:style-name="P218">Reload the page.</text:p>
      <text:p text:style-name="P219"><text:span text:style-name="T23">consultServer</text:span>: Consult the server for page loading purposes.</text:p>
      <text:p text:style-name="P222"><text:soft-page-break/>=======================================================================</text:p>
      <text:p text:style-name="P222">=======================================================================</text:p>
      <text:p text:style-name="P220"/>
      <text:p text:style-name="P221"><text:span text:style-name="T3">function</text:span> <text:span text:style-name="T37">toast</text:span>(<text:span text:style-name="T38">message</text:span>, <text:span text:style-name="T38">toastDuration</text:span> = <text:span text:style-name="T43">7</text:span>, <text:span text:style-name="T38">elementFocus</text:span>, <text:span text:style-name="T38">cssToast</text:span>) {</text:p>
      <text:p text:style-name="P33">    <text:span text:style-name="T5">let</text:span><text:span text:style-name="T6"> </text:span><text:span text:style-name="T7">bd</text:span><text:span text:style-name="T6"> = </text:span><text:span text:style-name="T8">body</text:span><text:span text:style-name="T6">();</text:span></text:p>
      <text:p text:style-name="P33">    <text:span text:style-name="T12">if</text:span><text:span text:style-name="T6"> (</text:span><text:span text:style-name="T7">bd</text:span><text:span text:style-name="T6">.</text:span><text:span text:style-name="T7">toast</text:span><text:span text:style-name="T6">) {</text:span></text:p>
      <text:p text:style-name="P33">        <text:span text:style-name="T8">removeElements</text:span><text:span text:style-name="T6">(</text:span><text:span text:style-name="T7">bd</text:span><text:span text:style-name="T6">, </text:span><text:span text:style-name="T7">bd</text:span><text:span text:style-name="T6">.</text:span><text:span text:style-name="T7">toast</text:span><text:span text:style-name="T6">)</text:span></text:p>
      <text:p text:style-name="P33">        <text:span text:style-name="T8">clearTimeout</text:span><text:span text:style-name="T6">(</text:span><text:span text:style-name="T7">bd</text:span><text:span text:style-name="T6">.</text:span><text:span text:style-name="T7">timeout</text:span><text:span text:style-name="T6">)</text:span></text:p>
      <text:p text:style-name="P33">        <text:span text:style-name="T7">bd</text:span><text:span text:style-name="T6">.</text:span><text:span text:style-name="T7">toast</text:span><text:span text:style-name="T6"> = </text:span><text:span text:style-name="T5">null</text:span></text:p>
      <text:p text:style-name="P33">    <text:span text:style-name="T6">}</text:span></text:p>
      <text:p text:style-name="P33">    <text:span text:style-name="T5">let</text:span><text:span text:style-name="T6"> </text:span><text:span text:style-name="T7">e</text:span><text:span text:style-name="T6"> = </text:span><text:span text:style-name="T11">E</text:span><text:span text:style-name="T6">.</text:span><text:span text:style-name="T8">p</text:span><text:span text:style-name="T6">();</text:span></text:p>
      <text:p text:style-name="P33">    <text:span text:style-name="T8">setTextNode</text:span><text:span text:style-name="T6">(</text:span><text:span text:style-name="T7">e</text:span><text:span text:style-name="T6">, </text:span><text:span text:style-name="T7">message</text:span><text:span text:style-name="T6">)</text:span></text:p>
      <text:p text:style-name="P33">    <text:span text:style-name="T7">bd</text:span><text:span text:style-name="T6">.</text:span><text:span text:style-name="T7">toast</text:span><text:span text:style-name="T6"> = </text:span><text:span text:style-name="T7">e</text:span></text:p>
      <text:p text:style-name="P33">    <text:span text:style-name="T8">addClasses</text:span><text:span text:style-name="T6">(</text:span><text:span text:style-name="T7">e</text:span><text:span text:style-name="T6">, [</text:span><text:span text:style-name="T9">"cssToast"</text:span><text:span text:style-name="T6">,</text:span><text:span text:style-name="T9">"toastfadeIn"</text:span><text:span text:style-name="T6">, </text:span><text:span text:style-name="T7">cssToast</text:span><text:span text:style-name="T6">])</text:span></text:p>
      <text:p text:style-name="P33">    <text:span text:style-name="T8">appendTo</text:span><text:span text:style-name="T6">(</text:span><text:span text:style-name="T7">bd</text:span><text:span text:style-name="T6">, </text:span><text:span text:style-name="T7">bd</text:span><text:span text:style-name="T6">.</text:span><text:span text:style-name="T7">toast</text:span><text:span text:style-name="T6">)</text:span></text:p>
      <text:p text:style-name="P33">    <text:span text:style-name="T7">elementFocus</text:span><text:span text:style-name="T6"> &amp;&amp; </text:span><text:span text:style-name="T7">elementFocus</text:span><text:span text:style-name="T6">.</text:span><text:span text:style-name="T8">focus</text:span><text:span text:style-name="T6">()</text:span></text:p>
      <text:p text:style-name="P40"/>
      <text:p text:style-name="P33">    <text:span text:style-name="T7">bd</text:span><text:span text:style-name="T6">.</text:span><text:span text:style-name="T7">timeout</text:span><text:span text:style-name="T6"> = </text:span><text:span text:style-name="T8">setTimeout</text:span><text:span text:style-name="T6">(() </text:span><text:span text:style-name="T5">=&gt;</text:span><text:span text:style-name="T6"> {</text:span></text:p>
      <text:p text:style-name="P33">        <text:span text:style-name="T8">addClasses</text:span><text:span text:style-name="T6">(</text:span><text:span text:style-name="T7">bd</text:span><text:span text:style-name="T6">.</text:span><text:span text:style-name="T7">toast</text:span><text:span text:style-name="T6">, </text:span><text:span text:style-name="T9">"toastfadeOut"</text:span><text:span text:style-name="T6">)</text:span></text:p>
      <text:p text:style-name="P33">        <text:span text:style-name="T8">removeElements</text:span><text:span text:style-name="T6">(</text:span><text:span text:style-name="T7">bd</text:span><text:span text:style-name="T6">, </text:span><text:span text:style-name="T7">bd</text:span><text:span text:style-name="T6">.</text:span><text:span text:style-name="T7">toast</text:span><text:span text:style-name="T6">)</text:span></text:p>
      <text:p text:style-name="P33">        <text:span text:style-name="T7">bd</text:span><text:span text:style-name="T6">.</text:span><text:span text:style-name="T7">toast</text:span><text:span text:style-name="T6"> = </text:span><text:span text:style-name="T5">null</text:span></text:p>
      <text:p text:style-name="P33">    <text:span text:style-name="T6">}, </text:span><text:span text:style-name="T7">toastDuration</text:span><text:span text:style-name="T6"> * </text:span><text:span text:style-name="T13">1000</text:span><text:span text:style-name="T6">)</text:span></text:p>
      <text:p text:style-name="P34">}</text:p>
      <text:p text:style-name="P220"/>
      <text:p text:style-name="P223">You need to specify the CSS style.</text:p>
      <text:p text:style-name="P224">Displays a message in toast format.</text:p>
      <text:p text:style-name="P225"><text:span text:style-name="T23">message</text:span>: the message to be displayed.</text:p>
      <text:p text:style-name="P225"><text:span text:style-name="T23">toastDuration</text:span>: the message to be displayed.aa the duration of the message display.</text:p>
      <text:p text:style-name="P225"><text:span text:style-name="T23">elementFocus</text:span>: Optional. An input that will receive the focus.</text:p>
      <text:p text:style-name="P225"><text:span text:style-name="T23">cssToast</text:span>: Optional. A CSS style to be applied to the toast.</text:p>
      <text:p text:style-name="P222"/>
      <text:p text:style-name="P226">==============================================================================================================================================</text:p>
      <text:p text:style-name="P226"/>
      <text:p text:style-name="P227"><text:span text:style-name="T3">function</text:span> <text:span text:style-name="T37">isSamePage</text:span>(<text:span text:style-name="T38">pageName</text:span>) {</text:p>
      <text:p text:style-name="P33">    <text:span text:style-name="T5">let</text:span><text:span text:style-name="T6"> </text:span><text:span text:style-name="T7">page</text:span><text:span text:style-name="T6"> = </text:span><text:span text:style-name="T7">window</text:span><text:span text:style-name="T6">.</text:span><text:span text:style-name="T7">location</text:span><text:span text:style-name="T6">.</text:span><text:span text:style-name="T7">href</text:span><text:span text:style-name="T6">.</text:span><text:span text:style-name="T8">split</text:span><text:span text:style-name="T6">(</text:span><text:span text:style-name="T9">'/'</text:span><text:span text:style-name="T6">).</text:span><text:span text:style-name="T8">slice</text:span><text:span text:style-name="T6">(-</text:span><text:span text:style-name="T13">1</text:span><text:span text:style-name="T6">)[</text:span><text:span text:style-name="T13">0</text:span><text:span text:style-name="T6">];</text:span></text:p>
      <text:p text:style-name="P33">    <text:span text:style-name="T12">return</text:span><text:span text:style-name="T6"> </text:span><text:span text:style-name="T7">pageName</text:span><text:span text:style-name="T6">.</text:span><text:span text:style-name="T8">toLowerCase</text:span><text:span text:style-name="T6">() === </text:span><text:span text:style-name="T7">page</text:span><text:span text:style-name="T6">.</text:span><text:span text:style-name="T8">toLowerCase</text:span><text:span text:style-name="T6">()</text:span></text:p>
      <text:p text:style-name="P34">}</text:p>
      <text:p text:style-name="P226"/>
      <text:p text:style-name="P228">Try checking if we're on the same page.</text:p>
      <text:p text:style-name="P229"><text:span text:style-name="T23">pageName</text:span>: Try checking if we're on the same page.</text:p>
      <text:p text:style-name="P226"/>
      <text:p text:style-name="P226">==============================================================================================================================================</text:p>
      <text:p text:style-name="P226"/>
      <text:p text:style-name="P227"><text:span text:style-name="T3">function</text:span> <text:span text:style-name="T37">transitoryClass</text:span>(<text:span text:style-name="T38">element</text:span>, <text:span text:style-name="T38">duration</text:span>, <text:span text:style-name="T38">classes</text:span>) {</text:p>
      <text:p text:style-name="P33">    <text:span text:style-name="T8">addClasses</text:span><text:span text:style-name="T6">(</text:span><text:span text:style-name="T7">element</text:span><text:span text:style-name="T6">, </text:span><text:span text:style-name="T7">classes</text:span><text:span text:style-name="T6">)</text:span></text:p>
      <text:p text:style-name="P33">    <text:span text:style-name="T8">setTimeout</text:span><text:span text:style-name="T6">(() </text:span><text:span text:style-name="T5">=&gt;</text:span><text:span text:style-name="T6"> </text:span><text:span text:style-name="T8">removeClasses</text:span><text:span text:style-name="T6">(</text:span><text:span text:style-name="T7">element</text:span><text:span text:style-name="T6">, </text:span><text:span text:style-name="T7">classes</text:span><text:span text:style-name="T6">), </text:span><text:span text:style-name="T7">duration</text:span><text:span text:style-name="T6"> * </text:span><text:span text:style-name="T13">1000</text:span><text:span text:style-name="T6">)</text:span></text:p>
      <text:p text:style-name="P34">}</text:p>
      <text:p text:style-name="P226"/>
      <text:p text:style-name="P228">You need to specify the CSS style.</text:p>
      <text:p text:style-name="P228"><text:soft-page-break/>Applies a temporary CSS style to an HTML element.</text:p>
      <text:p text:style-name="P229"><text:span text:style-name="T23">element</text:span>: The HTML element to which the style will be applied.</text:p>
      <text:p text:style-name="P229"><text:span text:style-name="T23">duration</text:span>: The duration of the CSS style application.</text:p>
      <text:p text:style-name="P229"><text:span text:style-name="T23">classes</text:span>: the CSS style classes to be applied.</text:p>
      <text:p text:style-name="P226">==============================================================================================================================================</text:p>
      <text:p text:style-name="P226"/>
      <text:p text:style-name="P227"><text:span text:style-name="T3">function</text:span> <text:span text:style-name="T37">transitorySuccess</text:span>(<text:span text:style-name="T38">response</text:span>, <text:span text:style-name="T38">elementInput</text:span>, <text:span text:style-name="T38">doFocus</text:span>, <text:span text:style-name="T38">duration</text:span> = <text:span text:style-name="T43">5</text:span>, <text:span text:style-name="T38">cssSuccess</text:span> = <text:span text:style-name="T46">'fontColorBlue'</text:span>, <text:span text:style-name="T38">cssError</text:span>=<text:span text:style-name="T46">'fontColorRed'</text:span>) {</text:p>
      <text:p text:style-name="P33">    <text:span text:style-name="T12">if</text:span><text:span text:style-name="T6"> (</text:span><text:span text:style-name="T7">response</text:span><text:span text:style-name="T6">.</text:span><text:span text:style-name="T7">success</text:span><text:span text:style-name="T6">) {</text:span></text:p>
      <text:p text:style-name="P33">        <text:span text:style-name="T8">transitoryClass</text:span><text:span text:style-name="T6">(</text:span><text:span text:style-name="T7">elementInput</text:span><text:span text:style-name="T6">, </text:span><text:span text:style-name="T7">duration</text:span><text:span text:style-name="T6">, </text:span><text:span text:style-name="T7">cssSuccess</text:span><text:span text:style-name="T6">)</text:span></text:p>
      <text:p text:style-name="P33">        <text:span text:style-name="T8">removeClasses</text:span><text:span text:style-name="T6">(</text:span><text:span text:style-name="T7">elementInput</text:span><text:span text:style-name="T6">, </text:span><text:span text:style-name="T7">cssError</text:span><text:span text:style-name="T6">)</text:span></text:p>
      <text:p text:style-name="P33">        <text:span text:style-name="T12">return</text:span></text:p>
      <text:p text:style-name="P33">    <text:span text:style-name="T6">}</text:span></text:p>
      <text:p text:style-name="P33">    <text:span text:style-name="T8">removeClasses</text:span><text:span text:style-name="T6">(</text:span><text:span text:style-name="T7">elementInput</text:span><text:span text:style-name="T6">, </text:span><text:span text:style-name="T7">cssSuccess</text:span><text:span text:style-name="T6">)</text:span></text:p>
      <text:p text:style-name="P33">    <text:span text:style-name="T8">addClasses</text:span><text:span text:style-name="T6">(</text:span><text:span text:style-name="T7">elementInput</text:span><text:span text:style-name="T6">, </text:span><text:span text:style-name="T7">cssError</text:span><text:span text:style-name="T6">)</text:span></text:p>
      <text:p text:style-name="P33">    <text:span text:style-name="T7">doFocus</text:span><text:span text:style-name="T6"> &amp;&amp; </text:span><text:span text:style-name="T7">elementInput</text:span><text:span text:style-name="T6">.</text:span><text:span text:style-name="T8">focus</text:span><text:span text:style-name="T6">()</text:span></text:p>
      <text:p text:style-name="P34">}</text:p>
      <text:p text:style-name="P226"/>
      <text:p text:style-name="P228">You need to specify the CSS style.</text:p>
      <text:p text:style-name="P229">Applies a transient CSS style based on the request status.</text:p>
      <text:p text:style-name="P229"><text:span text:style-name="T23">response</text:span>: The response to the request.</text:p>
      <text:p text:style-name="P229"><text:span text:style-name="T23">elementInput</text:span>: The input that motivated the request.</text:p>
      <text:p text:style-name="P229"><text:span text:style-name="T23">doFocus</text:span>: The elementInput will request focus if the request encounters an error.</text:p>
      <text:p text:style-name="P229"><text:span text:style-name="T23">duration</text:span>: The duration of the CSS style application.</text:p>
      <text:p text:style-name="P229"><text:span text:style-name="T23">cssSuccess</text:span>: The CSS class to be applied in case of a successful response.</text:p>
      <text:p text:style-name="P229"><text:span text:style-name="T23">cssError</text:span>: The CSS class to be applied in case of an error response.</text:p>
      <text:p text:style-name="P226"/>
      <text:p text:style-name="P226">==============================================================================================================================================</text:p>
      <text:p text:style-name="P226"/>
      <text:p text:style-name="P227"><text:span text:style-name="T3">function</text:span> <text:span text:style-name="T37">multiSort</text:span>(<text:span text:style-name="T38">array</text:span>, ... <text:span text:style-name="T38">ordenations</text:span>){</text:p>
      <text:p text:style-name="P33">    <text:span text:style-name="T7">ordenations</text:span><text:span text:style-name="T6"> = </text:span><text:span text:style-name="T7">ordenations</text:span><text:span text:style-name="T6">.</text:span><text:span text:style-name="T8">map</text:span><text:span text:style-name="T6">((</text:span><text:span text:style-name="T7">item</text:span><text:span text:style-name="T6">, </text:span><text:span text:style-name="T7">index</text:span><text:span text:style-name="T6">) </text:span><text:span text:style-name="T5">=&gt;</text:span><text:span text:style-name="T6"> {</text:span></text:p>
      <text:p text:style-name="P33">        <text:span text:style-name="T12">if</text:span><text:span text:style-name="T6">(!</text:span><text:span text:style-name="T7">item</text:span><text:span text:style-name="T6"> || </text:span><text:span text:style-name="T5">typeof</text:span><text:span text:style-name="T6"> </text:span><text:span text:style-name="T7">item</text:span><text:span text:style-name="T6"> == </text:span><text:span text:style-name="T9">'boolean'</text:span><text:span text:style-name="T6">) </text:span><text:span text:style-name="T12">return</text:span><text:span text:style-name="T6"> </text:span><text:span text:style-name="T5">false</text:span></text:p>
      <text:p text:style-name="P33">        <text:span text:style-name="T5">let</text:span><text:span text:style-name="T6"> </text:span><text:span text:style-name="T7">reverse</text:span><text:span text:style-name="T6"> = </text:span><text:span text:style-name="T7">ordenations</text:span><text:span text:style-name="T6">[</text:span><text:span text:style-name="T7">index</text:span><text:span text:style-name="T6">+</text:span><text:span text:style-name="T13">1</text:span><text:span text:style-name="T6">];</text:span></text:p>
      <text:p text:style-name="P33">        <text:span text:style-name="T7">reverse</text:span><text:span text:style-name="T6"> = </text:span><text:span text:style-name="T5">typeof</text:span><text:span text:style-name="T6"> </text:span><text:span text:style-name="T7">reverse</text:span><text:span text:style-name="T6"> == </text:span><text:span text:style-name="T9">'boolean'</text:span><text:span text:style-name="T6"> ? </text:span><text:span text:style-name="T7">reverse</text:span><text:span text:style-name="T6"> : </text:span><text:span text:style-name="T5">false</text:span><text:span text:style-name="T6">;</text:span></text:p>
      <text:p text:style-name="P33">        <text:span text:style-name="T12">if</text:span><text:span text:style-name="T6">(</text:span><text:span text:style-name="T5">typeof</text:span><text:span text:style-name="T6"> </text:span><text:span text:style-name="T7">item</text:span><text:span text:style-name="T6"> == </text:span><text:span text:style-name="T9">'string'</text:span><text:span text:style-name="T6">) </text:span><text:span text:style-name="T12">return</text:span><text:span text:style-name="T6"> {</text:span><text:span text:style-name="T7">key:</text:span><text:span text:style-name="T6"> </text:span><text:span text:style-name="T7">item</text:span><text:span text:style-name="T6">, </text:span><text:span text:style-name="T7">reverse</text:span><text:span text:style-name="T6">}</text:span></text:p>
      <text:p text:style-name="P33">        <text:span text:style-name="T12">return</text:span><text:span text:style-name="T6"> </text:span><text:span text:style-name="T7">item</text:span></text:p>
      <text:p text:style-name="P33">    <text:span text:style-name="T6">}).</text:span><text:span text:style-name="T8">filter</text:span><text:span text:style-name="T6">(</text:span><text:span text:style-name="T7">ordenation</text:span><text:span text:style-name="T6"> </text:span><text:span text:style-name="T5">=&gt;</text:span><text:span text:style-name="T6"> </text:span><text:span text:style-name="T7">ordenation</text:span><text:span text:style-name="T6">)</text:span></text:p>
      <text:p text:style-name="P40"/>
      <text:p text:style-name="P33">    <text:span text:style-name="T7">ordenations</text:span><text:span text:style-name="T6">.</text:span><text:span text:style-name="T8">reverse</text:span><text:span text:style-name="T6">().</text:span><text:span text:style-name="T8">forEach</text:span><text:span text:style-name="T6">(</text:span><text:span text:style-name="T7">ordenation</text:span><text:span text:style-name="T6"> </text:span><text:span text:style-name="T5">=&gt;</text:span><text:span text:style-name="T6"> {</text:span></text:p>
      <text:p text:style-name="P33">        <text:span text:style-name="T5">let</text:span><text:span text:style-name="T6"> </text:span><text:span text:style-name="T7">key</text:span><text:span text:style-name="T6"> = </text:span><text:span text:style-name="T7">ordenation</text:span><text:span text:style-name="T6">.</text:span><text:span text:style-name="T7">key</text:span><text:span text:style-name="T6">,</text:span></text:p>
      <text:p text:style-name="P33">            <text:span text:style-name="T7">reverse</text:span><text:span text:style-name="T6"> = </text:span><text:span text:style-name="T7">ordenation</text:span><text:span text:style-name="T6">.</text:span><text:span text:style-name="T7">reverse</text:span><text:span text:style-name="T6"> ? -</text:span><text:span text:style-name="T13">1</text:span><text:span text:style-name="T6"> : </text:span><text:span text:style-name="T13">1</text:span><text:span text:style-name="T6">;</text:span></text:p>
      <text:p text:style-name="P33">        <text:span text:style-name="T7">array</text:span><text:span text:style-name="T6">.</text:span><text:span text:style-name="T8">sort</text:span><text:span text:style-name="T6">((</text:span><text:span text:style-name="T7">prev</text:span><text:span text:style-name="T6">, </text:span><text:span text:style-name="T7">next</text:span><text:span text:style-name="T6">) </text:span><text:span text:style-name="T5">=&gt;</text:span><text:span text:style-name="T6">{</text:span></text:p>
      <text:p text:style-name="P33">            <text:span text:style-name="T12">if</text:span><text:span text:style-name="T6">(</text:span><text:span text:style-name="T7">prev</text:span><text:span text:style-name="T6">[</text:span><text:span text:style-name="T7">key</text:span><text:span text:style-name="T6">] == </text:span><text:span text:style-name="T7">next</text:span><text:span text:style-name="T6">[</text:span><text:span text:style-name="T7">key</text:span><text:span text:style-name="T6">]) </text:span><text:span text:style-name="T12">return</text:span><text:span text:style-name="T6"> </text:span><text:span text:style-name="T13">0</text:span></text:p>
      <text:p text:style-name="P33">            <text:span text:style-name="T12">return</text:span><text:span text:style-name="T6"> </text:span><text:span text:style-name="T7">prev</text:span><text:span text:style-name="T6">[</text:span><text:span text:style-name="T7">key</text:span><text:span text:style-name="T6">] &gt; </text:span><text:span text:style-name="T7">next</text:span><text:span text:style-name="T6">[</text:span><text:span text:style-name="T7">key</text:span><text:span text:style-name="T6">] ? </text:span><text:span text:style-name="T13">1</text:span><text:span text:style-name="T6"> * </text:span><text:span text:style-name="T7">reverse</text:span><text:span text:style-name="T6"> : -</text:span><text:span text:style-name="T13">1</text:span><text:span text:style-name="T6"> * </text:span><text:span text:style-name="T7">reverse</text:span></text:p>
      <text:p text:style-name="P33">        <text:span text:style-name="T6">})</text:span></text:p>
      <text:p text:style-name="P33">    <text:span text:style-name="T6">})</text:span></text:p>
      <text:p text:style-name="P34">}</text:p>
      <text:p text:style-name="P226"/>
      <text:p text:style-name="P230">Performs multiple sorting on a list of objects.</text:p>
      <text:p text:style-name="P230"><text:soft-page-break/>For example, the object person, containing the keys name, age, and city, can be sorted by age, then by name, then by city.</text:p>
      <text:p text:style-name="P231">In each sorting, the sorting direction can be set to true or false.</text:p>
      <text:p text:style-name="P231">If the direction is true, the sorting will be reverse (descending).</text:p>
      <text:p text:style-name="P231">If the direction is false, the sorting will be direct (ascending).</text:p>
      <text:p text:style-name="P231">Example of sorting:</text:p>
      <text:p text:style-name="P232">multiSort(lista, {key:'idade', reverse: true}, 'nome', true, cidade)</text:p>
      <text:p text:style-name="P230">As noted, there are three ways to indicate the ordering:</text:p>
      <text:p text:style-name="P231">a) with a JSON containing the keys key and reverse; and</text:p>
      <text:p text:style-name="P231">b) the key followed by true or false;</text:p>
      <text:p text:style-name="P231">c) the key without being followed by true or false, it is assumed that reverse = false.</text:p>
      <text:p text:style-name="P233">==============================================================================================================================================</text:p>
      <text:p text:style-name="P233"/>
      <text:p text:style-name="P234"><text:span text:style-name="T3">function</text:span> <text:span text:style-name="T37">urlParams</text:span>(){</text:p>
      <text:p text:style-name="P33">    <text:span text:style-name="T5">let</text:span><text:span text:style-name="T6"> </text:span><text:span text:style-name="T7">href</text:span><text:span text:style-name="T6"> = </text:span><text:span text:style-name="T7">window</text:span><text:span text:style-name="T6">.</text:span><text:span text:style-name="T7">location</text:span><text:span text:style-name="T6">.</text:span><text:span text:style-name="T7">href</text:span><text:span text:style-name="T6">,</text:span></text:p>
      <text:p text:style-name="P33">        <text:span text:style-name="T7">indexToken</text:span><text:span text:style-name="T6"> = </text:span><text:span text:style-name="T7">href</text:span><text:span text:style-name="T6">.</text:span><text:span text:style-name="T8">indexOf</text:span><text:span text:style-name="T6">(</text:span><text:span text:style-name="T9">'?'</text:span><text:span text:style-name="T6">);</text:span></text:p>
      <text:p text:style-name="P33">    <text:span text:style-name="T12">if</text:span><text:span text:style-name="T6">(</text:span><text:span text:style-name="T7">indexToken</text:span><text:span text:style-name="T6"> &lt; </text:span><text:span text:style-name="T13">0</text:span><text:span text:style-name="T6">) </text:span><text:span text:style-name="T12">return</text:span><text:span text:style-name="T6"> {}</text:span></text:p>
      <text:p text:style-name="P40"/>
      <text:p text:style-name="P33">    <text:span text:style-name="T12">return</text:span><text:span text:style-name="T6"> </text:span><text:span text:style-name="T7">href</text:span><text:span text:style-name="T6">.</text:span><text:span text:style-name="T8">substring</text:span><text:span text:style-name="T6">(</text:span><text:span text:style-name="T7">indexToken</text:span><text:span text:style-name="T6">+</text:span><text:span text:style-name="T13">1</text:span><text:span text:style-name="T6">).</text:span><text:span text:style-name="T8">split</text:span><text:span text:style-name="T6">(</text:span><text:span text:style-name="T9">'&amp;'</text:span><text:span text:style-name="T6">)</text:span></text:p>
      <text:p text:style-name="P33">        <text:span text:style-name="T6">.</text:span><text:span text:style-name="T8">reduce</text:span><text:span text:style-name="T6">((</text:span><text:span text:style-name="T7">accumulator</text:span><text:span text:style-name="T6">, </text:span><text:span text:style-name="T7">arg</text:span><text:span text:style-name="T6">) </text:span><text:span text:style-name="T5">=&gt;</text:span><text:span text:style-name="T6"> {</text:span></text:p>
      <text:p text:style-name="P33">            <text:span text:style-name="T5">let</text:span><text:span text:style-name="T6"> </text:span><text:span text:style-name="T7">tokenIndex</text:span><text:span text:style-name="T6"> = </text:span><text:span text:style-name="T7">arg</text:span><text:span text:style-name="T6">.</text:span><text:span text:style-name="T8">indexOf</text:span><text:span text:style-name="T6">(</text:span><text:span text:style-name="T9">'='</text:span><text:span text:style-name="T6">); </text:span></text:p>
      <text:p text:style-name="P33">            <text:span text:style-name="T7">accumulator</text:span><text:span text:style-name="T6">[</text:span><text:span text:style-name="T7">arg</text:span><text:span text:style-name="T6">.</text:span><text:span text:style-name="T8">substring</text:span><text:span text:style-name="T6">(</text:span><text:span text:style-name="T13">0</text:span><text:span text:style-name="T6">, </text:span><text:span text:style-name="T7">tokenIndex</text:span><text:span text:style-name="T6">)]=</text:span><text:span text:style-name="T7">arg</text:span><text:span text:style-name="T6">.</text:span><text:span text:style-name="T8">substring</text:span><text:span text:style-name="T6">(</text:span><text:span text:style-name="T7">tokenIndex</text:span><text:span text:style-name="T6">+</text:span><text:span text:style-name="T13">1</text:span><text:span text:style-name="T6">);</text:span></text:p>
      <text:p text:style-name="P33">            <text:span text:style-name="T12">return</text:span><text:span text:style-name="T6"> </text:span><text:span text:style-name="T7">accumulator</text:span></text:p>
      <text:p text:style-name="P33">        <text:span text:style-name="T6">},{});</text:span></text:p>
      <text:p text:style-name="P34">}</text:p>
      <text:p text:style-name="P34"/>
      <text:p text:style-name="P230">Retrieves the URL parameters.</text:p>
      <text:p text:style-name="P231">For example, being on the page http://localhost/order?quantity=5&amp;installments=10 will return a JSON in the format {order:5, installments:10}</text:p>
      <text:p text:style-name="P233"/>
      <text:p text:style-name="P235">======================================================================== <text:s text:c="59"/>OUTRAS INFORMAÇÕES <text:s text:c="49"/>=</text:p>
      <text:p text:style-name="P235">=======================================================================</text:p>
      <text:p text:style-name="P236"/>
      <text:p text:style-name="P236">INPUTS</text:p>
      <text:p text:style-name="P236"/>
      <text:p text:style-name="P237">In Kalida, semantically, for naming purposes, we consider only two types of input:</text:p>
      <text:p text:style-name="P238">a) input, for requests to create entities and retrieve information; and</text:p>
      <text:p text:style-name="P238">b) inputUpdate, for requests to update and delete entities.</text:p>
      <text:p text:style-name="P238">These two types of input are evaluated when the instruction view.viewValues_(fromUpdate, … addVarKeys) is invoked.</text:p>
      <text:p text:style-name="P238">If fromUpdate = true, the view will extract a JSON where the keys will be the names of the update inputs and the values ​​will be the values ​​of the respective update inputs.</text:p>
      <text:p text:style-name="P238">If fromUpdate = false, the view will extract a JSON where the keys will be the names of the inputs and the values ​​will be the values ​​of the respective inputs.</text:p>
      <text:p text:style-name="P238">This extraction occurs according to the variable name, which will begin with input + complement or inputUpdate + complement, that is, the evaluation for extraction purposes is done based on the variable name.</text:p>
      <text:p text:style-name="P238"/>
      <text:p text:style-name="P239">NAME COLLISION</text:p>
      <text:p text:style-name="P240"/>
      <text:p text:style-name="P18"><text:soft-page-break/>Please note that when receiving a response from the server, variables that begin or end with an underscore (_) should be avoided to prevent overwriting issues due to name collisions, such as with <text:span text:style-name="T54">_init</text:span> and <text:span text:style-name="T54">addSourceKeys</text:span> when working with views.</text:p>
      <text:p text:style-name="Text_20_body"/>
      <text:p text:style-name="P239"/>
      <text:p text:style-name="P241">INPUT NOMENCLATURE</text:p>
      <text:p text:style-name="P241"/>
      <text:p text:style-name="P242">HTML input elements should be named with the prefix input or inputUpdate, according to the type of action to be performed with the data to be obtained from the input. This is important because this rule allows you to retrieve the data from the inputs through the view using the instruction viewValues_(fromUpdate, … addVarKEys).</text:p>
      <text:p text:style-name="P242">Regarding views, when a view type is specified many times on the same page, this view should be named with the prefix ViewRow.</text:p>
      <text:p text:style-name="P242">The other views are named with the prefix View.</text:p>
      <text:p text:style-name="P242">By convention, when it is necessary to declare a variable using the instruction A.jView(viewChild, viewParent, varName), the variable (varName) should be specified with the prefix view.</text:p>
      <text:p text:style-name="P236"/>
      <text:p text:style-name="P243">ABBREVIATIONS</text:p>
      <text:p text:style-name="P243"/>
      <text:p text:style-name="P244">When you create HTML elements using the constant E or A, or A_SAVED, the HTML elements receive the following extension functions:</text:p>
      <text:p text:style-name="P245">a) a {appendTo},</text:p>
      <text:p text:style-name="P245"><text:tab/>to append HTML elements:</text:p>
      <text:p text:style-name="P245"><text:tab/>e.a = (... elements) =&gt; appendTo(e, elements);</text:p>
      <text:p text:style-name="P245">b) c {addClasses},</text:p>
      <text:p text:style-name="P245"><text:tab/>to add non-inspectable classes to the HTML element:</text:p>
      <text:p text:style-name="P245"><text:tab/>e.c = (... classes) =&gt; addClasses(e, classes);</text:p>
      <text:p text:style-name="P245">c) rmc {removeClasses}, </text:p>
      <text:p text:style-name="P245"><text:tab/>to remove non-inspectable classes from the HTML element:</text:p>
      <text:p text:style-name="P245"><text:tab/>e.rmc = (... classes) =&gt; removeClasses(e, classes);</text:p>
      <text:p text:style-name="P245">d) d {disable}, </text:p>
      <text:p text:style-name="P245"><text:tab/>to disable an HTML element:</text:p>
      <text:p text:style-name="P245"><text:tab/>e.d = disabled =&gt; {e.disabled = disabled; return e};</text:p>
      <text:p text:style-name="P244"/>
      <text:p text:style-name="P245">e) h {href},</text:p>
      <text:p text:style-name="P245"><text:tab/>to add the href attribute to the HTML element of type &lt;a&gt;:</text:p>
      <text:p text:style-name="P245"><text:tab/>e.h = href =&gt; { setAttribute(e, ['href', href]); return e};</text:p>
      <text:p text:style-name="P244"/>
      <text:p text:style-name="P245">f) p {placeholder and value},</text:p>
      <text:p text:style-name="P245"><text:tab/>to add a placeholder and a value to an HTML input:</text:p>
      <text:p text:style-name="P245"><text:tab/>e.p = (placeHolder, value = null) =&gt; {</text:p>
      <text:p text:style-name="P245"><text:tab/><text:tab/>setValueAndPlaceHolder(e, value, placeHolder);</text:p>
      <text:p text:style-name="P245"><text:tab/><text:tab/>return e</text:p>
      <text:p text:style-name="P245"><text:tab/>};</text:p>
      <text:p text:style-name="P244"/>
      <text:p text:style-name="P245">g) r {required},</text:p>
      <text:p text:style-name="P245"><text:tab/>to make an input required:</text:p>
      <text:p text:style-name="P245"><text:tab/>e.r = () =&gt; {e.required = true; return e};</text:p>
      <text:p text:style-name="P244"/>
      <text:p text:style-name="P245">h) t {text node},</text:p>
      <text:p text:style-name="P245"><text:soft-page-break/><text:tab/>to add a textNode to an HTML element, which can be appended as the last child of the parent if <text:tab/>isLastNode is true:</text:p>
      <text:p text:style-name="P245"><text:tab/>e.t = (text, isLastNode) =&gt; {setTextNode(e, text, isLastNode); return e};</text:p>
      <text:p text:style-name="P244"/>
      <text:p text:style-name="P245">i) v {value}, </text:p>
      <text:p text:style-name="P245"><text:tab/>to add a value to an HTML input:</text:p>
      <text:p text:style-name="P245"><text:tab/>e.v = value =&gt; {setValue(e, value); return e};</text:p>
      <text:p text:style-name="P244"/>
      <text:p text:style-name="P245">j) ck {checked}, to make an input checked:</text:p>
      <text:p text:style-name="P245"><text:tab/>e.ck = (ck = true) =&gt; {e.checked = ck; return e};</text:p>
      <text:p text:style-name="P245">k) otv {option text and value},</text:p>
      <text:p text:style-name="P245"><text:tab/>to add text and a value to an option input:</text:p>
      <text:p text:style-name="P245"><text:tab/>e.otv = (text, value) =&gt; {setTextAndValueToOption(e, text, value); <text:s/>return e}.</text:p>
      <text:p text:style-name="P244"/>
      <text:p text:style-name="P244">When you create HTML elements using the A or A_SAVED constant, the HTML elements receive the following extension functions, in addition to those available in E mode:</text:p>
      <text:p text:style-name="P245">a) cls {classes},</text:p>
      <text:p text:style-name="P245"><text:tab/>to add inspectable classes to the HTML element:</text:p>
      <text:p text:style-name="P245"><text:tab/>e.cls = (... clsName) =&gt; addClasses(e, tagView.defClasses_(clsName));</text:p>
      <text:p text:style-name="P245">b) rmcls {remove classes},</text:p>
      <text:p text:style-name="P245"><text:tab/>to remove inspectable classes from the html element:</text:p>
      <text:p text:style-name="P245"><text:tab/>e.rmcls = (... clsName) =&gt; removeClasses(e, tagView.defClasses_(clsName)); <text:span text:style-name="T55">and</text:span></text:p>
      <text:p text:style-name="P245">c) for {for}, </text:p>
      <text:p text:style-name="P245"><text:tab/>for focus request:</text:p>
      <text:p text:style-name="P245"><text:tab/>e.for = (varName_) =&gt; {</text:p>
      <text:p text:style-name="P244"><text:tab/><text:tab/>e.addEventListener('click', () =&gt; {</text:p>
      <text:p text:style-name="P244"><text:tab/><text:tab/><text:tab/>let target = varName_? varName_ : 'input'+(varName.split('lbl')[1]);</text:p>
      <text:p text:style-name="P244"><text:tab/><text:tab/><text:tab/>tagView[target].focus()</text:p>
      <text:p text:style-name="P244"><text:tab/><text:tab/>})</text:p>
      <text:p text:style-name="P244"><text:tab/><text:tab/>return e</text:p>
      <text:p text:style-name="P244"><text:tab/>}</text:p>
      <text:p text:style-name="P246"/>
      <text:p text:style-name="P246"/>
      <text:p text:style-name="P246"/>
      <text:p text:style-name="P247"><text:s/>URL MANIPULATION</text:p>
      <text:p text:style-name="P247"/>
      <text:p text:style-name="P248">Examples of creating URLs by inference, after proper configuration in the APIs.js file.</text:p>
      <text:p text:style-name="P248"/>
      <text:p text:style-name="P248">API_KALIDA.toResource()</text:p>
      <text:p text:style-name="P248"><text:tab/>generates <text:a xlink:type="simple" xlink:href="https://kalida.com/" text:style-name="Internet_20_link" text:visited-style-name="Visited_20_Internet_20_Link">https://kalida.com</text:a></text:p>
      <text:p text:style-name="P248"/>
      <text:p text:style-name="P248">API_KALIDA.toUsers()</text:p>
      <text:p text:style-name="P248"><text:tab/>generates <text:a xlink:type="simple" xlink:href="https://kalida.com/users" text:style-name="Internet_20_link" text:visited-style-name="Visited_20_Internet_20_Link">https://kalida.com/users</text:a></text:p>
      <text:p text:style-name="P248"/>
      <text:p text:style-name="P248">API_KALIDA.toUsers(7)</text:p>
      <text:p text:style-name="P248"><text:tab/>generates <text:a xlink:type="simple" xlink:href="https://kalida.com/users/7" text:style-name="Internet_20_link" text:visited-style-name="Visited_20_Internet_20_Link">https://kalida.com/users/7</text:a></text:p>
      <text:p text:style-name="P248"/>
      <text:p text:style-name="P248">API_KALIDA.toUsers("fever/"+37)</text:p>
      <text:p text:style-name="P248"><text:tab/>generates <text:a xlink:type="simple" xlink:href="https://kalida.com/users/fever/37" text:style-name="Internet_20_link" text:visited-style-name="Visited_20_Internet_20_Link">https://kalida.com/users/fever/37</text:a></text:p>
      <text:p text:style-name="P248"/>
      <text:p text:style-name="P248">API_KALIDA.toUsers("fever/"+37+"/hospital")</text:p>
      <text:p text:style-name="P248"><text:tab/>generates <text:a xlink:type="simple" xlink:href="https://kalida.com/users/fever/37/hospital" text:style-name="Internet_20_link" text:visited-style-name="Visited_20_Internet_20_Link">https://kalida.com/users/fever/37/hospital</text:a></text:p>
      <text:p text:style-name="P248"><text:soft-page-break/></text:p>
      <text:p text:style-name="P248">API_KALIDA.toUsers({city:'Aracaju'})</text:p>
      <text:p text:style-name="P248"><text:tab/>generates <text:a xlink:type="simple" xlink:href="https://kalida.com/users?city=Aracaju" text:style-name="Internet_20_link" text:visited-style-name="Visited_20_Internet_20_Link">https://kalida.com/users?city=Aracaju</text:a></text:p>
      <text:p text:style-name="P248"/>
      <text:p text:style-name="P248">API_KALIDA.toUsers({city:'Aracaju', state:'Sergipe'})</text:p>
      <text:p text:style-name="P248"><text:tab/>generates <text:a xlink:type="simple" xlink:href="https://kalida.com/users?city=Aracaju&amp;state=Sergipe" text:style-name="Internet_20_link" text:visited-style-name="Visited_20_Internet_20_Link">https://kalida.com/users?city=Aracaju&amp;state=Sergipe</text:a></text:p>
      <text:p text:style-name="P248"/>
      <text:p text:style-name="P248">--</text:p>
      <text:p text:style-name="P248">let fragment = {</text:p>
      <text:p text:style-name="P248"><text:tab/>subPath: 'fever/'+38+'/hospital', --the subpath is optional,</text:p>
      <text:p text:style-name="P248"><text:tab/>name:"Central",</text:p>
      <text:p text:style-name="P248"><text:tab/>city:"Aracaju"</text:p>
      <text:p text:style-name="P248"/>
      <text:p text:style-name="P249">} </text:p>
      <text:p text:style-name="P249">API_KALIDA.toUsers(fragment)</text:p>
      <text:p text:style-name="P248"><text:tab/>generates <text:a xlink:type="simple" xlink:href="https://kalida.com/users/fever/38/hospital?name=Central&amp;city=Aracaju" text:style-name="Internet_20_link" text:visited-style-name="Visited_20_Internet_20_Link">https://kalida.com/users/fever/38/hospital?name=Central&amp;city=Aracaju</text:a></text:p>
      <text:p text:style-name="P248"/>
      <text:p text:style-name="P248">--</text:p>
      <text:p text:style-name="P248">let fragment = {</text:p>
      <text:p text:style-name="P248"><text:tab/>name:"Atalaia",</text:p>
      <text:p text:style-name="P248"><text:tab/>city:"Aracaju"</text:p>
      <text:p text:style-name="P248"/>
      <text:p text:style-name="P249">} </text:p>
      <text:p text:style-name="P249">API_KALIDA.toPraia(fragment)</text:p>
      <text:p text:style-name="P248"><text:tab/>generates <text:a xlink:type="simple" xlink:href="https://kalida.com/praia?name=Atalaia&amp;city=Aracaju" text:style-name="Internet_20_link" text:visited-style-name="Visited_20_Internet_20_Link">https://kalida.com/praia?name=Atalaia&amp;city=Aracaju</text:a></text:p>
      <text:p text:style-name="P248"/>
      <text:p text:style-name="P248">There are other ways to combine them, but these are basic.</text:p>
      <text:p text:style-name="P250"/>
      <text:p text:style-name="P2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q"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1.566cm" fo:margin-right="1.48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10-08T12:47:52.255000000</meta:creation-date>
    <dc:date>2026-06-20T17:51:01.025144504</dc:date>
    <meta:editing-duration>PT17H3M36S</meta:editing-duration>
    <meta:editing-cycles>31</meta:editing-cycles>
    <meta:generator>LibreOffice/26.2.4.2$Linux_X86_64 LibreOffice_project/620$Build-2</meta:generator>
    <meta:document-statistic meta:table-count="0" meta:image-count="0" meta:object-count="0" meta:page-count="42" meta:paragraph-count="1524" meta:word-count="8914" meta:character-count="72401" meta:non-whitespace-character-count="59062"/>
  </office:meta>
</office:document-meta>
</file>